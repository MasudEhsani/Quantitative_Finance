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0000"/>
      <style:text-properties fo:color="#111111"/>
    </style:style>
    <style:style style:name="ce8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delta t </text:p>
          </table:table-cell>
          <table:table-cell table:style-name="ce1" table:formula="of:=[.E1]/[.E2]" office:value-type="float" office:value="0.0166666666666667" calcext:value-type="float">
            <text:p>0.016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option pr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table:style-name="ce1" table:formula="of:= EXP([.E4]*SQRT([.B1]))" office:value-type="float" office:value="1.03948961040134" calcext:value-type="float">
            <text:p>1.0394896104013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formula="of:=1/[.B2]" office:value-type="float" office:value="0.962010577108035" calcext:value-type="float">
            <text:p>0.96201057710803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table:formula="of:=EXP([.E3]*[.E1]/[.E2])" office:value-type="float" office:value="1.00033338889506" calcext:value-type="float">
            <text:p>1.00033338889506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formula="of:= (EXP(([.E3]-[.E5])*[.B1])-[.B3])/([.B2]-[.B3])" office:value-type="float" office:value="0.492470050624509" calcext:value-type="float">
            <text:p>0.492470050624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1-q</text:p>
          </table:table-cell>
          <table:table-cell table:formula="of:=1-[.B5]" office:value-type="float" office:value="0.507529949375491" calcext:value-type="float">
            <text:p>0.507529949375491</text:p>
          </table:table-cell>
          <table:table-cell/>
          <table:table-cell office:value-type="string" calcext:value-type="string">
            <text:p>s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 table:number-rows-repeated="2">
          <table:table-cell table:style-name="ce1"/>
          <table:table-cell table:number-columns-repeated="20"/>
        </table:table-row>
        <table:table-row table:style-name="ro1">
          <table:table-cell table:style-name="ce1"/>
          <table:table-cell table:number-columns-repeated="5"/>
          <table:table-cell table:formula="of:=[.F10]*[.B2]" office:value-type="float" office:value="126.159778476578" calcext:value-type="float">
            <text:p>126.159778476578</text:p>
          </table:table-cell>
          <table:table-cell table:number-columns-repeated="14"/>
        </table:table-row>
        <table:table-row table:style-name="ro1">
          <table:table-cell table:style-name="ce1"/>
          <table:table-cell table:number-columns-repeated="4"/>
          <table:table-cell table:formula="of:=[.E11]*[.B2]" office:value-type="float" office:value="121.367041300075" calcext:value-type="float">
            <text:p>121.36704130007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D12]*[.B2]" office:value-type="float" office:value="116.75637744298" calcext:value-type="float">
            <text:p>116.75637744298</text:p>
          </table:table-cell>
          <table:table-cell/>
          <table:table-cell table:formula="of:=[.F10]*[.B3]" office:value-type="float" office:value="116.75637744298" calcext:value-type="float">
            <text:p>116.7563774429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C13]*[.B2]" office:value-type="float" office:value="112.320870044965" calcext:value-type="float">
            <text:p>112.320870044965</text:p>
          </table:table-cell>
          <table:table-cell/>
          <table:table-cell table:formula="of:=[.E11]*[.B3]" office:value-type="float" office:value="112.320870044965" calcext:value-type="float">
            <text:p>112.32087004496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[.B14]*[.B2]" office:value-type="float" office:value="108.053865013233" calcext:value-type="float">
            <text:p>108.053865013233</text:p>
          </table:table-cell>
          <table:table-cell/>
          <table:table-cell table:formula="of:=[.D12]*[.B3]" office:value-type="float" office:value="108.053865013233" calcext:value-type="float">
            <text:p>108.053865013233</text:p>
          </table:table-cell>
          <table:table-cell/>
          <table:table-cell table:formula="of:=[.F12]*[.B3]" office:value-type="float" office:value="108.053865013233" calcext:value-type="float">
            <text:p>108.053865013233</text:p>
          </table:table-cell>
          <table:table-cell table:number-columns-repeated="14"/>
        </table:table-row>
        <table:table-row table:style-name="ro1">
          <table:table-cell/>
          <table:table-cell table:formula="of:=[.A15]*[.B2]" office:value-type="float" office:value="103.948961040134" calcext:value-type="float">
            <text:p>103.948961040134</text:p>
          </table:table-cell>
          <table:table-cell/>
          <table:table-cell table:formula="of:=[.C15]*[.B2]" office:value-type="float" office:value="103.948961040134" calcext:value-type="float">
            <text:p>103.948961040134</text:p>
          </table:table-cell>
          <table:table-cell/>
          <table:table-cell table:formula="of:=[.E13]*[.B3]" office:value-type="float" office:value="103.948961040134" calcext:value-type="float">
            <text:p>103.948961040134</text:p>
          </table:table-cell>
          <table:table-cell table:number-columns-repeated="15"/>
        </table:table-row>
        <table:table-row table:style-name="ro1">
          <table:table-cell table:formula="of:= [.E6]" office:value-type="float" office:value="100" calcext:value-type="float">
            <text:p>100</text:p>
          </table:table-cell>
          <table:table-cell/>
          <table:table-cell table:formula="of:=[.B14]*[.B3]" office:value-type="float" office:value="100" calcext:value-type="float">
            <text:p>100</text:p>
          </table:table-cell>
          <table:table-cell/>
          <table:table-cell table:formula="of:=[.D14]*[.B3]" office:value-type="float" office:value="100" calcext:value-type="float">
            <text:p>100</text:p>
          </table:table-cell>
          <table:table-cell/>
          <table:table-cell table:formula="of:=[.F14]*[.B3]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formula="of:= [.A15] *[.B3]" office:value-type="float" office:value="96.2010577108035" calcext:value-type="float">
            <text:p>96.2010577108035</text:p>
          </table:table-cell>
          <table:table-cell/>
          <table:table-cell table:formula="of:=[.C15]*[.B3]" office:value-type="float" office:value="96.2010577108035" calcext:value-type="float">
            <text:p>96.2010577108035</text:p>
          </table:table-cell>
          <table:table-cell/>
          <table:table-cell table:formula="of:=[.E15]*[.B3]" office:value-type="float" office:value="96.2010577108035" calcext:value-type="float">
            <text:p>96.201057710803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[.B16]*[.B3]" office:value-type="float" office:value="92.5464350467735" calcext:value-type="float">
            <text:p>92.5464350467735</text:p>
          </table:table-cell>
          <table:table-cell/>
          <table:table-cell table:formula="of:=[.D16]*[.B3]" office:value-type="float" office:value="92.5464350467735" calcext:value-type="float">
            <text:p>92.5464350467735</text:p>
          </table:table-cell>
          <table:table-cell/>
          <table:table-cell table:formula="of:=[.F16]*[.B3]" office:value-type="float" office:value="92.5464350467735" calcext:value-type="float">
            <text:p>92.546435046773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C17]*[.B3]" office:value-type="float" office:value="89.0306493886379" calcext:value-type="float">
            <text:p>89.0306493886379</text:p>
          </table:table-cell>
          <table:table-cell/>
          <table:table-cell table:formula="of:=[.E17]*[.B3]" office:value-type="float" office:value="89.0306493886379" calcext:value-type="float">
            <text:p>89.030649388637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D18]*[.B3]" office:value-type="float" office:value="85.6484263986667" calcext:value-type="float">
            <text:p>85.6484263986667</text:p>
          </table:table-cell>
          <table:table-cell/>
          <table:table-cell table:formula="of:=[.F18]*[.B3]" office:value-type="float" office:value="85.6484263986667" calcext:value-type="float">
            <text:p>85.648426398666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[.E19]*[.B3]" office:value-type="float" office:value="82.3946921081765" calcext:value-type="float">
            <text:p>82.3946921081765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F20]*[.B3]" office:value-type="float" office:value="79.2645653056257" calcext:value-type="float">
            <text:p>79.2645653056257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16"/>
          <table:table-cell table:style-name="ce10" office:value-type="string" calcext:value-type="string">
            <text:p>Payoffs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O26]*[.$B$2]" office:value-type="float" office:value="178.773150758243" calcext:value-type="float">
            <text:p>178.773150758243</text:p>
          </table:table-cell>
          <table:table-cell table:formula="of:=MAX([.P25] - [.$H$1];0)" office:value-type="float" office:value="68.7731507582431" calcext:value-type="float">
            <text:p>68.7731507582431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Europian call</text:p>
          </table:table-cell>
        </table:table-row>
        <table:table-row table:style-name="ro3">
          <table:table-cell table:style-name="ce2" office:value-type="string" calcext:value-type="string">
            <text:p>Price-Evolution</text:p>
          </table:table-cell>
          <table:table-cell table:number-columns-repeated="13"/>
          <table:table-cell table:formula="of:=[.N27]*[.$B$2]" office:value-type="float" office:value="171.981661932359" calcext:value-type="float">
            <text:p>171.981661932359</text:p>
          </table:table-cell>
          <table:table-cell table:formula="of:=[.O27]*[.$B$2]" office:value-type="float" office:value="165.448177847548" calcext:value-type="float">
            <text:p>165.448177847548</text:p>
          </table:table-cell>
          <table:table-cell table:formula="of:=MAX([.P26] - [.$H$1];0)" office:value-type="float" office:value="55.448177847548" calcext:value-type="float">
            <text:p>55.448177847548</text:p>
          </table:table-cell>
          <table:table-cell/>
          <table:table-cell table:formula="of:=[.B5]^15" office:value-type="float" office:value="0.0000243050972313882" calcext:value-type="float">
            <text:p>2.43050972313882E-05</text:p>
          </table:table-cell>
          <table:table-cell/>
          <table:table-cell table:formula="of:= (1/[.B4]^[.E2])*SUMPRODUCT( [.Q25:.Q31] ; [.S26:.S32])" office:value-type="float" office:value="2.60407713296691" calcext:value-type="float">
            <text:p>2.60407713296691</text:p>
          </table:table-cell>
        </table:table-row>
        <table:table-row table:style-name="ro1">
          <table:table-cell table:number-columns-repeated="13"/>
          <table:table-cell table:formula="of:=[.M28]*[.$B$2]" office:value-type="float" office:value="165.448177847548" calcext:value-type="float">
            <text:p>165.448177847548</text:p>
          </table:table-cell>
          <table:table-cell table:formula="of:=[.N28]*[.$B$2]" office:value-type="float" office:value="159.162897052593" calcext:value-type="float">
            <text:p>159.162897052593</text:p>
          </table:table-cell>
          <table:table-cell table:formula="of:=[.O28]*[.$B$2]" office:value-type="float" office:value="153.116390447751" calcext:value-type="float">
            <text:p>153.116390447751</text:p>
          </table:table-cell>
          <table:table-cell table:formula="of:=MAX([.P27] - [.$H$1];0)" office:value-type="float" office:value="43.1163904477513" calcext:value-type="float">
            <text:p>43.1163904477513</text:p>
          </table:table-cell>
          <table:table-cell/>
          <table:table-cell table:formula="of:= 15 *[.B5]^14*[.B6]" office:value-type="float" office:value="0.000375725328426669" calcext:value-type="float">
            <text:p>0.00037572532842666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L29]*[.$B$2]" office:value-type="float" office:value="159.162897052593" calcext:value-type="float">
            <text:p>159.162897052593</text:p>
          </table:table-cell>
          <table:table-cell table:formula="of:=[.M29]*[.$B$2]" office:value-type="float" office:value="153.116390447751" calcext:value-type="float">
            <text:p>153.116390447751</text:p>
          </table:table-cell>
          <table:table-cell table:formula="of:=[.N29]*[.$B$2]" office:value-type="float" office:value="147.299587139341" calcext:value-type="float">
            <text:p>147.299587139341</text:p>
          </table:table-cell>
          <table:table-cell table:formula="of:=[.O29]*[.$B$2]" office:value-type="float" office:value="141.703760831692" calcext:value-type="float">
            <text:p>141.703760831692</text:p>
          </table:table-cell>
          <table:table-cell table:formula="of:=MAX([.P28] - [.$H$1];0)" office:value-type="float" office:value="31.7037608316924" calcext:value-type="float">
            <text:p>31.7037608316924</text:p>
          </table:table-cell>
          <table:table-cell/>
          <table:table-cell table:formula="of:= COMBIN(15;2) * [.B5]^13*[.B6]^2" office:value-type="float" office:value="0.0027105059418651" calcext:value-type="float">
            <text:p>0.002710505941865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K30]*[.$B$2]" office:value-type="float" office:value="153.116390447751" calcext:value-type="float">
            <text:p>153.116390447751</text:p>
          </table:table-cell>
          <table:table-cell table:formula="of:=[.L30]*[.$B$2]" office:value-type="float" office:value="147.299587139341" calcext:value-type="float">
            <text:p>147.299587139341</text:p>
          </table:table-cell>
          <table:table-cell table:formula="of:=[.M30]*[.$B$2]" office:value-type="float" office:value="141.703760831692" calcext:value-type="float">
            <text:p>141.703760831692</text:p>
          </table:table-cell>
          <table:table-cell table:formula="of:=[.N30]*[.$B$2]" office:value-type="float" office:value="136.320516736075" calcext:value-type="float">
            <text:p>136.320516736075</text:p>
          </table:table-cell>
          <table:table-cell table:formula="of:=[.O30]*[.$B$2]" office:value-type="float" office:value="131.141778976938" calcext:value-type="float">
            <text:p>131.141778976938</text:p>
          </table:table-cell>
          <table:table-cell table:formula="of:=MAX([.P29] - [.$H$1];0)" office:value-type="float" office:value="21.1417789769375" calcext:value-type="float">
            <text:p>21.1417789769375</text:p>
          </table:table-cell>
          <table:table-cell/>
          <table:table-cell table:formula="of:=COMBIN(15;3)*[.B5]^12*[.B6]^3" office:value-type="float" office:value="0.0121047078512757" calcext:value-type="float">
            <text:p>0.012104707851275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J31]*[.$B$2]" office:value-type="float" office:value="147.299587139341" calcext:value-type="float">
            <text:p>147.299587139341</text:p>
          </table:table-cell>
          <table:table-cell table:formula="of:=[.K31]*[.$B$2]" office:value-type="float" office:value="141.703760831692" calcext:value-type="float">
            <text:p>141.703760831692</text:p>
          </table:table-cell>
          <table:table-cell table:formula="of:=[.L31]*[.$B$2]" office:value-type="float" office:value="136.320516736075" calcext:value-type="float">
            <text:p>136.320516736075</text:p>
          </table:table-cell>
          <table:table-cell table:formula="of:=[.M31]*[.$B$2]" office:value-type="float" office:value="131.141778976938" calcext:value-type="float">
            <text:p>131.141778976938</text:p>
          </table:table-cell>
          <table:table-cell table:formula="of:=[.N31]*[.$B$2]" office:value-type="float" office:value="126.159778476578" calcext:value-type="float">
            <text:p>126.159778476578</text:p>
          </table:table-cell>
          <table:table-cell table:formula="of:=[.O31]*[.$B$2]" office:value-type="float" office:value="121.367041300075" calcext:value-type="float">
            <text:p>121.367041300075</text:p>
          </table:table-cell>
          <table:table-cell table:formula="of:=MAX([.P30] - [.$H$1];0)" office:value-type="float" office:value="11.3670413000748" calcext:value-type="float">
            <text:p>11.3670413000748</text:p>
          </table:table-cell>
          <table:table-cell/>
          <table:table-cell table:style-name="ce1" table:formula="of:=COMBIN(15;4)*[.B5]^11*[.B6]^4" office:value-type="float" office:value="0.0374246215897136" calcext:value-type="float">
            <text:p>0.037424621589713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32]*[.$B$2]" office:value-type="float" office:value="141.703760831692" calcext:value-type="float">
            <text:p>141.703760831692</text:p>
          </table:table-cell>
          <table:table-cell table:formula="of:=[.J32]*[.$B$2]" office:value-type="float" office:value="136.320516736075" calcext:value-type="float">
            <text:p>136.320516736075</text:p>
          </table:table-cell>
          <table:table-cell table:formula="of:=[.K32]*[.$B$2]" office:value-type="float" office:value="131.141778976938" calcext:value-type="float">
            <text:p>131.141778976938</text:p>
          </table:table-cell>
          <table:table-cell table:formula="of:=[.L32]*[.$B$2]" office:value-type="float" office:value="126.159778476578" calcext:value-type="float">
            <text:p>126.159778476578</text:p>
          </table:table-cell>
          <table:table-cell table:formula="of:=[.M32]*[.$B$2]" office:value-type="float" office:value="121.367041300075" calcext:value-type="float">
            <text:p>121.367041300075</text:p>
          </table:table-cell>
          <table:table-cell table:formula="of:=[.N32]*[.$B$2]" office:value-type="float" office:value="116.75637744298" calcext:value-type="float">
            <text:p>116.75637744298</text:p>
          </table:table-cell>
          <table:table-cell table:formula="of:=[.O32]*[.$B$2]" office:value-type="float" office:value="112.320870044965" calcext:value-type="float">
            <text:p>112.320870044965</text:p>
          </table:table-cell>
          <table:table-cell table:formula="of:=MAX([.P31] - [.$H$1];0)" office:value-type="float" office:value="2.32087004496452" calcext:value-type="float">
            <text:p>2.32087004496452</text:p>
          </table:table-cell>
          <table:table-cell/>
          <table:table-cell table:formula="of:=COMBIN(15;5)*[.B5]^10*[.B6]^5" office:value-type="float" office:value="0.0848519738587593" calcext:value-type="float">
            <text:p>0.0848519738587593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H33]*[.$B$2]" office:value-type="float" office:value="136.320516736075" calcext:value-type="float">
            <text:p>136.320516736075</text:p>
          </table:table-cell>
          <table:table-cell table:formula="of:=[.I33]*[.$B$2]" office:value-type="float" office:value="131.141778976938" calcext:value-type="float">
            <text:p>131.141778976938</text:p>
          </table:table-cell>
          <table:table-cell table:formula="of:=[.J33]*[.$B$2]" office:value-type="float" office:value="126.159778476578" calcext:value-type="float">
            <text:p>126.159778476578</text:p>
          </table:table-cell>
          <table:table-cell table:formula="of:=[.K33]*[.$B$2]" office:value-type="float" office:value="121.367041300075" calcext:value-type="float">
            <text:p>121.367041300075</text:p>
          </table:table-cell>
          <table:table-cell table:formula="of:=[.L33]*[.$B$2]" office:value-type="float" office:value="116.75637744298" calcext:value-type="float">
            <text:p>116.75637744298</text:p>
          </table:table-cell>
          <table:table-cell table:formula="of:=[.M33]*[.$B$2]" office:value-type="float" office:value="112.320870044965" calcext:value-type="float">
            <text:p>112.320870044965</text:p>
          </table:table-cell>
          <table:table-cell table:formula="of:=[.N33]*[.$B$2]" office:value-type="float" office:value="108.053865013233" calcext:value-type="float">
            <text:p>108.053865013233</text:p>
          </table:table-cell>
          <table:table-cell table:formula="of:=[.O33]*[.$B$2]" office:value-type="float" office:value="103.948961040134" calcext:value-type="float">
            <text:p>103.948961040134</text:p>
          </table:table-cell>
          <table:table-cell table:formula="of:=MAX([.P32] - [.$H$1];0)" office:value-type="float" office:value="0" calcext:value-type="float">
            <text:p>0</text:p>
          </table:table-cell>
          <table:table-cell/>
          <table:table-cell table:formula="of:=COMBIN(15;6)*[.B5]^9*[.B6]^6" office:value-type="float" office:value="0.145744625967052" calcext:value-type="float">
            <text:p>0.145744625967052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G34]*[.$B$2]" office:value-type="float" office:value="131.141778976938" calcext:value-type="float">
            <text:p>131.141778976938</text:p>
          </table:table-cell>
          <table:table-cell table:formula="of:=[.H34]*[.$B$2]" office:value-type="float" office:value="126.159778476578" calcext:value-type="float">
            <text:p>126.159778476578</text:p>
          </table:table-cell>
          <table:table-cell table:formula="of:=[.I34]*[.$B$2]" office:value-type="float" office:value="121.367041300075" calcext:value-type="float">
            <text:p>121.367041300075</text:p>
          </table:table-cell>
          <table:table-cell table:formula="of:=[.J34]*[.$B$2]" office:value-type="float" office:value="116.75637744298" calcext:value-type="float">
            <text:p>116.75637744298</text:p>
          </table:table-cell>
          <table:table-cell table:formula="of:=[.K34]*[.$B$2]" office:value-type="float" office:value="112.320870044965" calcext:value-type="float">
            <text:p>112.320870044965</text:p>
          </table:table-cell>
          <table:table-cell table:formula="of:=[.L34]*[.$B$2]" office:value-type="float" office:value="108.053865013233" calcext:value-type="float">
            <text:p>108.053865013233</text:p>
          </table:table-cell>
          <table:table-cell table:formula="of:=[.M34]*[.$B$2]" office:value-type="float" office:value="103.948961040134" calcext:value-type="float">
            <text:p>103.948961040134</text:p>
          </table:table-cell>
          <table:table-cell table:formula="of:=[.N34]*[.$B$2]" office:value-type="float" office:value="100" calcext:value-type="float">
            <text:p>100</text:p>
          </table:table-cell>
          <table:table-cell table:formula="of:=[.O34]*[.$B$2]" office:value-type="float" office:value="96.2010577108035" calcext:value-type="float">
            <text:p>96.2010577108035</text:p>
          </table:table-cell>
          <table:table-cell table:formula="of:=MAX([.P33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35]*[.$B$2]" office:value-type="float" office:value="126.159778476578" calcext:value-type="float">
            <text:p>126.159778476578</text:p>
          </table:table-cell>
          <table:table-cell table:formula="of:=[.G35]*[.$B$2]" office:value-type="float" office:value="121.367041300075" calcext:value-type="float">
            <text:p>121.367041300075</text:p>
          </table:table-cell>
          <table:table-cell table:formula="of:=[.H35]*[.$B$2]" office:value-type="float" office:value="116.75637744298" calcext:value-type="float">
            <text:p>116.75637744298</text:p>
          </table:table-cell>
          <table:table-cell table:formula="of:=[.I35]*[.$B$2]" office:value-type="float" office:value="112.320870044965" calcext:value-type="float">
            <text:p>112.320870044965</text:p>
          </table:table-cell>
          <table:table-cell table:formula="of:=[.J35]*[.$B$2]" office:value-type="float" office:value="108.053865013233" calcext:value-type="float">
            <text:p>108.053865013233</text:p>
          </table:table-cell>
          <table:table-cell table:formula="of:=[.K35]*[.$B$2]" office:value-type="float" office:value="103.948961040134" calcext:value-type="float">
            <text:p>103.948961040134</text:p>
          </table:table-cell>
          <table:table-cell table:formula="of:=[.L35]*[.$B$2]" office:value-type="float" office:value="100" calcext:value-type="float">
            <text:p>100</text:p>
          </table:table-cell>
          <table:table-cell table:formula="of:=[.M35]*[.$B$2]" office:value-type="float" office:value="96.2010577108035" calcext:value-type="float">
            <text:p>96.2010577108035</text:p>
          </table:table-cell>
          <table:table-cell table:formula="of:=[.N35]*[.$B$2]" office:value-type="float" office:value="92.5464350467735" calcext:value-type="float">
            <text:p>92.5464350467735</text:p>
          </table:table-cell>
          <table:table-cell table:formula="of:=[.O35]*[.$B$2]" office:value-type="float" office:value="89.0306493886379" calcext:value-type="float">
            <text:p>89.0306493886379</text:p>
          </table:table-cell>
          <table:table-cell table:formula="of:=MAX([.P34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E36]*[.$B$2]" office:value-type="float" office:value="121.367041300075" calcext:value-type="float">
            <text:p>121.367041300075</text:p>
          </table:table-cell>
          <table:table-cell table:formula="of:=[.F36]*[.$B$2]" office:value-type="float" office:value="116.75637744298" calcext:value-type="float">
            <text:p>116.75637744298</text:p>
          </table:table-cell>
          <table:table-cell table:formula="of:=[.G36]*[.$B$2]" office:value-type="float" office:value="112.320870044965" calcext:value-type="float">
            <text:p>112.320870044965</text:p>
          </table:table-cell>
          <table:table-cell table:formula="of:=[.H36]*[.$B$2]" office:value-type="float" office:value="108.053865013233" calcext:value-type="float">
            <text:p>108.053865013233</text:p>
          </table:table-cell>
          <table:table-cell table:formula="of:=[.I36]*[.$B$2]" office:value-type="float" office:value="103.948961040134" calcext:value-type="float">
            <text:p>103.948961040134</text:p>
          </table:table-cell>
          <table:table-cell table:formula="of:=[.J36]*[.$B$2]" office:value-type="float" office:value="100" calcext:value-type="float">
            <text:p>100</text:p>
          </table:table-cell>
          <table:table-cell table:formula="of:=[.K36]*[.$B$2]" office:value-type="float" office:value="96.2010577108035" calcext:value-type="float">
            <text:p>96.2010577108035</text:p>
          </table:table-cell>
          <table:table-cell table:formula="of:=[.L36]*[.$B$2]" office:value-type="float" office:value="92.5464350467735" calcext:value-type="float">
            <text:p>92.5464350467735</text:p>
          </table:table-cell>
          <table:table-cell table:formula="of:=[.M36]*[.$B$2]" office:value-type="float" office:value="89.0306493886379" calcext:value-type="float">
            <text:p>89.0306493886379</text:p>
          </table:table-cell>
          <table:table-cell table:formula="of:=[.N36]*[.$B$2]" office:value-type="float" office:value="85.6484263986667" calcext:value-type="float">
            <text:p>85.6484263986667</text:p>
          </table:table-cell>
          <table:table-cell table:formula="of:=[.O36]*[.$B$2]" office:value-type="float" office:value="82.3946921081764" calcext:value-type="float">
            <text:p>82.3946921081764</text:p>
          </table:table-cell>
          <table:table-cell table:formula="of:=MAX([.P35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37]*[.$B$2]" office:value-type="float" office:value="116.75637744298" calcext:value-type="float">
            <text:p>116.75637744298</text:p>
          </table:table-cell>
          <table:table-cell table:formula="of:=[.E37]*[.$B$2]" office:value-type="float" office:value="112.320870044965" calcext:value-type="float">
            <text:p>112.320870044965</text:p>
          </table:table-cell>
          <table:table-cell table:formula="of:=[.F37]*[.$B$2]" office:value-type="float" office:value="108.053865013233" calcext:value-type="float">
            <text:p>108.053865013233</text:p>
          </table:table-cell>
          <table:table-cell table:formula="of:=[.G37]*[.$B$2]" office:value-type="float" office:value="103.948961040134" calcext:value-type="float">
            <text:p>103.948961040134</text:p>
          </table:table-cell>
          <table:table-cell table:formula="of:=[.H37]*[.$B$2]" office:value-type="float" office:value="100" calcext:value-type="float">
            <text:p>100</text:p>
          </table:table-cell>
          <table:table-cell table:formula="of:=[.I37]*[.$B$2]" office:value-type="float" office:value="96.2010577108035" calcext:value-type="float">
            <text:p>96.2010577108035</text:p>
          </table:table-cell>
          <table:table-cell table:formula="of:=[.J37]*[.$B$2]" office:value-type="float" office:value="92.5464350467735" calcext:value-type="float">
            <text:p>92.5464350467735</text:p>
          </table:table-cell>
          <table:table-cell table:formula="of:=[.K37]*[.$B$2]" office:value-type="float" office:value="89.0306493886379" calcext:value-type="float">
            <text:p>89.0306493886379</text:p>
          </table:table-cell>
          <table:table-cell table:formula="of:=[.L37]*[.$B$2]" office:value-type="float" office:value="85.6484263986667" calcext:value-type="float">
            <text:p>85.6484263986667</text:p>
          </table:table-cell>
          <table:table-cell table:formula="of:=[.M37]*[.$B$2]" office:value-type="float" office:value="82.3946921081764" calcext:value-type="float">
            <text:p>82.3946921081764</text:p>
          </table:table-cell>
          <table:table-cell table:formula="of:=[.N37]*[.$B$2]" office:value-type="float" office:value="79.2645653056257" calcext:value-type="float">
            <text:p>79.2645653056257</text:p>
          </table:table-cell>
          <table:table-cell table:formula="of:=[.O37]*[.$B$2]" office:value-type="float" office:value="76.2533502138826" calcext:value-type="float">
            <text:p>76.2533502138826</text:p>
          </table:table-cell>
          <table:table-cell table:formula="of:=MAX([.O36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38]*[.$B$2]" office:value-type="float" office:value="112.320870044965" calcext:value-type="float">
            <text:p>112.320870044965</text:p>
          </table:table-cell>
          <table:table-cell table:formula="of:=[.D38]*[.$B$2]" office:value-type="float" office:value="108.053865013233" calcext:value-type="float">
            <text:p>108.053865013233</text:p>
          </table:table-cell>
          <table:table-cell table:formula="of:=[.E38]*[.$B$2]" office:value-type="float" office:value="103.948961040134" calcext:value-type="float">
            <text:p>103.948961040134</text:p>
          </table:table-cell>
          <table:table-cell table:formula="of:=[.F38]*[.$B$2]" office:value-type="float" office:value="100" calcext:value-type="float">
            <text:p>100</text:p>
          </table:table-cell>
          <table:table-cell table:formula="of:=[.G38]*[.$B$2]" office:value-type="float" office:value="96.2010577108035" calcext:value-type="float">
            <text:p>96.2010577108035</text:p>
          </table:table-cell>
          <table:table-cell table:formula="of:=[.H38]*[.$B$2]" office:value-type="float" office:value="92.5464350467735" calcext:value-type="float">
            <text:p>92.5464350467735</text:p>
          </table:table-cell>
          <table:table-cell table:formula="of:=[.I38]*[.$B$2]" office:value-type="float" office:value="89.0306493886379" calcext:value-type="float">
            <text:p>89.0306493886379</text:p>
          </table:table-cell>
          <table:table-cell table:formula="of:=[.J38]*[.$B$2]" office:value-type="float" office:value="85.6484263986667" calcext:value-type="float">
            <text:p>85.6484263986667</text:p>
          </table:table-cell>
          <table:table-cell table:formula="of:=[.K38]*[.$B$2]" office:value-type="float" office:value="82.3946921081764" calcext:value-type="float">
            <text:p>82.3946921081764</text:p>
          </table:table-cell>
          <table:table-cell table:formula="of:=[.L38]*[.$B$2]" office:value-type="float" office:value="79.2645653056257" calcext:value-type="float">
            <text:p>79.2645653056257</text:p>
          </table:table-cell>
          <table:table-cell table:formula="of:=[.M38]*[.$B$2]" office:value-type="float" office:value="76.2533502138826" calcext:value-type="float">
            <text:p>76.2533502138826</text:p>
          </table:table-cell>
          <table:table-cell table:formula="of:=[.N38]*[.$B$2]" office:value-type="float" office:value="73.3565294456783" calcext:value-type="float">
            <text:p>73.3565294456783</text:p>
          </table:table-cell>
          <table:table-cell table:formula="of:=[.O38]*[.$B$2]" office:value-type="float" office:value="70.5697572266796" calcext:value-type="float">
            <text:p>70.5697572266796</text:p>
          </table:table-cell>
          <table:table-cell table:formula="of:=MAX([.O37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39]*[.$B$2]" office:value-type="float" office:value="108.053865013233" calcext:value-type="float">
            <text:p>108.053865013233</text:p>
          </table:table-cell>
          <table:table-cell table:formula="of:=[.C39]*[.$B$2]" office:value-type="float" office:value="103.948961040134" calcext:value-type="float">
            <text:p>103.948961040134</text:p>
          </table:table-cell>
          <table:table-cell table:formula="of:=[.D39]*[.$B$2]" office:value-type="float" office:value="100" calcext:value-type="float">
            <text:p>100</text:p>
          </table:table-cell>
          <table:table-cell table:formula="of:=[.E39]*[.$B$2]" office:value-type="float" office:value="96.2010577108035" calcext:value-type="float">
            <text:p>96.2010577108035</text:p>
          </table:table-cell>
          <table:table-cell table:formula="of:=[.F39]*[.$B$2]" office:value-type="float" office:value="92.5464350467735" calcext:value-type="float">
            <text:p>92.5464350467735</text:p>
          </table:table-cell>
          <table:table-cell table:formula="of:=[.G39]*[.$B$2]" office:value-type="float" office:value="89.0306493886379" calcext:value-type="float">
            <text:p>89.0306493886379</text:p>
          </table:table-cell>
          <table:table-cell table:formula="of:=[.H39]*[.$B$2]" office:value-type="float" office:value="85.6484263986667" calcext:value-type="float">
            <text:p>85.6484263986667</text:p>
          </table:table-cell>
          <table:table-cell table:formula="of:=[.I39]*[.$B$2]" office:value-type="float" office:value="82.3946921081764" calcext:value-type="float">
            <text:p>82.3946921081764</text:p>
          </table:table-cell>
          <table:table-cell table:formula="of:=[.J39]*[.$B$2]" office:value-type="float" office:value="79.2645653056257" calcext:value-type="float">
            <text:p>79.2645653056257</text:p>
          </table:table-cell>
          <table:table-cell table:formula="of:=[.K39]*[.$B$2]" office:value-type="float" office:value="76.2533502138826" calcext:value-type="float">
            <text:p>76.2533502138826</text:p>
          </table:table-cell>
          <table:table-cell table:formula="of:=[.L39]*[.$B$2]" office:value-type="float" office:value="73.3565294456783" calcext:value-type="float">
            <text:p>73.3565294456783</text:p>
          </table:table-cell>
          <table:table-cell table:formula="of:=[.M39]*[.$B$2]" office:value-type="float" office:value="70.5697572266796" calcext:value-type="float">
            <text:p>70.5697572266796</text:p>
          </table:table-cell>
          <table:table-cell table:formula="of:=[.N39]*[.$B$2]" office:value-type="float" office:value="67.888852876012" calcext:value-type="float">
            <text:p>67.888852876012</text:p>
          </table:table-cell>
          <table:table-cell table:formula="of:=[.O39]*[.$B$2]" office:value-type="float" office:value="65.3097945344548" calcext:value-type="float">
            <text:p>65.3097945344548</text:p>
          </table:table-cell>
          <table:table-cell table:formula="of:=MAX([.O38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A40]*[.$B$2]" office:value-type="float" office:value="103.948961040134" calcext:value-type="float">
            <text:p>103.948961040134</text:p>
          </table:table-cell>
          <table:table-cell table:formula="of:=[.B40]*[.$B$2]" office:value-type="float" office:value="100" calcext:value-type="float">
            <text:p>100</text:p>
          </table:table-cell>
          <table:table-cell table:formula="of:=[.C40]*[.$B$2]" office:value-type="float" office:value="96.2010577108035" calcext:value-type="float">
            <text:p>96.2010577108035</text:p>
          </table:table-cell>
          <table:table-cell table:formula="of:=[.D40]*[.$B$2]" office:value-type="float" office:value="92.5464350467735" calcext:value-type="float">
            <text:p>92.5464350467735</text:p>
          </table:table-cell>
          <table:table-cell table:formula="of:=[.E40]*[.$B$2]" office:value-type="float" office:value="89.0306493886379" calcext:value-type="float">
            <text:p>89.0306493886379</text:p>
          </table:table-cell>
          <table:table-cell table:formula="of:=[.F40]*[.$B$2]" office:value-type="float" office:value="85.6484263986667" calcext:value-type="float">
            <text:p>85.6484263986667</text:p>
          </table:table-cell>
          <table:table-cell table:formula="of:=[.G40]*[.$B$2]" office:value-type="float" office:value="82.3946921081765" calcext:value-type="float">
            <text:p>82.3946921081765</text:p>
          </table:table-cell>
          <table:table-cell table:formula="of:=[.H40]*[.$B$2]" office:value-type="float" office:value="79.2645653056257" calcext:value-type="float">
            <text:p>79.2645653056257</text:p>
          </table:table-cell>
          <table:table-cell table:formula="of:=[.I40]*[.$B$2]" office:value-type="float" office:value="76.2533502138826" calcext:value-type="float">
            <text:p>76.2533502138826</text:p>
          </table:table-cell>
          <table:table-cell table:formula="of:=[.J40]*[.$B$2]" office:value-type="float" office:value="73.3565294456783" calcext:value-type="float">
            <text:p>73.3565294456783</text:p>
          </table:table-cell>
          <table:table-cell table:formula="of:=[.K40]*[.$B$2]" office:value-type="float" office:value="70.5697572266796" calcext:value-type="float">
            <text:p>70.5697572266796</text:p>
          </table:table-cell>
          <table:table-cell table:formula="of:=[.L40]*[.$B$2]" office:value-type="float" office:value="67.888852876012" calcext:value-type="float">
            <text:p>67.888852876012</text:p>
          </table:table-cell>
          <table:table-cell table:formula="of:=[.M40]*[.$B$2]" office:value-type="float" office:value="65.3097945344548" calcext:value-type="float">
            <text:p>65.3097945344548</text:p>
          </table:table-cell>
          <table:table-cell table:formula="of:=[.N40]*[.$B$2]" office:value-type="float" office:value="62.8287131308981" calcext:value-type="float">
            <text:p>62.8287131308981</text:p>
          </table:table-cell>
          <table:table-cell table:formula="of:=[.O40]*[.$B$2]" office:value-type="float" office:value="60.4418865780104" calcext:value-type="float">
            <text:p>60.4418865780104</text:p>
          </table:table-cell>
          <table:table-cell table:formula="of:=MAX([.O39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E6]" office:value-type="float" office:value="100" calcext:value-type="float">
            <text:p>100</text:p>
          </table:table-cell>
          <table:table-cell table:formula="of:= [.A40]*[.$B$3]" office:value-type="float" office:value="96.2010577108035" calcext:value-type="float">
            <text:p>96.2010577108035</text:p>
          </table:table-cell>
          <table:table-cell table:formula="of:= [.B40]*[.$B$3]" office:value-type="float" office:value="92.5464350467735" calcext:value-type="float">
            <text:p>92.5464350467735</text:p>
          </table:table-cell>
          <table:table-cell table:formula="of:= [.C40]*[.$B$3]" office:value-type="float" office:value="89.0306493886379" calcext:value-type="float">
            <text:p>89.0306493886379</text:p>
          </table:table-cell>
          <table:table-cell table:formula="of:= [.D40]*[.$B$3]" office:value-type="float" office:value="85.6484263986667" calcext:value-type="float">
            <text:p>85.6484263986667</text:p>
          </table:table-cell>
          <table:table-cell table:formula="of:= [.E40]*[.$B$3]" office:value-type="float" office:value="82.3946921081765" calcext:value-type="float">
            <text:p>82.3946921081765</text:p>
          </table:table-cell>
          <table:table-cell table:formula="of:= [.F40]*[.$B$3]" office:value-type="float" office:value="79.2645653056257" calcext:value-type="float">
            <text:p>79.2645653056257</text:p>
          </table:table-cell>
          <table:table-cell table:formula="of:= [.G40]*[.$B$3]" office:value-type="float" office:value="76.2533502138826" calcext:value-type="float">
            <text:p>76.2533502138826</text:p>
          </table:table-cell>
          <table:table-cell table:formula="of:= [.H40]*[.$B$3]" office:value-type="float" office:value="73.3565294456783" calcext:value-type="float">
            <text:p>73.3565294456783</text:p>
          </table:table-cell>
          <table:table-cell table:formula="of:= [.I40]*[.$B$3]" office:value-type="float" office:value="70.5697572266796" calcext:value-type="float">
            <text:p>70.5697572266796</text:p>
          </table:table-cell>
          <table:table-cell table:formula="of:= [.J40]*[.$B$3]" office:value-type="float" office:value="67.888852876012" calcext:value-type="float">
            <text:p>67.888852876012</text:p>
          </table:table-cell>
          <table:table-cell table:formula="of:= [.K40]*[.$B$3]" office:value-type="float" office:value="65.3097945344548" calcext:value-type="float">
            <text:p>65.3097945344548</text:p>
          </table:table-cell>
          <table:table-cell table:formula="of:= [.L40]*[.$B$3]" office:value-type="float" office:value="62.8287131308981" calcext:value-type="float">
            <text:p>62.8287131308981</text:p>
          </table:table-cell>
          <table:table-cell table:formula="of:= [.M40]*[.$B$3]" office:value-type="float" office:value="60.4418865780104" calcext:value-type="float">
            <text:p>60.4418865780104</text:p>
          </table:table-cell>
          <table:table-cell table:formula="of:= [.N40]*[.$B$3]" office:value-type="float" office:value="58.1457341884102" calcext:value-type="float">
            <text:p>58.1457341884102</text:p>
          </table:table-cell>
          <table:table-cell table:formula="of:= [.O40]*[.$B$3]" office:value-type="float" office:value="55.936811302963" calcext:value-type="float">
            <text:p>55.936811302963</text:p>
          </table:table-cell>
          <table:table-cell table:formula="of:=MAX([.O40] - [.$H$1];0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21"/>
        </table:table-row>
        <table:table-row table:style-name="ro4">
          <table:table-cell table:style-name="ce3" office:value-type="string" calcext:value-type="string">
            <text:p>intrinsic values-call</text:p>
          </table:table-cell>
          <table:table-cell table:number-columns-repeated="14"/>
          <table:table-cell table:formula="of:= [.P25] -[.$H$1]" office:value-type="float" office:value="68.7731507582431" calcext:value-type="float">
            <text:p>68.773150758243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 [.O26] -[.$H$1]" office:value-type="float" office:value="61.9816619323593" calcext:value-type="float">
            <text:p>61.9816619323593</text:p>
          </table:table-cell>
          <table:table-cell table:formula="of:= [.P26] -[.$H$1]" office:value-type="float" office:value="55.448177847548" calcext:value-type="float">
            <text:p>55.44817784754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 [.N27] -[.$H$1]" office:value-type="float" office:value="55.448177847548" calcext:value-type="float">
            <text:p>55.448177847548</text:p>
          </table:table-cell>
          <table:table-cell table:formula="of:= [.O27] -[.$H$1]" office:value-type="float" office:value="49.1628970525925" calcext:value-type="float">
            <text:p>49.1628970525925</text:p>
          </table:table-cell>
          <table:table-cell table:formula="of:= [.P27] -[.$H$1]" office:value-type="float" office:value="43.1163904477513" calcext:value-type="float">
            <text:p>43.1163904477513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 [.M28] - [.$H$1]" office:value-type="float" office:value="49.1628970525925" calcext:value-type="float">
            <text:p>49.1628970525925</text:p>
          </table:table-cell>
          <table:table-cell table:formula="of:= [.N28] -[.$H$1]" office:value-type="float" office:value="43.1163904477514" calcext:value-type="float">
            <text:p>43.1163904477514</text:p>
          </table:table-cell>
          <table:table-cell table:formula="of:= [.O28] -[.$H$1]" office:value-type="float" office:value="37.2995871393406" calcext:value-type="float">
            <text:p>37.2995871393406</text:p>
          </table:table-cell>
          <table:table-cell table:formula="of:= [.P28] -[.$H$1]" office:value-type="float" office:value="31.7037608316924" calcext:value-type="float">
            <text:p>31.703760831692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 [.L29] - [.$H$1]" office:value-type="float" office:value="43.1163904477514" calcext:value-type="float">
            <text:p>43.1163904477514</text:p>
          </table:table-cell>
          <table:table-cell table:formula="of:= [.M29] - [.$H$1]" office:value-type="float" office:value="37.2995871393406" calcext:value-type="float">
            <text:p>37.2995871393406</text:p>
          </table:table-cell>
          <table:table-cell table:formula="of:= [.N29] -[.$H$1]" office:value-type="float" office:value="31.7037608316924" calcext:value-type="float">
            <text:p>31.7037608316924</text:p>
          </table:table-cell>
          <table:table-cell table:formula="of:= [.O29] -[.$H$1]" office:value-type="float" office:value="26.3205167360754" calcext:value-type="float">
            <text:p>26.3205167360754</text:p>
          </table:table-cell>
          <table:table-cell table:formula="of:= [.P29] -[.$H$1]" office:value-type="float" office:value="21.1417789769375" calcext:value-type="float">
            <text:p>21.141778976937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K30] - [.$H$1]" office:value-type="float" office:value="37.2995871393406" calcext:value-type="float">
            <text:p>37.2995871393406</text:p>
          </table:table-cell>
          <table:table-cell table:formula="of:= [.L30] - [.$H$1]" office:value-type="float" office:value="31.7037608316924" calcext:value-type="float">
            <text:p>31.7037608316924</text:p>
          </table:table-cell>
          <table:table-cell table:formula="of:= [.M30] - [.$H$1]" office:value-type="float" office:value="26.3205167360754" calcext:value-type="float">
            <text:p>26.3205167360754</text:p>
          </table:table-cell>
          <table:table-cell table:formula="of:= [.N30] -[.$H$1]" office:value-type="float" office:value="21.1417789769375" calcext:value-type="float">
            <text:p>21.1417789769375</text:p>
          </table:table-cell>
          <table:table-cell table:formula="of:= [.O30] -[.$H$1]" office:value-type="float" office:value="16.1597784765781" calcext:value-type="float">
            <text:p>16.1597784765781</text:p>
          </table:table-cell>
          <table:table-cell table:formula="of:= [.P30] -[.$H$1]" office:value-type="float" office:value="11.3670413000748" calcext:value-type="float">
            <text:p>11.3670413000748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 [.J31] - [.$H$1]" office:value-type="float" office:value="31.7037608316924" calcext:value-type="float">
            <text:p>31.7037608316924</text:p>
          </table:table-cell>
          <table:table-cell table:formula="of:=[.K31] - [.$H$1]" office:value-type="float" office:value="26.3205167360754" calcext:value-type="float">
            <text:p>26.3205167360754</text:p>
          </table:table-cell>
          <table:table-cell table:formula="of:= [.L31] - [.$H$1]" office:value-type="float" office:value="21.1417789769375" calcext:value-type="float">
            <text:p>21.1417789769375</text:p>
          </table:table-cell>
          <table:table-cell table:formula="of:= [.M31] - [.$H$1]" office:value-type="float" office:value="16.1597784765781" calcext:value-type="float">
            <text:p>16.1597784765781</text:p>
          </table:table-cell>
          <table:table-cell table:formula="of:= [.N31] -[.$H$1]" office:value-type="float" office:value="11.3670413000748" calcext:value-type="float">
            <text:p>11.3670413000748</text:p>
          </table:table-cell>
          <table:table-cell table:formula="of:= [.O31] -[.$H$1]" office:value-type="float" office:value="6.75637744297971" calcext:value-type="float">
            <text:p>6.75637744297971</text:p>
          </table:table-cell>
          <table:table-cell table:formula="of:= [.P31] -[.$H$1]" office:value-type="float" office:value="2.32087004496452" calcext:value-type="float">
            <text:p>2.3208700449645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I32]- [.$H$1]" office:value-type="float" office:value="26.3205167360754" calcext:value-type="float">
            <text:p>26.3205167360754</text:p>
          </table:table-cell>
          <table:table-cell table:formula="of:= [.J32] - [.$H$1]" office:value-type="float" office:value="21.1417789769375" calcext:value-type="float">
            <text:p>21.1417789769375</text:p>
          </table:table-cell>
          <table:table-cell table:formula="of:=[.K32] - [.$H$1]" office:value-type="float" office:value="16.1597784765781" calcext:value-type="float">
            <text:p>16.1597784765781</text:p>
          </table:table-cell>
          <table:table-cell table:formula="of:= [.L32] - [.$H$1]" office:value-type="float" office:value="11.3670413000748" calcext:value-type="float">
            <text:p>11.3670413000748</text:p>
          </table:table-cell>
          <table:table-cell table:formula="of:= [.M32] - [.$H$1]" office:value-type="float" office:value="6.75637744297971" calcext:value-type="float">
            <text:p>6.75637744297971</text:p>
          </table:table-cell>
          <table:table-cell table:formula="of:= [.N32] -[.$H$1]" office:value-type="float" office:value="2.32087004496452" calcext:value-type="float">
            <text:p>2.32087004496452</text:p>
          </table:table-cell>
          <table:table-cell table:formula="of:= [.O32] -[.$H$1]" office:value-type="float" office:value="-1.94613498676704" calcext:value-type="float">
            <text:p>-1.94613498676704</text:p>
          </table:table-cell>
          <table:table-cell table:formula="of:= [.P32] -[.$H$1]" office:value-type="float" office:value="-6.05103895986603" calcext:value-type="float">
            <text:p>-6.0510389598660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 [.H33]- [.$H$1]" office:value-type="float" office:value="21.1417789769375" calcext:value-type="float">
            <text:p>21.1417789769375</text:p>
          </table:table-cell>
          <table:table-cell table:formula="of:=[.I33]- [.$H$1]" office:value-type="float" office:value="16.1597784765781" calcext:value-type="float">
            <text:p>16.1597784765781</text:p>
          </table:table-cell>
          <table:table-cell table:formula="of:= [.J33] - [.$H$1]" office:value-type="float" office:value="11.3670413000748" calcext:value-type="float">
            <text:p>11.3670413000748</text:p>
          </table:table-cell>
          <table:table-cell table:formula="of:=[.K33] - [.$H$1]" office:value-type="float" office:value="6.75637744297971" calcext:value-type="float">
            <text:p>6.75637744297971</text:p>
          </table:table-cell>
          <table:table-cell table:formula="of:= [.L33] - [.$H$1]" office:value-type="float" office:value="2.32087004496452" calcext:value-type="float">
            <text:p>2.32087004496452</text:p>
          </table:table-cell>
          <table:table-cell table:formula="of:= [.M33] - [.$H$1]" office:value-type="float" office:value="-1.94613498676704" calcext:value-type="float">
            <text:p>-1.94613498676704</text:p>
          </table:table-cell>
          <table:table-cell table:formula="of:= [.N33] -[.$H$1]" office:value-type="float" office:value="-6.05103895986601" calcext:value-type="float">
            <text:p>-6.05103895986601</text:p>
          </table:table-cell>
          <table:table-cell table:formula="of:= [.O33] -[.$H$1]" office:value-type="float" office:value="-10" calcext:value-type="float">
            <text:p>-10</text:p>
          </table:table-cell>
          <table:table-cell table:formula="of:= [.P33] -[.$H$1]" office:value-type="float" office:value="-13.7989422891965" calcext:value-type="float">
            <text:p>-13.798942289196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 [.G34]- [.$H$1]" office:value-type="float" office:value="16.1597784765781" calcext:value-type="float">
            <text:p>16.1597784765781</text:p>
          </table:table-cell>
          <table:table-cell table:formula="of:= [.H34]- [.$H$1]" office:value-type="float" office:value="11.3670413000748" calcext:value-type="float">
            <text:p>11.3670413000748</text:p>
          </table:table-cell>
          <table:table-cell table:formula="of:=[.I34]- [.$H$1]" office:value-type="float" office:value="6.75637744297971" calcext:value-type="float">
            <text:p>6.75637744297971</text:p>
          </table:table-cell>
          <table:table-cell table:formula="of:= [.J34] - [.$H$1]" office:value-type="float" office:value="2.32087004496452" calcext:value-type="float">
            <text:p>2.32087004496452</text:p>
          </table:table-cell>
          <table:table-cell table:formula="of:=[.K34] - [.$H$1]" office:value-type="float" office:value="-1.94613498676704" calcext:value-type="float">
            <text:p>-1.94613498676704</text:p>
          </table:table-cell>
          <table:table-cell table:formula="of:= [.L34] - [.$H$1]" office:value-type="float" office:value="-6.05103895986601" calcext:value-type="float">
            <text:p>-6.05103895986601</text:p>
          </table:table-cell>
          <table:table-cell table:formula="of:= [.M34] - [.$H$1]" office:value-type="float" office:value="-10" calcext:value-type="float">
            <text:p>-10</text:p>
          </table:table-cell>
          <table:table-cell table:formula="of:= [.N34] -[.$H$1]" office:value-type="float" office:value="-13.7989422891965" calcext:value-type="float">
            <text:p>-13.7989422891965</text:p>
          </table:table-cell>
          <table:table-cell table:formula="of:= [.O34] -[.$H$1]" office:value-type="float" office:value="-17.4535649532265" calcext:value-type="float">
            <text:p>-17.4535649532265</text:p>
          </table:table-cell>
          <table:table-cell table:formula="of:= [.P34] -[.$H$1]" office:value-type="float" office:value="-20.9693506113621" calcext:value-type="float">
            <text:p>-20.9693506113621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 [.F35]- [.$H$1]" office:value-type="float" office:value="11.3670413000748" calcext:value-type="float">
            <text:p>11.3670413000748</text:p>
          </table:table-cell>
          <table:table-cell table:formula="of:= [.G35]- [.$H$1]" office:value-type="float" office:value="6.75637744297973" calcext:value-type="float">
            <text:p>6.75637744297973</text:p>
          </table:table-cell>
          <table:table-cell table:formula="of:= [.H35]- [.$H$1]" office:value-type="float" office:value="2.32087004496452" calcext:value-type="float">
            <text:p>2.32087004496452</text:p>
          </table:table-cell>
          <table:table-cell table:formula="of:=[.I35]- [.$H$1]" office:value-type="float" office:value="-1.94613498676704" calcext:value-type="float">
            <text:p>-1.94613498676704</text:p>
          </table:table-cell>
          <table:table-cell table:formula="of:= [.J35] - [.$H$1]" office:value-type="float" office:value="-6.05103895986601" calcext:value-type="float">
            <text:p>-6.05103895986601</text:p>
          </table:table-cell>
          <table:table-cell table:formula="of:=[.K35] - [.$H$1]" office:value-type="float" office:value="-10" calcext:value-type="float">
            <text:p>-10</text:p>
          </table:table-cell>
          <table:table-cell table:formula="of:= [.L35] - [.$H$1]" office:value-type="float" office:value="-13.7989422891965" calcext:value-type="float">
            <text:p>-13.7989422891965</text:p>
          </table:table-cell>
          <table:table-cell table:formula="of:= [.M35] - [.$H$1]" office:value-type="float" office:value="-17.4535649532265" calcext:value-type="float">
            <text:p>-17.4535649532265</text:p>
          </table:table-cell>
          <table:table-cell table:formula="of:= [.N35] -[.$H$1]" office:value-type="float" office:value="-20.9693506113621" calcext:value-type="float">
            <text:p>-20.9693506113621</text:p>
          </table:table-cell>
          <table:table-cell table:formula="of:= [.O35] -[.$H$1]" office:value-type="float" office:value="-24.3515736013333" calcext:value-type="float">
            <text:p>-24.3515736013333</text:p>
          </table:table-cell>
          <table:table-cell table:formula="of:= [.P35] -[.$H$1]" office:value-type="float" office:value="-27.6053078918236" calcext:value-type="float">
            <text:p>-27.605307891823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 [.E36] - [.$H$1]" office:value-type="float" office:value="6.75637744297973" calcext:value-type="float">
            <text:p>6.75637744297973</text:p>
          </table:table-cell>
          <table:table-cell table:formula="of:= [.F36]- [.$H$1]" office:value-type="float" office:value="2.32087004496454" calcext:value-type="float">
            <text:p>2.32087004496454</text:p>
          </table:table-cell>
          <table:table-cell table:formula="of:= [.G36]- [.$H$1]" office:value-type="float" office:value="-1.94613498676704" calcext:value-type="float">
            <text:p>-1.94613498676704</text:p>
          </table:table-cell>
          <table:table-cell table:formula="of:= [.H36]- [.$H$1]" office:value-type="float" office:value="-6.05103895986601" calcext:value-type="float">
            <text:p>-6.05103895986601</text:p>
          </table:table-cell>
          <table:table-cell table:formula="of:=[.I36]- [.$H$1]" office:value-type="float" office:value="-10" calcext:value-type="float">
            <text:p>-10</text:p>
          </table:table-cell>
          <table:table-cell table:formula="of:= [.J36] - [.$H$1]" office:value-type="float" office:value="-13.7989422891965" calcext:value-type="float">
            <text:p>-13.7989422891965</text:p>
          </table:table-cell>
          <table:table-cell table:formula="of:=[.K36] - [.$H$1]" office:value-type="float" office:value="-17.4535649532265" calcext:value-type="float">
            <text:p>-17.4535649532265</text:p>
          </table:table-cell>
          <table:table-cell table:formula="of:= [.L36] - [.$H$1]" office:value-type="float" office:value="-20.9693506113621" calcext:value-type="float">
            <text:p>-20.9693506113621</text:p>
          </table:table-cell>
          <table:table-cell table:formula="of:= [.M36] - [.$H$1]" office:value-type="float" office:value="-24.3515736013333" calcext:value-type="float">
            <text:p>-24.3515736013333</text:p>
          </table:table-cell>
          <table:table-cell table:formula="of:= [.N36] -[.$H$1]" office:value-type="float" office:value="-27.6053078918236" calcext:value-type="float">
            <text:p>-27.6053078918236</text:p>
          </table:table-cell>
          <table:table-cell table:formula="of:= [.O36] -[.$H$1]" office:value-type="float" office:value="-30.7354346943743" calcext:value-type="float">
            <text:p>-30.7354346943743</text:p>
          </table:table-cell>
          <table:table-cell table:formula="of:= [.P36] -[.$H$1]" office:value-type="float" office:value="-33.7466497861174" calcext:value-type="float">
            <text:p>-33.74664978611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 [.D37] - [.$H$1]" office:value-type="float" office:value="2.32087004496454" calcext:value-type="float">
            <text:p>2.32087004496454</text:p>
          </table:table-cell>
          <table:table-cell table:formula="of:= [.E37] - [.$H$1]" office:value-type="float" office:value="-1.94613498676702" calcext:value-type="float">
            <text:p>-1.94613498676702</text:p>
          </table:table-cell>
          <table:table-cell table:formula="of:= [.F37]- [.$H$1]" office:value-type="float" office:value="-6.05103895986601" calcext:value-type="float">
            <text:p>-6.05103895986601</text:p>
          </table:table-cell>
          <table:table-cell table:formula="of:= [.G37]- [.$H$1]" office:value-type="float" office:value="-10" calcext:value-type="float">
            <text:p>-10</text:p>
          </table:table-cell>
          <table:table-cell table:formula="of:= [.H37]- [.$H$1]" office:value-type="float" office:value="-13.7989422891965" calcext:value-type="float">
            <text:p>-13.7989422891965</text:p>
          </table:table-cell>
          <table:table-cell table:formula="of:=[.I37]- [.$H$1]" office:value-type="float" office:value="-17.4535649532265" calcext:value-type="float">
            <text:p>-17.4535649532265</text:p>
          </table:table-cell>
          <table:table-cell table:formula="of:= [.J37] - [.$H$1]" office:value-type="float" office:value="-20.9693506113621" calcext:value-type="float">
            <text:p>-20.9693506113621</text:p>
          </table:table-cell>
          <table:table-cell table:formula="of:=[.K37] - [.$H$1]" office:value-type="float" office:value="-24.3515736013333" calcext:value-type="float">
            <text:p>-24.3515736013333</text:p>
          </table:table-cell>
          <table:table-cell table:formula="of:= [.L37] - [.$H$1]" office:value-type="float" office:value="-27.6053078918236" calcext:value-type="float">
            <text:p>-27.6053078918236</text:p>
          </table:table-cell>
          <table:table-cell table:formula="of:= [.M37] - [.$H$1]" office:value-type="float" office:value="-30.7354346943743" calcext:value-type="float">
            <text:p>-30.7354346943743</text:p>
          </table:table-cell>
          <table:table-cell table:formula="of:= [.N37] -[.$H$1]" office:value-type="float" office:value="-33.7466497861174" calcext:value-type="float">
            <text:p>-33.7466497861174</text:p>
          </table:table-cell>
          <table:table-cell table:formula="of:= [.O37] -[.$H$1]" office:value-type="float" office:value="-36.6434705543217" calcext:value-type="float">
            <text:p>-36.6434705543217</text:p>
          </table:table-cell>
          <table:table-cell table:formula="of:= [.P37] -[.$H$1]" office:value-type="float" office:value="-39.4302427733204" calcext:value-type="float">
            <text:p>-39.43024277332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 [.C38] - [.$H$1]" office:value-type="float" office:value="-1.94613498676702" calcext:value-type="float">
            <text:p>-1.94613498676702</text:p>
          </table:table-cell>
          <table:table-cell table:formula="of:= [.D38] - [.$H$1]" office:value-type="float" office:value="-6.05103895986599" calcext:value-type="float">
            <text:p>-6.05103895986599</text:p>
          </table:table-cell>
          <table:table-cell table:formula="of:= [.E38] - [.$H$1]" office:value-type="float" office:value="-10" calcext:value-type="float">
            <text:p>-10</text:p>
          </table:table-cell>
          <table:table-cell table:formula="of:= [.F38]- [.$H$1]" office:value-type="float" office:value="-13.7989422891965" calcext:value-type="float">
            <text:p>-13.7989422891965</text:p>
          </table:table-cell>
          <table:table-cell table:formula="of:= [.G38]- [.$H$1]" office:value-type="float" office:value="-17.4535649532265" calcext:value-type="float">
            <text:p>-17.4535649532265</text:p>
          </table:table-cell>
          <table:table-cell table:formula="of:= [.H38]- [.$H$1]" office:value-type="float" office:value="-20.9693506113621" calcext:value-type="float">
            <text:p>-20.9693506113621</text:p>
          </table:table-cell>
          <table:table-cell table:formula="of:=[.I38]- [.$H$1]" office:value-type="float" office:value="-24.3515736013333" calcext:value-type="float">
            <text:p>-24.3515736013333</text:p>
          </table:table-cell>
          <table:table-cell table:formula="of:= [.J38] - [.$H$1]" office:value-type="float" office:value="-27.6053078918236" calcext:value-type="float">
            <text:p>-27.6053078918236</text:p>
          </table:table-cell>
          <table:table-cell table:formula="of:=[.K38] - [.$H$1]" office:value-type="float" office:value="-30.7354346943743" calcext:value-type="float">
            <text:p>-30.7354346943743</text:p>
          </table:table-cell>
          <table:table-cell table:formula="of:= [.L38] - [.$H$1]" office:value-type="float" office:value="-33.7466497861174" calcext:value-type="float">
            <text:p>-33.7466497861174</text:p>
          </table:table-cell>
          <table:table-cell table:formula="of:= [.M38] - [.$H$1]" office:value-type="float" office:value="-36.6434705543217" calcext:value-type="float">
            <text:p>-36.6434705543217</text:p>
          </table:table-cell>
          <table:table-cell table:formula="of:= [.N38] -[.$H$1]" office:value-type="float" office:value="-39.4302427733204" calcext:value-type="float">
            <text:p>-39.4302427733204</text:p>
          </table:table-cell>
          <table:table-cell table:formula="of:= [.O38] -[.$H$1]" office:value-type="float" office:value="-42.111147123988" calcext:value-type="float">
            <text:p>-42.111147123988</text:p>
          </table:table-cell>
          <table:table-cell table:formula="of:= [.P38] -[.$H$1]" office:value-type="float" office:value="-44.6902054655452" calcext:value-type="float">
            <text:p>-44.6902054655452</text:p>
          </table:table-cell>
          <table:table-cell table:number-columns-repeated="5"/>
        </table:table-row>
        <table:table-row table:style-name="ro1">
          <table:table-cell/>
          <table:table-cell table:formula="of:= [.B39] - [.$H$1]" office:value-type="float" office:value="-6.05103895986599" calcext:value-type="float">
            <text:p>-6.05103895986599</text:p>
          </table:table-cell>
          <table:table-cell table:formula="of:= [.C39] - [.$H$1]" office:value-type="float" office:value="-10" calcext:value-type="float">
            <text:p>-10</text:p>
          </table:table-cell>
          <table:table-cell table:formula="of:= [.D39] - [.$H$1]" office:value-type="float" office:value="-13.7989422891965" calcext:value-type="float">
            <text:p>-13.7989422891965</text:p>
          </table:table-cell>
          <table:table-cell table:formula="of:= [.E39] - [.$H$1]" office:value-type="float" office:value="-17.4535649532265" calcext:value-type="float">
            <text:p>-17.4535649532265</text:p>
          </table:table-cell>
          <table:table-cell table:formula="of:= [.F39]- [.$H$1]" office:value-type="float" office:value="-20.9693506113621" calcext:value-type="float">
            <text:p>-20.9693506113621</text:p>
          </table:table-cell>
          <table:table-cell table:formula="of:= [.G39]- [.$H$1]" office:value-type="float" office:value="-24.3515736013333" calcext:value-type="float">
            <text:p>-24.3515736013333</text:p>
          </table:table-cell>
          <table:table-cell table:formula="of:= [.H39]- [.$H$1]" office:value-type="float" office:value="-27.6053078918235" calcext:value-type="float">
            <text:p>-27.6053078918235</text:p>
          </table:table-cell>
          <table:table-cell table:formula="of:=[.I39]- [.$H$1]" office:value-type="float" office:value="-30.7354346943743" calcext:value-type="float">
            <text:p>-30.7354346943743</text:p>
          </table:table-cell>
          <table:table-cell table:formula="of:= [.J39] - [.$H$1]" office:value-type="float" office:value="-33.7466497861174" calcext:value-type="float">
            <text:p>-33.7466497861174</text:p>
          </table:table-cell>
          <table:table-cell table:formula="of:=[.K39] - [.$H$1]" office:value-type="float" office:value="-36.6434705543217" calcext:value-type="float">
            <text:p>-36.6434705543217</text:p>
          </table:table-cell>
          <table:table-cell table:formula="of:= [.L39] - [.$H$1]" office:value-type="float" office:value="-39.4302427733204" calcext:value-type="float">
            <text:p>-39.4302427733204</text:p>
          </table:table-cell>
          <table:table-cell table:formula="of:= [.M39] - [.$H$1]" office:value-type="float" office:value="-42.111147123988" calcext:value-type="float">
            <text:p>-42.111147123988</text:p>
          </table:table-cell>
          <table:table-cell table:formula="of:= [.N39] -[.$H$1]" office:value-type="float" office:value="-44.6902054655452" calcext:value-type="float">
            <text:p>-44.6902054655452</text:p>
          </table:table-cell>
          <table:table-cell table:formula="of:= [.O39] -[.$H$1]" office:value-type="float" office:value="-47.171286869102" calcext:value-type="float">
            <text:p>-47.171286869102</text:p>
          </table:table-cell>
          <table:table-cell table:formula="of:= [.P39] -[.$H$1]" office:value-type="float" office:value="-49.5581134219896" calcext:value-type="float">
            <text:p>-49.5581134219896</text:p>
          </table:table-cell>
          <table:table-cell table:number-columns-repeated="5"/>
        </table:table-row>
        <table:table-row table:style-name="ro1">
          <table:table-cell table:formula="of:= [.A40] - [.$H$1]" office:value-type="float" office:value="-10" calcext:value-type="float">
            <text:p>-10</text:p>
          </table:table-cell>
          <table:table-cell table:formula="of:= [.B40] - [.$H$1]" office:value-type="float" office:value="-13.7989422891965" calcext:value-type="float">
            <text:p>-13.7989422891965</text:p>
          </table:table-cell>
          <table:table-cell table:formula="of:= [.C40] - [.$H$1]" office:value-type="float" office:value="-17.4535649532265" calcext:value-type="float">
            <text:p>-17.4535649532265</text:p>
          </table:table-cell>
          <table:table-cell table:formula="of:= [.D40] - [.$H$1]" office:value-type="float" office:value="-20.9693506113621" calcext:value-type="float">
            <text:p>-20.9693506113621</text:p>
          </table:table-cell>
          <table:table-cell table:formula="of:= [.E40] - [.$H$1]" office:value-type="float" office:value="-24.3515736013333" calcext:value-type="float">
            <text:p>-24.3515736013333</text:p>
          </table:table-cell>
          <table:table-cell table:formula="of:= [.F40]- [.$H$1]" office:value-type="float" office:value="-27.6053078918235" calcext:value-type="float">
            <text:p>-27.6053078918235</text:p>
          </table:table-cell>
          <table:table-cell table:formula="of:= [.G40]- [.$H$1]" office:value-type="float" office:value="-30.7354346943743" calcext:value-type="float">
            <text:p>-30.7354346943743</text:p>
          </table:table-cell>
          <table:table-cell table:formula="of:= [.H40]- [.$H$1]" office:value-type="float" office:value="-33.7466497861174" calcext:value-type="float">
            <text:p>-33.7466497861174</text:p>
          </table:table-cell>
          <table:table-cell table:formula="of:=[.I40]- [.$H$1]" office:value-type="float" office:value="-36.6434705543217" calcext:value-type="float">
            <text:p>-36.6434705543217</text:p>
          </table:table-cell>
          <table:table-cell table:formula="of:= [.J40] - [.$H$1]" office:value-type="float" office:value="-39.4302427733204" calcext:value-type="float">
            <text:p>-39.4302427733204</text:p>
          </table:table-cell>
          <table:table-cell table:formula="of:=[.K40] - [.$H$1]" office:value-type="float" office:value="-42.111147123988" calcext:value-type="float">
            <text:p>-42.111147123988</text:p>
          </table:table-cell>
          <table:table-cell table:formula="of:= [.L40] - [.$H$1]" office:value-type="float" office:value="-44.6902054655452" calcext:value-type="float">
            <text:p>-44.6902054655452</text:p>
          </table:table-cell>
          <table:table-cell table:formula="of:= [.M40] - [.$H$1]" office:value-type="float" office:value="-47.1712868691019" calcext:value-type="float">
            <text:p>-47.1712868691019</text:p>
          </table:table-cell>
          <table:table-cell table:formula="of:= [.N40] -[.$H$1]" office:value-type="float" office:value="-49.5581134219896" calcext:value-type="float">
            <text:p>-49.5581134219896</text:p>
          </table:table-cell>
          <table:table-cell table:formula="of:= [.O40] -[.$H$1]" office:value-type="float" office:value="-51.8542658115898" calcext:value-type="float">
            <text:p>-51.8542658115898</text:p>
          </table:table-cell>
          <table:table-cell table:formula="of:= [.P40] -[.$H$1]" office:value-type="float" office:value="-54.063188697037" calcext:value-type="float">
            <text:p>-54.063188697037</text:p>
          </table:table-cell>
          <table:table-cell table:number-columns-repeated="5"/>
        </table:table-row>
        <table:table-row table:style-name="ro1" table:number-rows-repeated="3">
          <table:table-cell table:number-columns-repeated="21"/>
        </table:table-row>
        <table:table-row table:style-name="ro3">
          <table:table-cell table:style-name="ce2" office:value-type="string" calcext:value-type="string">
            <text:p>american call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formula="of:=MAX([.P25] - [.$H$1];0)" office:value-type="float" office:value="68.7731507582431" calcext:value-type="float">
            <text:p>68.773150758243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 MAX([.O46]   ;( 1/[.$B$4]) * ( [.$B$5] *[.P66] +[.$B$6]*[.P67]))" office:value-type="float" office:value="61.9896612667732" calcext:value-type="float">
            <text:p>61.9896612667732</text:p>
          </table:table-cell>
          <table:table-cell table:formula="of:=MAX([.P26] - [.$H$1];0)" office:value-type="float" office:value="55.448177847548" calcext:value-type="float">
            <text:p>55.44817784754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 MAX([.N47]   ;( 1/[.$B$4]) * ( [.$B$5] *[.O67] +[.$B$6]*[.O68]))" office:value-type="float" office:value="55.4663465397965" calcext:value-type="float">
            <text:p>55.4663465397965</text:p>
          </table:table-cell>
          <table:table-cell table:formula="of:= MAX([.O47]   ;( 1/[.$B$4]) * ( [.$B$5] *[.P67] +[.$B$6]*[.P68]))" office:value-type="float" office:value="49.1730326697913" calcext:value-type="float">
            <text:p>49.1730326697913</text:p>
          </table:table-cell>
          <table:table-cell table:formula="of:=MAX([.P27] - [.$H$1];0)" office:value-type="float" office:value="43.1163904477513" calcext:value-type="float">
            <text:p>43.1163904477513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 MAX([.M48];( 1/[.$B$4]) * ( [.$B$5] *[.N68] +[.$B$6]*[.N69]))" office:value-type="float" office:value="49.1932805144416" calcext:value-type="float">
            <text:p>49.1932805144416</text:p>
          </table:table-cell>
          <table:table-cell table:formula="of:= MAX([.N48]   ;( 1/[.$B$4]) * ( [.$B$5] *[.O68] +[.$B$6]*[.O69]))" office:value-type="float" office:value="43.1386690507766" calcext:value-type="float">
            <text:p>43.1386690507766</text:p>
          </table:table-cell>
          <table:table-cell table:formula="of:= MAX([.O48]   ;( 1/[.$B$4]) * ( [.$B$5] *[.P68] +[.$B$6]*[.P69]))" office:value-type="float" office:value="37.3116998100991" calcext:value-type="float">
            <text:p>37.3116998100991</text:p>
          </table:table-cell>
          <table:table-cell table:formula="of:=MAX([.P28] - [.$H$1];0)" office:value-type="float" office:value="31.7037608316924" calcext:value-type="float">
            <text:p>31.703760831692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MAX([.L49]; ( 1/[.$B$4]) * ( [.$B$5] *[.M69] +[.$B$6]*[.M70]))" office:value-type="float" office:value="43.1609158047552" calcext:value-type="float">
            <text:p>43.1609158047552</text:p>
          </table:table-cell>
          <table:table-cell table:formula="of:= MAX([.M49];( 1/[.$B$4]) * ( [.$B$5] *[.N69] +[.$B$6]*[.N70]))" office:value-type="float" office:value="37.3359007734797" calcext:value-type="float">
            <text:p>37.3359007734797</text:p>
          </table:table-cell>
          <table:table-cell table:formula="of:= MAX([.N49]   ;( 1/[.$B$4]) * ( [.$B$5] *[.O69] +[.$B$6]*[.O70]))" office:value-type="float" office:value="31.7298430106251" calcext:value-type="float">
            <text:p>31.7298430106251</text:p>
          </table:table-cell>
          <table:table-cell table:formula="of:= MAX([.O49]   ;( 1/[.$B$4]) * ( [.$B$5] *[.P69] +[.$B$6]*[.P70]))" office:value-type="float" office:value="26.3344590994226" calcext:value-type="float">
            <text:p>26.3344590994226</text:p>
          </table:table-cell>
          <table:table-cell table:formula="of:=MAX([.P29] - [.$H$1];0)" office:value-type="float" office:value="21.1417789769375" calcext:value-type="float">
            <text:p>21.141778976937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MAX([.K50]; ( 1/[.$B$4]) * ( [.$B$5] *[.L70] +[.$B$6]*[.L71]))" office:value-type="float" office:value="37.3600692552737" calcext:value-type="float">
            <text:p>37.3600692552737</text:p>
          </table:table-cell>
          <table:table-cell table:formula="of:=MAX([.L50]; ( 1/[.$B$4]) * ( [.$B$5] *[.M70] +[.$B$6]*[.M71]))" office:value-type="float" office:value="31.7558920728638" calcext:value-type="float">
            <text:p>31.7558920728638</text:p>
          </table:table-cell>
          <table:table-cell table:formula="of:= MAX([.M50];( 1/[.$B$4]) * ( [.$B$5] *[.N70] +[.$B$6]*[.N71]))" office:value-type="float" office:value="26.362318533261" calcext:value-type="float">
            <text:p>26.362318533261</text:p>
          </table:table-cell>
          <table:table-cell table:formula="of:= MAX([.N50]   ;( 1/[.$B$4]) * ( [.$B$5] *[.O70] +[.$B$6]*[.O71]))" office:value-type="float" office:value="21.1713812297769" calcext:value-type="float">
            <text:p>21.1713812297769</text:p>
          </table:table-cell>
          <table:table-cell table:formula="of:= MAX([.O50]   ;( 1/[.$B$4]) * ( [.$B$5] *[.P70] +[.$B$6]*[.P71]))" office:value-type="float" office:value="16.1754141551883" calcext:value-type="float">
            <text:p>16.1754141551883</text:p>
          </table:table-cell>
          <table:table-cell table:formula="of:=MAX([.P30] - [.$H$1];0)" office:value-type="float" office:value="11.3670413000748" calcext:value-type="float">
            <text:p>11.3670413000748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MAX([.J51]; ( 1/[.$B$4]) * ( [.$B$5] *[.K71]+[.$B$6]*[.K72]))" office:value-type="float" office:value="31.7819080457231" calcext:value-type="float">
            <text:p>31.7819080457231</text:p>
          </table:table-cell>
          <table:table-cell table:formula="of:=MAX([.K51]; ( 1/[.$B$4]) * ( [.$B$5] *[.L71] +[.$B$6]*[.L72]))" office:value-type="float" office:value="26.390144266226" calcext:value-type="float">
            <text:p>26.390144266226</text:p>
          </table:table-cell>
          <table:table-cell table:formula="of:=MAX([.L51]; ( 1/[.$B$4]) * ( [.$B$5] *[.M71] +[.$B$6]*[.M72]))" office:value-type="float" office:value="21.2009491927599" calcext:value-type="float">
            <text:p>21.2009491927599</text:p>
          </table:table-cell>
          <table:table-cell table:formula="of:= MAX([.M51];( 1/[.$B$4]) * ( [.$B$5] *[.N71] +[.$B$6]*[.N72]))" office:value-type="float" office:value="16.2066593730128" calcext:value-type="float">
            <text:p>16.2066593730128</text:p>
          </table:table-cell>
          <table:table-cell table:formula="of:= MAX([.N51]   ;( 1/[.$B$4]) * ( [.$B$5] *[.O71] +[.$B$6]*[.O72]))" office:value-type="float" office:value="11.3999012558258" calcext:value-type="float">
            <text:p>11.3999012558258</text:p>
          </table:table-cell>
          <table:table-cell table:formula="of:= MAX([.O51]   ;( 1/[.$B$4]) * ( [.$B$5] *[.P71] +[.$B$6]*[.P72]))" office:value-type="float" office:value="6.77358022449999" calcext:value-type="float">
            <text:p>6.77358022449999</text:p>
          </table:table-cell>
          <table:table-cell table:formula="of:=MAX([.P31] - [.$H$1];0)" office:value-type="float" office:value="2.32087004496452" calcext:value-type="float">
            <text:p>2.3208700449645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MAX([.I52]; ( 1/[.$B$4]) * ( [.$B$5] *[.J72] +[.$B$6]*[.J73]))" office:value-type="float" office:value="26.4703021955486" calcext:value-type="float">
            <text:p>26.4703021955486</text:p>
          </table:table-cell>
          <table:table-cell table:formula="of:=MAX([.J52]; ( 1/[.$B$4]) * ( [.$B$5] *[.K72]+[.$B$6]*[.K73]))" office:value-type="float" office:value="21.3336951828201" calcext:value-type="float">
            <text:p>21.3336951828201</text:p>
          </table:table-cell>
          <table:table-cell table:formula="of:=MAX([.K52]; ( 1/[.$B$4]) * ( [.$B$5] *[.L72] +[.$B$6]*[.L73]))" office:value-type="float" office:value="16.4412995279905" calcext:value-type="float">
            <text:p>16.4412995279905</text:p>
          </table:table-cell>
          <table:table-cell table:formula="of:=MAX([.L52]; ( 1/[.$B$4]) * ( [.$B$5] *[.M72] +[.$B$6]*[.M73]))" office:value-type="float" office:value="11.8336826424088" calcext:value-type="float">
            <text:p>11.8336826424088</text:p>
          </table:table-cell>
          <table:table-cell table:formula="of:= MAX([.M52];( 1/[.$B$4]) * ( [.$B$5] *[.N72] +[.$B$6]*[.N73]))" office:value-type="float" office:value="7.59823829835633" calcext:value-type="float">
            <text:p>7.59823829835633</text:p>
          </table:table-cell>
          <table:table-cell table:formula="of:= MAX([.N52]   ;( 1/[.$B$4]) * ( [.$B$5] *[.O72] +[.$B$6]*[.O73]))" office:value-type="float" office:value="3.91437297542867" calcext:value-type="float">
            <text:p>3.91437297542867</text:p>
          </table:table-cell>
          <table:table-cell table:formula="of:= MAX([.O52]   ;( 1/[.$B$4]) * ( [.$B$5] *[.P72] +[.$B$6]*[.P73]))" office:value-type="float" office:value="1.14257806569774" calcext:value-type="float">
            <text:p>1.14257806569774</text:p>
          </table:table-cell>
          <table:table-cell table:formula="of:=MAX([.P32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MAX([.H53]; ( 1/[.$B$4]) * ( [.$B$5] *[.I73] +[.$B$6]*[.I74]))" office:value-type="float" office:value="21.5268098095185" calcext:value-type="float">
            <text:p>21.5268098095185</text:p>
          </table:table-cell>
          <table:table-cell table:formula="of:=MAX([.I53]; ( 1/[.$B$4]) * ( [.$B$5] *[.J73] +[.$B$6]*[.J74]))" office:value-type="float" office:value="16.7441459504489" calcext:value-type="float">
            <text:p>16.7441459504489</text:p>
          </table:table-cell>
          <table:table-cell table:formula="of:=MAX([.J53]; ( 1/[.$B$4]) * ( [.$B$5] *[.K73]+[.$B$6]*[.K74]))" office:value-type="float" office:value="12.3017810550045" calcext:value-type="float">
            <text:p>12.3017810550045</text:p>
          </table:table-cell>
          <table:table-cell table:formula="of:=MAX([.K53]; ( 1/[.$B$4]) * ( [.$B$5] *[.L73] +[.$B$6]*[.L74]))" office:value-type="float" office:value="8.29317506581579" calcext:value-type="float">
            <text:p>8.29317506581579</text:p>
          </table:table-cell>
          <table:table-cell table:formula="of:=MAX([.L53]; ( 1/[.$B$4]) * ( [.$B$5] *[.M73] +[.$B$6]*[.M74]))" office:value-type="float" office:value="4.86317237306523" calcext:value-type="float">
            <text:p>4.86317237306523</text:p>
          </table:table-cell>
          <table:table-cell table:formula="of:= MAX([.M53];( 1/[.$B$4]) * ( [.$B$5] *[.N73] +[.$B$6]*[.N74]))" office:value-type="float" office:value="2.21245840302086" calcext:value-type="float">
            <text:p>2.21245840302086</text:p>
          </table:table-cell>
          <table:table-cell table:formula="of:= MAX([.N53]   ;( 1/[.$B$4]) * ( [.$B$5] *[.O73] +[.$B$6]*[.O74]))" office:value-type="float" office:value="0.562497947287499" calcext:value-type="float">
            <text:p>0.562497947287499</text:p>
          </table:table-cell>
          <table:table-cell table:formula="of:= MAX([.O53]   ;( 1/[.$B$4]) * ( [.$B$5] *[.P73] +[.$B$6]*[.P74]))" office:value-type="float" office:value="0" calcext:value-type="float">
            <text:p>0</text:p>
          </table:table-cell>
          <table:table-cell table:formula="of:=MAX([.P33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MAX([.G54]; ( 1/[.$B$4]) * ( [.$B$5] *[.H74] +[.$B$6]*[.H75]))" office:value-type="float" office:value="17.0722459286529" calcext:value-type="float">
            <text:p>17.0722459286529</text:p>
          </table:table-cell>
          <table:table-cell table:formula="of:=MAX([.H54]; ( 1/[.$B$4]) * ( [.$B$5] *[.I74] +[.$B$6]*[.I75]))" office:value-type="float" office:value="12.7610764983445" calcext:value-type="float">
            <text:p>12.7610764983445</text:p>
          </table:table-cell>
          <table:table-cell table:formula="of:=MAX([.I54]; ( 1/[.$B$4]) * ( [.$B$5] *[.J74] +[.$B$6]*[.J75]))" office:value-type="float" office:value="8.90457893414428" calcext:value-type="float">
            <text:p>8.90457893414428</text:p>
          </table:table-cell>
          <table:table-cell table:formula="of:=MAX([.J54]; ( 1/[.$B$4]) * ( [.$B$5] *[.K74]+[.$B$6]*[.K75]))" office:value-type="float" office:value="5.61403102704073" calcext:value-type="float">
            <text:p>5.61403102704073</text:p>
          </table:table-cell>
          <table:table-cell table:formula="of:=MAX([.K54]; ( 1/[.$B$4]) * ( [.$B$5] *[.L74] +[.$B$6]*[.L75]))" office:value-type="float" office:value="3.01807280541034" calcext:value-type="float">
            <text:p>3.01807280541034</text:p>
          </table:table-cell>
          <table:table-cell table:formula="of:=MAX([.L54]; ( 1/[.$B$4]) * ( [.$B$5] *[.M74] +[.$B$6]*[.M75]))" office:value-type="float" office:value="1.22970526838262" calcext:value-type="float">
            <text:p>1.22970526838262</text:p>
          </table:table-cell>
          <table:table-cell table:formula="of:= MAX([.M54];( 1/[.$B$4]) * ( [.$B$5] *[.N74] +[.$B$6]*[.N75]))" office:value-type="float" office:value="0.276921070167255" calcext:value-type="float">
            <text:p>0.276921070167255</text:p>
          </table:table-cell>
          <table:table-cell table:formula="of:= MAX([.N54]   ;( 1/[.$B$4]) * ( [.$B$5] *[.O74] +[.$B$6]*[.O75]))" office:value-type="float" office:value="0" calcext:value-type="float">
            <text:p>0</text:p>
          </table:table-cell>
          <table:table-cell table:formula="of:= MAX([.O54]   ;( 1/[.$B$4]) * ( [.$B$5] *[.P74] +[.$B$6]*[.P75]))" office:value-type="float" office:value="0" calcext:value-type="float">
            <text:p>0</text:p>
          </table:table-cell>
          <table:table-cell table:formula="of:=MAX([.P34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MAX([.F55]; ( 1/[.$B$4]) * ( [.$B$5] *[.G75] +[.$B$6]*[.G76]))" office:value-type="float" office:value="13.2027305929905" calcext:value-type="float">
            <text:p>13.2027305929905</text:p>
          </table:table-cell>
          <table:table-cell table:formula="of:=MAX([.G55]; ( 1/[.$B$4]) * ( [.$B$5] *[.H75] +[.$B$6]*[.H76]))" office:value-type="float" office:value="9.4567077783346" calcext:value-type="float">
            <text:p>9.4567077783346</text:p>
          </table:table-cell>
          <table:table-cell table:formula="of:=MAX([.H55]; ( 1/[.$B$4]) * ( [.$B$5] *[.I75] +[.$B$6]*[.I76]))" office:value-type="float" office:value="6.25660131867314" calcext:value-type="float">
            <text:p>6.25660131867314</text:p>
          </table:table-cell>
          <table:table-cell table:formula="of:=MAX([.I55]; ( 1/[.$B$4]) * ( [.$B$5] *[.J75] +[.$B$6]*[.J76]))" office:value-type="float" office:value="3.69130681625961" calcext:value-type="float">
            <text:p>3.69130681625961</text:p>
          </table:table-cell>
          <table:table-cell table:formula="of:=MAX([.J55]; ( 1/[.$B$4]) * ( [.$B$5] *[.K75]+[.$B$6]*[.K76]))" office:value-type="float" office:value="1.82806022385032" calcext:value-type="float">
            <text:p>1.82806022385032</text:p>
          </table:table-cell>
          <table:table-cell table:formula="of:=MAX([.K55]; ( 1/[.$B$4]) * ( [.$B$5] *[.L75] +[.$B$6]*[.L76]))" office:value-type="float" office:value="0.674559623487917" calcext:value-type="float">
            <text:p>0.674559623487917</text:p>
          </table:table-cell>
          <table:table-cell table:formula="of:=MAX([.L55]; ( 1/[.$B$4]) * ( [.$B$5] *[.M75] +[.$B$6]*[.M76]))" office:value-type="float" office:value="0.136329882575346" calcext:value-type="float">
            <text:p>0.136329882575346</text:p>
          </table:table-cell>
          <table:table-cell table:formula="of:= MAX([.M55];( 1/[.$B$4]) * ( [.$B$5] *[.N75] +[.$B$6]*[.N76]))" office:value-type="float" office:value="0" calcext:value-type="float">
            <text:p>0</text:p>
          </table:table-cell>
          <table:table-cell table:formula="of:= MAX([.N55]   ;( 1/[.$B$4]) * ( [.$B$5] *[.O75] +[.$B$6]*[.O76]))" office:value-type="float" office:value="0" calcext:value-type="float">
            <text:p>0</text:p>
          </table:table-cell>
          <table:table-cell table:formula="of:= MAX([.O55]   ;( 1/[.$B$4]) * ( [.$B$5] *[.P75] +[.$B$6]*[.P76]))" office:value-type="float" office:value="0" calcext:value-type="float">
            <text:p>0</text:p>
          </table:table-cell>
          <table:table-cell table:formula="of:=MAX([.P35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MAX([.E56]; ( 1/[.$B$4]) * ( [.$B$5] *[.F76] +[.$B$6]*[.F77]))" office:value-type="float" office:value="9.9640082516558" calcext:value-type="float">
            <text:p>9.9640082516558</text:p>
          </table:table-cell>
          <table:table-cell table:formula="of:=MAX([.F56]; ( 1/[.$B$4]) * ( [.$B$5] *[.G76] +[.$B$6]*[.G77]))" office:value-type="float" office:value="6.82793348867297" calcext:value-type="float">
            <text:p>6.82793348867297</text:p>
          </table:table-cell>
          <table:table-cell table:formula="of:=MAX([.G56]; ( 1/[.$B$4]) * ( [.$B$5] *[.H76] +[.$B$6]*[.H77]))" office:value-type="float" office:value="4.28164779282604" calcext:value-type="float">
            <text:p>4.28164779282604</text:p>
          </table:table-cell>
          <table:table-cell table:formula="of:=MAX([.H56]; ( 1/[.$B$4]) * ( [.$B$5] *[.I76] +[.$B$6]*[.I77]))" office:value-type="float" office:value="2.36810946819456" calcext:value-type="float">
            <text:p>2.36810946819456</text:p>
          </table:table-cell>
          <table:table-cell table:formula="of:=MAX([.I56]; ( 1/[.$B$4]) * ( [.$B$5] *[.J76] +[.$B$6]*[.J77]))" office:value-type="float" office:value="1.08573083341708" calcext:value-type="float">
            <text:p>1.08573083341708</text:p>
          </table:table-cell>
          <table:table-cell table:formula="of:=MAX([.J56]; ( 1/[.$B$4]) * ( [.$B$5] *[.K76]+[.$B$6]*[.K77]))" office:value-type="float" office:value="0.366141728708634" calcext:value-type="float">
            <text:p>0.366141728708634</text:p>
          </table:table-cell>
          <table:table-cell table:formula="of:=MAX([.K56]; ( 1/[.$B$4]) * ( [.$B$5] *[.L76] +[.$B$6]*[.L77]))" office:value-type="float" office:value="0.0671160084416185" calcext:value-type="float">
            <text:p>0.0671160084416185</text:p>
          </table:table-cell>
          <table:table-cell table:formula="of:=MAX([.L56]; ( 1/[.$B$4]) * ( [.$B$5] *[.M76] +[.$B$6]*[.M77]))" office:value-type="float" office:value="0" calcext:value-type="float">
            <text:p>0</text:p>
          </table:table-cell>
          <table:table-cell table:formula="of:= MAX([.M56];( 1/[.$B$4]) * ( [.$B$5] *[.N76] +[.$B$6]*[.N77]))" office:value-type="float" office:value="0" calcext:value-type="float">
            <text:p>0</text:p>
          </table:table-cell>
          <table:table-cell table:formula="of:= MAX([.N56]   ;( 1/[.$B$4]) * ( [.$B$5] *[.O76] +[.$B$6]*[.O77]))" office:value-type="float" office:value="0" calcext:value-type="float">
            <text:p>0</text:p>
          </table:table-cell>
          <table:table-cell table:formula="of:= MAX([.O56]   ;( 1/[.$B$4]) * ( [.$B$5] *[.P76] +[.$B$6]*[.P77]))" office:value-type="float" office:value="0" calcext:value-type="float">
            <text:p>0</text:p>
          </table:table-cell>
          <table:table-cell table:formula="of:=MAX([.P36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AX([.D57]; ( 1/[.$B$4]) * ( [.$B$5] *[.E77] +[.$B$6]*[.E78]))" office:value-type="float" office:value="7.3477013896345" calcext:value-type="float">
            <text:p>7.3477013896345</text:p>
          </table:table-cell>
          <table:table-cell table:formula="of:=MAX([.E57]; ( 1/[.$B$4]) * ( [.$B$5] *[.F77] +[.$B$6]*[.F78]))" office:value-type="float" office:value="4.81385460419108" calcext:value-type="float">
            <text:p>4.81385460419108</text:p>
          </table:table-cell>
          <table:table-cell table:formula="of:=MAX([.F57]; ( 1/[.$B$4]) * ( [.$B$5] *[.G77] +[.$B$6]*[.G78]))" office:value-type="float" office:value="2.86270148356523" calcext:value-type="float">
            <text:p>2.86270148356523</text:p>
          </table:table-cell>
          <table:table-cell table:formula="of:=MAX([.G57]; ( 1/[.$B$4]) * ( [.$B$5] *[.H77] +[.$B$6]*[.H78]))" office:value-type="float" office:value="1.48773992961298" calcext:value-type="float">
            <text:p>1.48773992961298</text:p>
          </table:table-cell>
          <table:table-cell table:formula="of:=MAX([.H57]; ( 1/[.$B$4]) * ( [.$B$5] *[.I77] +[.$B$6]*[.I78]))" office:value-type="float" office:value="0.634470805701868" calcext:value-type="float">
            <text:p>0.634470805701868</text:p>
          </table:table-cell>
          <table:table-cell table:formula="of:=MAX([.I57]; ( 1/[.$B$4]) * ( [.$B$5] *[.J77] +[.$B$6]*[.J78]))" office:value-type="float" office:value="0.197017757963386" calcext:value-type="float">
            <text:p>0.197017757963386</text:p>
          </table:table-cell>
          <table:table-cell table:formula="of:=MAX([.J57]; ( 1/[.$B$4]) * ( [.$B$5] *[.K77]+[.$B$6]*[.K78]))" office:value-type="float" office:value="0.0330416083696534" calcext:value-type="float">
            <text:p>0.0330416083696534</text:p>
          </table:table-cell>
          <table:table-cell table:formula="of:=MAX([.K57]; ( 1/[.$B$4]) * ( [.$B$5] *[.L77] +[.$B$6]*[.L78]))" office:value-type="float" office:value="0" calcext:value-type="float">
            <text:p>0</text:p>
          </table:table-cell>
          <table:table-cell table:formula="of:=MAX([.L57]; ( 1/[.$B$4]) * ( [.$B$5] *[.M77] +[.$B$6]*[.M78]))" office:value-type="float" office:value="0" calcext:value-type="float">
            <text:p>0</text:p>
          </table:table-cell>
          <table:table-cell table:formula="of:= MAX([.M57];( 1/[.$B$4]) * ( [.$B$5] *[.N77] +[.$B$6]*[.N78]))" office:value-type="float" office:value="0" calcext:value-type="float">
            <text:p>0</text:p>
          </table:table-cell>
          <table:table-cell table:formula="of:= MAX([.N57]   ;( 1/[.$B$4]) * ( [.$B$5] *[.O77] +[.$B$6]*[.O78]))" office:value-type="float" office:value="0" calcext:value-type="float">
            <text:p>0</text:p>
          </table:table-cell>
          <table:table-cell table:formula="of:= MAX([.O57]   ;( 1/[.$B$4]) * ( [.$B$5] *[.P77] +[.$B$6]*[.P78]))" office:value-type="float" office:value="0" calcext:value-type="float">
            <text:p>0</text:p>
          </table:table-cell>
          <table:table-cell table:formula="of:=MAX([.P37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MAX([.C58]; ( 1/[.$B$4]) * ( [.$B$5] *[.D78] +[.$B$6]*[.D79]))" office:value-type="float" office:value="5.30237881503569" calcext:value-type="float">
            <text:p>5.30237881503569</text:p>
          </table:table-cell>
          <table:table-cell table:formula="of:=MAX([.D58]; ( 1/[.$B$4]) * ( [.$B$5] *[.E78] +[.$B$6]*[.E79]))" office:value-type="float" office:value="3.32123000031249" calcext:value-type="float">
            <text:p>3.32123000031249</text:p>
          </table:table-cell>
          <table:table-cell table:formula="of:=MAX([.E58]; ( 1/[.$B$4]) * ( [.$B$5] *[.F78] +[.$B$6]*[.F79]))" office:value-type="float" office:value="1.87507760292478" calcext:value-type="float">
            <text:p>1.87507760292478</text:p>
          </table:table-cell>
          <table:table-cell table:formula="of:=MAX([.F58]; ( 1/[.$B$4]) * ( [.$B$5] *[.G78] +[.$B$6]*[.G79]))" office:value-type="float" office:value="0.917991123507174" calcext:value-type="float">
            <text:p>0.917991123507174</text:p>
          </table:table-cell>
          <table:table-cell table:formula="of:=MAX([.G58]; ( 1/[.$B$4]) * ( [.$B$5] *[.H78] +[.$B$6]*[.H79]))" office:value-type="float" office:value="0.365751446450256" calcext:value-type="float">
            <text:p>0.365751446450256</text:p>
          </table:table-cell>
          <table:table-cell table:formula="of:=MAX([.H58]; ( 1/[.$B$4]) * ( [.$B$5] *[.I78] +[.$B$6]*[.I79]))" office:value-type="float" office:value="0.105246033623849" calcext:value-type="float">
            <text:p>0.105246033623849</text:p>
          </table:table-cell>
          <table:table-cell table:formula="of:=MAX([.I58]; ( 1/[.$B$4]) * ( [.$B$5] *[.J78] +[.$B$6]*[.J79]))" office:value-type="float" office:value="0.0162665794495693" calcext:value-type="float">
            <text:p>0.0162665794495693</text:p>
          </table:table-cell>
          <table:table-cell table:formula="of:=MAX([.J58]; ( 1/[.$B$4]) * ( [.$B$5] *[.K78]+[.$B$6]*[.K79]))" office:value-type="float" office:value="0" calcext:value-type="float">
            <text:p>0</text:p>
          </table:table-cell>
          <table:table-cell table:formula="of:=MAX([.K58]; ( 1/[.$B$4]) * ( [.$B$5] *[.L78] +[.$B$6]*[.L79]))" office:value-type="float" office:value="0" calcext:value-type="float">
            <text:p>0</text:p>
          </table:table-cell>
          <table:table-cell table:formula="of:=MAX([.L58]; ( 1/[.$B$4]) * ( [.$B$5] *[.M78] +[.$B$6]*[.M79]))" office:value-type="float" office:value="0" calcext:value-type="float">
            <text:p>0</text:p>
          </table:table-cell>
          <table:table-cell table:formula="of:= MAX([.M58];( 1/[.$B$4]) * ( [.$B$5] *[.N78] +[.$B$6]*[.N79]))" office:value-type="float" office:value="0" calcext:value-type="float">
            <text:p>0</text:p>
          </table:table-cell>
          <table:table-cell table:formula="of:= MAX([.N58]   ;( 1/[.$B$4]) * ( [.$B$5] *[.O78] +[.$B$6]*[.O79]))" office:value-type="float" office:value="0" calcext:value-type="float">
            <text:p>0</text:p>
          </table:table-cell>
          <table:table-cell table:formula="of:= MAX([.O58]   ;( 1/[.$B$4]) * ( [.$B$5] *[.P78] +[.$B$6]*[.P79]))" office:value-type="float" office:value="0" calcext:value-type="float">
            <text:p>0</text:p>
          </table:table-cell>
          <table:table-cell table:formula="of:=MAX([.P38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MAX([.B59]; ( 1/[.$B$4]) * ( [.$B$5] *[.C79] +[.$B$6]*[.C80]))" office:value-type="float" office:value="3.75041449119602" calcext:value-type="float">
            <text:p>3.75041449119602</text:p>
          </table:table-cell>
          <table:table-cell table:formula="of:=MAX([.C59]; ( 1/[.$B$4]) * ( [.$B$5] *[.D79] +[.$B$6]*[.D80]))" office:value-type="float" office:value="2.24696508190614" calcext:value-type="float">
            <text:p>2.24696508190614</text:p>
          </table:table-cell>
          <table:table-cell table:formula="of:=MAX([.D59]; ( 1/[.$B$4]) * ( [.$B$5] *[.E79] +[.$B$6]*[.E80]))" office:value-type="float" office:value="1.20605274521376" calcext:value-type="float">
            <text:p>1.20605274521376</text:p>
          </table:table-cell>
          <table:table-cell table:formula="of:=MAX([.E59]; ( 1/[.$B$4]) * ( [.$B$5] *[.F79] +[.$B$6]*[.F80]))" office:value-type="float" office:value="0.55767205091422" calcext:value-type="float">
            <text:p>0.55767205091422</text:p>
          </table:table-cell>
          <table:table-cell table:formula="of:=MAX([.F59]; ( 1/[.$B$4]) * ( [.$B$5] *[.G79] +[.$B$6]*[.G80]))" office:value-type="float" office:value="0.208411026081923" calcext:value-type="float">
            <text:p>0.208411026081923</text:p>
          </table:table-cell>
          <table:table-cell table:formula="of:=MAX([.G59]; ( 1/[.$B$4]) * ( [.$B$5] *[.H79] +[.$B$6]*[.H80]))" office:value-type="float" office:value="0.0558762585127792" calcext:value-type="float">
            <text:p>0.0558762585127792</text:p>
          </table:table-cell>
          <table:table-cell table:formula="of:=MAX([.H59]; ( 1/[.$B$4]) * ( [.$B$5] *[.I79] +[.$B$6]*[.I80]))" office:value-type="float" office:value="0.00800813338227718" calcext:value-type="float">
            <text:p>0.00800813338227718</text:p>
          </table:table-cell>
          <table:table-cell table:formula="of:=MAX([.I59]; ( 1/[.$B$4]) * ( [.$B$5] *[.J79] +[.$B$6]*[.J80]))" office:value-type="float" office:value="0" calcext:value-type="float">
            <text:p>0</text:p>
          </table:table-cell>
          <table:table-cell table:formula="of:=MAX([.J59]; ( 1/[.$B$4]) * ( [.$B$5] *[.K79]+[.$B$6]*[.K80]))" office:value-type="float" office:value="0" calcext:value-type="float">
            <text:p>0</text:p>
          </table:table-cell>
          <table:table-cell table:formula="of:=MAX([.K59]; ( 1/[.$B$4]) * ( [.$B$5] *[.L79] +[.$B$6]*[.L80]))" office:value-type="float" office:value="0" calcext:value-type="float">
            <text:p>0</text:p>
          </table:table-cell>
          <table:table-cell table:formula="of:=MAX([.L59]; ( 1/[.$B$4]) * ( [.$B$5] *[.M79] +[.$B$6]*[.M80]))" office:value-type="float" office:value="0" calcext:value-type="float">
            <text:p>0</text:p>
          </table:table-cell>
          <table:table-cell table:formula="of:= MAX([.M59];( 1/[.$B$4]) * ( [.$B$5] *[.N79] +[.$B$6]*[.N80]))" office:value-type="float" office:value="0" calcext:value-type="float">
            <text:p>0</text:p>
          </table:table-cell>
          <table:table-cell table:formula="of:= MAX([.N59]   ;( 1/[.$B$4]) * ( [.$B$5] *[.O79] +[.$B$6]*[.O80]))" office:value-type="float" office:value="0" calcext:value-type="float">
            <text:p>0</text:p>
          </table:table-cell>
          <table:table-cell table:formula="of:= MAX([.O59]   ;( 1/[.$B$4]) * ( [.$B$5] *[.P79] +[.$B$6]*[.P80]))" office:value-type="float" office:value="0" calcext:value-type="float">
            <text:p>0</text:p>
          </table:table-cell>
          <table:table-cell table:formula="of:=MAX([.P39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MAX([.A60]; ( 1/[.$B$4]) * ( [.$B$5] *[.B80] +[.$B$6]*[.B81]))" office:value-type="float" office:value="2.6040771329669" calcext:value-type="float">
            <text:p>2.6040771329669</text:p>
          </table:table-cell>
          <table:table-cell table:formula="of:=MAX([.B60]; ( 1/[.$B$4]) * ( [.$B$5] *[.C80] +[.$B$6]*[.C81]))" office:value-type="float" office:value="1.49346553825129" calcext:value-type="float">
            <text:p>1.49346553825129</text:p>
          </table:table-cell>
          <table:table-cell table:formula="of:=MAX([.C60]; ( 1/[.$B$4]) * ( [.$B$5] *[.D80] +[.$B$6]*[.D81]))" office:value-type="float" office:value="0.763305566333115" calcext:value-type="float">
            <text:p>0.763305566333115</text:p>
          </table:table-cell>
          <table:table-cell table:formula="of:=MAX([.D60]; ( 1/[.$B$4]) * ( [.$B$5] *[.E80] +[.$B$6]*[.E81]))" office:value-type="float" office:value="0.334197395936796" calcext:value-type="float">
            <text:p>0.334197395936796</text:p>
          </table:table-cell>
          <table:table-cell table:formula="of:=MAX([.E60]; ( 1/[.$B$4]) * ( [.$B$5] *[.F80] +[.$B$6]*[.F81]))" office:value-type="float" office:value="0.117573417224316" calcext:value-type="float">
            <text:p>0.117573417224316</text:p>
          </table:table-cell>
          <table:table-cell table:formula="of:=MAX([.F60]; ( 1/[.$B$4]) * ( [.$B$5] *[.G80] +[.$B$6]*[.G81]))" office:value-type="float" office:value="0.0295084582675964" calcext:value-type="float">
            <text:p>0.0295084582675964</text:p>
          </table:table-cell>
          <table:table-cell table:formula="of:=MAX([.G60]; ( 1/[.$B$4]) * ( [.$B$5] *[.H80] +[.$B$6]*[.H81]))" office:value-type="float" office:value="0.00394245148263423" calcext:value-type="float">
            <text:p>0.00394245148263423</text:p>
          </table:table-cell>
          <table:table-cell table:formula="of:=MAX([.H60]; ( 1/[.$B$4]) * ( [.$B$5] *[.I80] +[.$B$6]*[.I81]))" office:value-type="float" office:value="0" calcext:value-type="float">
            <text:p>0</text:p>
          </table:table-cell>
          <table:table-cell table:formula="of:=MAX([.I60]; ( 1/[.$B$4]) * ( [.$B$5] *[.J80] +[.$B$6]*[.J81]))" office:value-type="float" office:value="0" calcext:value-type="float">
            <text:p>0</text:p>
          </table:table-cell>
          <table:table-cell table:formula="of:=MAX([.J60]; ( 1/[.$B$4]) * ( [.$B$5] *[.K80]+[.$B$6]*[.K81]))" office:value-type="float" office:value="0" calcext:value-type="float">
            <text:p>0</text:p>
          </table:table-cell>
          <table:table-cell table:formula="of:=MAX([.K60]; ( 1/[.$B$4]) * ( [.$B$5] *[.L80] +[.$B$6]*[.L81]))" office:value-type="float" office:value="0" calcext:value-type="float">
            <text:p>0</text:p>
          </table:table-cell>
          <table:table-cell table:formula="of:=MAX([.L60]; ( 1/[.$B$4]) * ( [.$B$5] *[.M80] +[.$B$6]*[.M81]))" office:value-type="float" office:value="0" calcext:value-type="float">
            <text:p>0</text:p>
          </table:table-cell>
          <table:table-cell table:formula="of:= MAX([.M60];( 1/[.$B$4]) * ( [.$B$5] *[.N80] +[.$B$6]*[.N81]))" office:value-type="float" office:value="0" calcext:value-type="float">
            <text:p>0</text:p>
          </table:table-cell>
          <table:table-cell table:formula="of:= MAX([.N60]   ;( 1/[.$B$4]) * ( [.$B$5] *[.O80] +[.$B$6]*[.O81]))" office:value-type="float" office:value="0" calcext:value-type="float">
            <text:p>0</text:p>
          </table:table-cell>
          <table:table-cell table:formula="of:= MAX([.O60]   ;( 1/[.$B$4]) * ( [.$B$5] *[.P80] +[.$B$6]*[.P81]))" office:value-type="float" office:value="0" calcext:value-type="float">
            <text:p>0</text:p>
          </table:table-cell>
          <table:table-cell table:formula="of:=MAX([.P40] - [.$H$1]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">
          <table:table-cell table:number-columns-repeated="21"/>
        </table:table-row>
        <table:table-row table:style-name="ro3">
          <table:table-cell table:style-name="ce2" office:value-type="string" calcext:value-type="string">
            <text:p>put option</text:p>
          </table:table-cell>
          <table:table-cell table:number-columns-repeated="20"/>
        </table:table-row>
        <table:table-row table:style-name="ro1">
          <table:table-cell table:number-columns-repeated="14"/>
          <table:table-cell table:formula="of:=MAX([.$H$1] - [.O26];0)" office:value-type="float" office:value="0" calcext:value-type="float">
            <text:p>0</text:p>
          </table:table-cell>
          <table:table-cell table:formula="of:=MAX([.$H$1] - [.P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MAX([.$H$1] - [.O27];0)" office:value-type="float" office:value="0" calcext:value-type="float">
            <text:p>0</text:p>
          </table:table-cell>
          <table:table-cell table:formula="of:=MAX([.$H$1] - [.P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 MAX( [.$H$1] -[.N28];( 1/[.$B$4]) * ( [.$B$5] *[.O89] +[.$B$6]*[.O90]))" office:value-type="float" office:value="0" calcext:value-type="float">
            <text:p>0</text:p>
          </table:table-cell>
          <table:table-cell table:formula="of:=MAX([.$H$1] - [.O28];0)" office:value-type="float" office:value="0" calcext:value-type="float">
            <text:p>0</text:p>
          </table:table-cell>
          <table:table-cell table:formula="of:=MAX([.$H$1] - [.P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 MAX( [.$H$1] -[.L29];( 1/[.$B$4]) * ( [.$B$5] *[.M90] +[.$B$6]*[.M91]))" office:value-type="float" office:value="0" calcext:value-type="float">
            <text:p>0</text:p>
          </table:table-cell>
          <table:table-cell table:formula="of:= MAX( [.$H$1] -[.M29];( 1/[.$B$4]) * ( [.$B$5] *[.N90] +[.$B$6]*[.N91]))" office:value-type="float" office:value="0" calcext:value-type="float">
            <text:p>0</text:p>
          </table:table-cell>
          <table:table-cell table:formula="of:= MAX( [.$H$1] -[.N29];( 1/[.$B$4]) * ( [.$B$5] *[.O90] +[.$B$6]*[.O91]))" office:value-type="float" office:value="0" calcext:value-type="float">
            <text:p>0</text:p>
          </table:table-cell>
          <table:table-cell table:formula="of:= MAX( [.$H$1] -[.O29];( 1/[.$B$4]) * ( [.$B$5] *[.P90] +[.$B$6]*[.P91]))" office:value-type="float" office:value="0" calcext:value-type="float">
            <text:p>0</text:p>
          </table:table-cell>
          <table:table-cell table:formula="of:=MAX([.$H$1] - [.P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 MAX( [.$H$1] -[.K30];( 1/[.$B$4]) * ( [.$B$5] *[.L91] +[.$B$6]*[.L92]))" office:value-type="float" office:value="0" calcext:value-type="float">
            <text:p>0</text:p>
          </table:table-cell>
          <table:table-cell table:formula="of:= MAX( [.$H$1] -[.L30];( 1/[.$B$4]) * ( [.$B$5] *[.M91] +[.$B$6]*[.M92]))" office:value-type="float" office:value="0" calcext:value-type="float">
            <text:p>0</text:p>
          </table:table-cell>
          <table:table-cell table:formula="of:= MAX( [.$H$1] -[.M30];( 1/[.$B$4]) * ( [.$B$5] *[.N91] +[.$B$6]*[.N92]))" office:value-type="float" office:value="0" calcext:value-type="float">
            <text:p>0</text:p>
          </table:table-cell>
          <table:table-cell table:formula="of:= MAX( [.$H$1] -[.N30];( 1/[.$B$4]) * ( [.$B$5] *[.O91] +[.$B$6]*[.O92]))" office:value-type="float" office:value="0" calcext:value-type="float">
            <text:p>0</text:p>
          </table:table-cell>
          <table:table-cell table:formula="of:= MAX( [.$H$1] -[.O30];( 1/[.$B$4]) * ( [.$B$5] *[.P91] +[.$B$6]*[.P92]))" office:value-type="float" office:value="0" calcext:value-type="float">
            <text:p>0</text:p>
          </table:table-cell>
          <table:table-cell table:formula="of:=MAX([.$H$1] - [.P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 MAX( [.$H$1] -[.J31];( 1/[.$B$4]) * ( [.$B$5] *[.K92] +[.$B$6]*[.K93]))" office:value-type="float" office:value="0" calcext:value-type="float">
            <text:p>0</text:p>
          </table:table-cell>
          <table:table-cell table:formula="of:= MAX( [.$H$1] -[.K31];( 1/[.$B$4]) * ( [.$B$5] *[.L92] +[.$B$6]*[.L93]))" office:value-type="float" office:value="0" calcext:value-type="float">
            <text:p>0</text:p>
          </table:table-cell>
          <table:table-cell table:formula="of:= MAX( [.$H$1] -[.L31];( 1/[.$B$4]) * ( [.$B$5] *[.M92] +[.$B$6]*[.M93]))" office:value-type="float" office:value="0" calcext:value-type="float">
            <text:p>0</text:p>
          </table:table-cell>
          <table:table-cell table:formula="of:= MAX( [.$H$1] -[.M31];( 1/[.$B$4]) * ( [.$B$5] *[.N92] +[.$B$6]*[.N93]))" office:value-type="float" office:value="0" calcext:value-type="float">
            <text:p>0</text:p>
          </table:table-cell>
          <table:table-cell table:formula="of:= MAX( [.$H$1] -[.N31];( 1/[.$B$4]) * ( [.$B$5] *[.O92] +[.$B$6]*[.O93]))" office:value-type="float" office:value="0" calcext:value-type="float">
            <text:p>0</text:p>
          </table:table-cell>
          <table:table-cell table:formula="of:= MAX( [.$H$1] -[.O31];( 1/[.$B$4]) * ( [.$B$5] *[.P92] +[.$B$6]*[.P93]))" office:value-type="float" office:value="0" calcext:value-type="float">
            <text:p>0</text:p>
          </table:table-cell>
          <table:table-cell table:formula="of:=MAX([.$H$1] - [.P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 MAX( [.$H$1] -[.I32];( 1/[.$B$4]) * ( [.$B$5] *[.J93] +[.$B$6]*[.J94]))" office:value-type="float" office:value="0.0523658697274835" calcext:value-type="float">
            <text:p>0.0523658697274835</text:p>
          </table:table-cell>
          <table:table-cell table:formula="of:= MAX( [.$H$1] -[.J32];( 1/[.$B$4]) * ( [.$B$5] *[.K93] +[.$B$6]*[.K94]))" office:value-type="float" office:value="0.103212289228228" calcext:value-type="float">
            <text:p>0.103212289228228</text:p>
          </table:table-cell>
          <table:table-cell table:formula="of:= MAX( [.$H$1] -[.K32];( 1/[.$B$4]) * ( [.$B$5] *[.L93] +[.$B$6]*[.L94]))" office:value-type="float" office:value="0.203429766433162" calcext:value-type="float">
            <text:p>0.203429766433162</text:p>
          </table:table-cell>
          <table:table-cell table:formula="of:= MAX( [.$H$1] -[.L32];( 1/[.$B$4]) * ( [.$B$5] *[.M93] +[.$B$6]*[.M94]))" office:value-type="float" office:value="0.400956806408404" calcext:value-type="float">
            <text:p>0.400956806408404</text:p>
          </table:table-cell>
          <table:table-cell table:formula="of:= MAX( [.$H$1] -[.M32];( 1/[.$B$4]) * ( [.$B$5] *[.N93] +[.$B$6]*[.N94]))" office:value-type="float" office:value="0.790279433654304" calcext:value-type="float">
            <text:p>0.790279433654304</text:p>
          </table:table-cell>
          <table:table-cell table:formula="of:= MAX( [.$H$1] -[.N32];( 1/[.$B$4]) * ( [.$B$5] *[.O93] +[.$B$6]*[.O94]))" office:value-type="float" office:value="1.55762808680401" calcext:value-type="float">
            <text:p>1.55762808680401</text:p>
          </table:table-cell>
          <table:table-cell table:formula="of:= MAX( [.$H$1] -[.O32];( 1/[.$B$4]) * ( [.$B$5] *[.P93] +[.$B$6]*[.P94]))" office:value-type="float" office:value="3.07005997306773" calcext:value-type="float">
            <text:p>3.07005997306773</text:p>
          </table:table-cell>
          <table:table-cell table:formula="of:=MAX([.$H$1] - [.P32];0)" office:value-type="float" office:value="6.05103895986603" calcext:value-type="float">
            <text:p>6.051038959866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formula="of:= MAX( [.$H$1] -[.H33];( 1/[.$B$4]) * ( [.$B$5] *[.I94] +[.$B$6]*[.I95]))" office:value-type="float" office:value="0.267000489289458" calcext:value-type="float">
            <text:p>0.267000489289458</text:p>
          </table:table-cell>
          <table:table-cell table:formula="of:= MAX( [.$H$1] -[.I33];( 1/[.$B$4]) * ( [.$B$5] *[.J94] +[.$B$6]*[.J95]))" office:value-type="float" office:value="0.475441660277962" calcext:value-type="float">
            <text:p>0.475441660277962</text:p>
          </table:table-cell>
          <table:table-cell table:formula="of:= MAX( [.$H$1] -[.J33];( 1/[.$B$4]) * ( [.$B$5] *[.K94] +[.$B$6]*[.K95]))" office:value-type="float" office:value="0.836938207231175" calcext:value-type="float">
            <text:p>0.836938207231175</text:p>
          </table:table-cell>
          <table:table-cell table:formula="of:= MAX( [.$H$1] -[.K33];( 1/[.$B$4]) * ( [.$B$5] *[.L94] +[.$B$6]*[.L95]))" office:value-type="float" office:value="1.45219837108797" calcext:value-type="float">
            <text:p>1.45219837108797</text:p>
          </table:table-cell>
          <table:table-cell table:formula="of:= MAX( [.$H$1] -[.L33];( 1/[.$B$4]) * ( [.$B$5] *[.M94] +[.$B$6]*[.M95]))" office:value-type="float" office:value="2.47320044992944" calcext:value-type="float">
            <text:p>2.47320044992944</text:p>
          </table:table-cell>
          <table:table-cell table:formula="of:= MAX( [.$H$1] -[.M33];( 1/[.$B$4]) * ( [.$B$5] *[.N94] +[.$B$6]*[.N95]))" office:value-type="float" office:value="4.10780888371383" calcext:value-type="float">
            <text:p>4.10780888371383</text:p>
          </table:table-cell>
          <table:table-cell table:formula="of:= MAX( [.$H$1] -[.N33];( 1/[.$B$4]) * ( [.$B$5] *[.O94] +[.$B$6]*[.O95]))" office:value-type="float" office:value="6.58501671266606" calcext:value-type="float">
            <text:p>6.58501671266606</text:p>
          </table:table-cell>
          <table:table-cell table:formula="of:= MAX( [.$H$1] -[.O33];( 1/[.$B$4]) * ( [.$B$5] *[.P94] +[.$B$6]*[.P95]))" office:value-type="float" office:value="10" calcext:value-type="float">
            <text:p>10</text:p>
          </table:table-cell>
          <table:table-cell table:formula="of:=MAX([.$H$1] - [.P33];0)" office:value-type="float" office:value="13.7989422891965" calcext:value-type="float">
            <text:p>13.79894228919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formula="of:= MAX( [.$H$1] -[.G34];( 1/[.$B$4]) * ( [.$B$5] *[.H95] +[.$B$6]*[.H96]))" office:value-type="float" office:value="0.773013040381617" calcext:value-type="float">
            <text:p>0.773013040381617</text:p>
          </table:table-cell>
          <table:table-cell table:formula="of:= MAX( [.$H$1] -[.H34];( 1/[.$B$4]) * ( [.$B$5] *[.I95] +[.$B$6]*[.I96]))" office:value-type="float" office:value="1.2645184991695" calcext:value-type="float">
            <text:p>1.2645184991695</text:p>
          </table:table-cell>
          <table:table-cell table:formula="of:= MAX( [.$H$1] -[.I34];( 1/[.$B$4]) * ( [.$B$5] *[.J95] +[.$B$6]*[.J96]))" office:value-type="float" office:value="2.03101176266943" calcext:value-type="float">
            <text:p>2.03101176266943</text:p>
          </table:table-cell>
          <table:table-cell table:formula="of:= MAX( [.$H$1] -[.J34];( 1/[.$B$4]) * ( [.$B$5] *[.K95] +[.$B$6]*[.K96]))" office:value-type="float" office:value="3.19098780307432" calcext:value-type="float">
            <text:p>3.19098780307432</text:p>
          </table:table-cell>
          <table:table-cell table:formula="of:= MAX( [.$H$1] -[.K34];( 1/[.$B$4]) * ( [.$B$5] *[.L95] +[.$B$6]*[.L96]))" office:value-type="float" office:value="4.88027837705618" calcext:value-type="float">
            <text:p>4.88027837705618</text:p>
          </table:table-cell>
          <table:table-cell table:formula="of:= MAX( [.$H$1] -[.L34];( 1/[.$B$4]) * ( [.$B$5] *[.M95] +[.$B$6]*[.M96]))" office:value-type="float" office:value="7.21913704087612" calcext:value-type="float">
            <text:p>7.21913704087612</text:p>
          </table:table-cell>
          <table:table-cell table:formula="of:= MAX( [.$H$1] -[.M34];( 1/[.$B$4]) * ( [.$B$5] *[.N95] +[.$B$6]*[.N96]))" office:value-type="float" office:value="10.242885131165" calcext:value-type="float">
            <text:p>10.242885131165</text:p>
          </table:table-cell>
          <table:table-cell table:formula="of:= MAX( [.$H$1] -[.N34];( 1/[.$B$4]) * ( [.$B$5] *[.O95] +[.$B$6]*[.O96]))" office:value-type="float" office:value="13.7989422891965" calcext:value-type="float">
            <text:p>13.7989422891965</text:p>
          </table:table-cell>
          <table:table-cell table:formula="of:= MAX( [.$H$1] -[.O34];( 1/[.$B$4]) * ( [.$B$5] *[.P95] +[.$B$6]*[.P96]))" office:value-type="float" office:value="17.4535649532265" calcext:value-type="float">
            <text:p>17.4535649532265</text:p>
          </table:table-cell>
          <table:table-cell table:formula="of:=MAX([.$H$1] - [.P34];0)" office:value-type="float" office:value="20.9693506113621" calcext:value-type="float">
            <text:p>20.96935061136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11]" office:value-type="float" office:value="110" calcext:value-type="float">
            <text:p>110</text:p>
          </table:table-cell>
          <table:table-cell table:formula="of:= MAX( [.$H$1] -[.G35];( 1/[.$B$4]) * ( [.$B$5] *[.H96] +[.$B$6]*[.H97]))" office:value-type="float" office:value="2.55072841693361" calcext:value-type="float">
            <text:p>2.55072841693361</text:p>
          </table:table-cell>
          <table:table-cell table:formula="of:= MAX( [.$H$1] -[.H35];( 1/[.$B$4]) * ( [.$B$5] *[.I96] +[.$B$6]*[.I97]))" office:value-type="float" office:value="3.80044825834203" calcext:value-type="float">
            <text:p>3.80044825834203</text:p>
          </table:table-cell>
          <table:table-cell table:formula="of:= MAX( [.$H$1] -[.I35];( 1/[.$B$4]) * ( [.$B$5] *[.J96] +[.$B$6]*[.J97]))" office:value-type="float" office:value="5.51987685348233" calcext:value-type="float">
            <text:p>5.51987685348233</text:p>
          </table:table-cell>
          <table:table-cell table:formula="of:= MAX( [.$H$1] -[.J35];( 1/[.$B$4]) * ( [.$B$5] *[.K96] +[.$B$6]*[.K97]))" office:value-type="float" office:value="7.78328687610638" calcext:value-type="float">
            <text:p>7.78328687610638</text:p>
          </table:table-cell>
          <table:table-cell table:formula="of:= MAX( [.$H$1] -[.K35];( 1/[.$B$4]) * ( [.$B$5] *[.L96] +[.$B$6]*[.L97]))" office:value-type="float" office:value="10.6052673437903" calcext:value-type="float">
            <text:p>10.6052673437903</text:p>
          </table:table-cell>
          <table:table-cell table:formula="of:= MAX( [.$H$1] -[.L35];( 1/[.$B$4]) * ( [.$B$5] *[.M96] +[.$B$6]*[.M97]))" office:value-type="float" office:value="13.8978876947965" calcext:value-type="float">
            <text:p>13.8978876947965</text:p>
          </table:table-cell>
          <table:table-cell table:formula="of:= MAX( [.$H$1] -[.M35];( 1/[.$B$4]) * ( [.$B$5] *[.N96] +[.$B$6]*[.N97]))" office:value-type="float" office:value="17.4535649532265" calcext:value-type="float">
            <text:p>17.4535649532265</text:p>
          </table:table-cell>
          <table:table-cell table:formula="of:= MAX( [.$H$1] -[.N35];( 1/[.$B$4]) * ( [.$B$5] *[.O96] +[.$B$6]*[.O97]))" office:value-type="float" office:value="20.9693506113621" calcext:value-type="float">
            <text:p>20.9693506113621</text:p>
          </table:table-cell>
          <table:table-cell table:formula="of:= MAX( [.$H$1] -[.O35];( 1/[.$B$4]) * ( [.$B$5] *[.P96] +[.$B$6]*[.P97]))" office:value-type="float" office:value="24.3515736013333" calcext:value-type="float">
            <text:p>24.3515736013333</text:p>
          </table:table-cell>
          <table:table-cell table:formula="of:=MAX([.$H$1] - [.P35];0)" office:value-type="float" office:value="27.6053078918236" calcext:value-type="float">
            <text:p>27.60530789182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style-name="ce11" table:formula="of:= MAX( [.$H$1] -[.E36];( 1/[.$B$4]) * ( [.$B$5] *[.F97] +[.$B$6]*[.F98]))" office:value-type="float" office:value="52.9761328578699" calcext:value-type="float">
            <text:p>52.9761328578699</text:p>
          </table:table-cell>
          <table:table-cell table:style-name="ce12" table:formula="of:=[.$H$1] - [.F12]" office:value-type="float" office:value="-2.32087004496454" calcext:value-type="float">
            <text:p>-2.32087004496454</text:p>
          </table:table-cell>
          <table:table-cell table:formula="of:= MAX( [.$H$1] -[.G36];( 1/[.$B$4]) * ( [.$B$5] *[.H97] +[.$B$6]*[.H98]))" office:value-type="float" office:value="6.07628794779199" calcext:value-type="float">
            <text:p>6.07628794779199</text:p>
          </table:table-cell>
          <table:table-cell table:formula="of:= MAX( [.$H$1] -[.H36];( 1/[.$B$4]) * ( [.$B$5] *[.I97] +[.$B$6]*[.I98]))" office:value-type="float" office:value="8.28858823742669" calcext:value-type="float">
            <text:p>8.28858823742669</text:p>
          </table:table-cell>
          <table:table-cell table:formula="of:= MAX( [.$H$1] -[.I36];( 1/[.$B$4]) * ( [.$B$5] *[.J97] +[.$B$6]*[.J98]))" office:value-type="float" office:value="10.9805885033637" calcext:value-type="float">
            <text:p>10.9805885033637</text:p>
          </table:table-cell>
          <table:table-cell table:formula="of:= MAX( [.$H$1] -[.J36];( 1/[.$B$4]) * ( [.$B$5] *[.K97] +[.$B$6]*[.K98]))" office:value-type="float" office:value="14.0902298209796" calcext:value-type="float">
            <text:p>14.0902298209796</text:p>
          </table:table-cell>
          <table:table-cell table:formula="of:= MAX( [.$H$1] -[.K36];( 1/[.$B$4]) * ( [.$B$5] *[.L97] +[.$B$6]*[.L98]))" office:value-type="float" office:value="17.4810389265994" calcext:value-type="float">
            <text:p>17.4810389265994</text:p>
          </table:table-cell>
          <table:table-cell table:formula="of:= MAX( [.$H$1] -[.L36];( 1/[.$B$4]) * ( [.$B$5] *[.M97] +[.$B$6]*[.M98]))" office:value-type="float" office:value="20.9693506113621" calcext:value-type="float">
            <text:p>20.9693506113621</text:p>
          </table:table-cell>
          <table:table-cell table:formula="of:= MAX( [.$H$1] -[.M36];( 1/[.$B$4]) * ( [.$B$5] *[.N97] +[.$B$6]*[.N98]))" office:value-type="float" office:value="24.3515736013333" calcext:value-type="float">
            <text:p>24.3515736013333</text:p>
          </table:table-cell>
          <table:table-cell table:formula="of:= MAX( [.$H$1] -[.N36];( 1/[.$B$4]) * ( [.$B$5] *[.O97] +[.$B$6]*[.O98]))" office:value-type="float" office:value="27.6053078918236" calcext:value-type="float">
            <text:p>27.6053078918236</text:p>
          </table:table-cell>
          <table:table-cell table:formula="of:= MAX( [.$H$1] -[.O36];( 1/[.$B$4]) * ( [.$B$5] *[.P97] +[.$B$6]*[.P98]))" office:value-type="float" office:value="30.7354346943743" calcext:value-type="float">
            <text:p>30.7354346943743</text:p>
          </table:table-cell>
          <table:table-cell table:formula="of:=MAX([.$H$1] - [.P36];0)" office:value-type="float" office:value="33.7466497861174" calcext:value-type="float">
            <text:p>33.74664978611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formula="of:= MAX( [.$H$1] -[.D37];( 1/[.$B$4]) * ( [.$B$5] *[.E98] +[.$B$6]*[.E99]))" office:value-type="float" office:value="53.8164126248136" calcext:value-type="float">
            <text:p>53.8164126248136</text:p>
          </table:table-cell>
          <table:table-cell table:style-name="ce11" table:formula="of:= MAX( [.$H$1] -[.E37];( 1/[.$B$4]) * ( [.$B$5] *[.F98] +[.$B$6]*[.F99]))" office:value-type="float" office:value="54.6671100353564" calcext:value-type="float">
            <text:p>54.6671100353564</text:p>
          </table:table-cell>
          <table:table-cell table:style-name="ce12" table:formula="of:=[.$H$1] - [.F13]" office:value-type="float" office:value="110" calcext:value-type="float">
            <text:p>110</text:p>
          </table:table-cell>
          <table:table-cell table:formula="of:= MAX( [.$H$1] -[.G37];( 1/[.$B$4]) * ( [.$B$5] *[.H98] +[.$B$6]*[.H99]))" office:value-type="float" office:value="11.3474727714573" calcext:value-type="float">
            <text:p>11.3474727714573</text:p>
          </table:table-cell>
          <table:table-cell table:formula="of:= MAX( [.$H$1] -[.H37];( 1/[.$B$4]) * ( [.$B$5] *[.I98] +[.$B$6]*[.I99]))" office:value-type="float" office:value="14.323045236877" calcext:value-type="float">
            <text:p>14.323045236877</text:p>
          </table:table-cell>
          <table:table-cell table:formula="of:= MAX( [.$H$1] -[.I37];( 1/[.$B$4]) * ( [.$B$5] *[.J98] +[.$B$6]*[.J99]))" office:value-type="float" office:value="17.5757300942343" calcext:value-type="float">
            <text:p>17.5757300942343</text:p>
          </table:table-cell>
          <table:table-cell table:formula="of:= MAX( [.$H$1] -[.J37];( 1/[.$B$4]) * ( [.$B$5] *[.K98] +[.$B$6]*[.K99]))" office:value-type="float" office:value="20.9693506113621" calcext:value-type="float">
            <text:p>20.9693506113621</text:p>
          </table:table-cell>
          <table:table-cell table:formula="of:= MAX( [.$H$1] -[.K37];( 1/[.$B$4]) * ( [.$B$5] *[.L98] +[.$B$6]*[.L99]))" office:value-type="float" office:value="24.3515736013333" calcext:value-type="float">
            <text:p>24.3515736013333</text:p>
          </table:table-cell>
          <table:table-cell table:formula="of:= MAX( [.$H$1] -[.L37];( 1/[.$B$4]) * ( [.$B$5] *[.M98] +[.$B$6]*[.M99]))" office:value-type="float" office:value="27.6053078918236" calcext:value-type="float">
            <text:p>27.6053078918236</text:p>
          </table:table-cell>
          <table:table-cell table:formula="of:= MAX( [.$H$1] -[.M37];( 1/[.$B$4]) * ( [.$B$5] *[.N98] +[.$B$6]*[.N99]))" office:value-type="float" office:value="30.7354346943743" calcext:value-type="float">
            <text:p>30.7354346943743</text:p>
          </table:table-cell>
          <table:table-cell table:formula="of:= MAX( [.$H$1] -[.N37];( 1/[.$B$4]) * ( [.$B$5] *[.O98] +[.$B$6]*[.O99]))" office:value-type="float" office:value="33.7466497861174" calcext:value-type="float">
            <text:p>33.7466497861174</text:p>
          </table:table-cell>
          <table:table-cell table:formula="of:= MAX( [.$H$1] -[.O37];( 1/[.$B$4]) * ( [.$B$5] *[.P98] +[.$B$6]*[.P99]))" office:value-type="float" office:value="36.6434705543217" calcext:value-type="float">
            <text:p>36.6434705543217</text:p>
          </table:table-cell>
          <table:table-cell table:formula="of:=MAX([.$H$1] - [.P37];0)" office:value-type="float" office:value="39.4302427733204" calcext:value-type="float">
            <text:p>39.43024277332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 MAX( [.$H$1] -[.C38];( 1/[.$B$4]) * ( [.$B$5] *[.D99] +[.$B$6]*[.D100]))" office:value-type="float" office:value="54.8789510274681" calcext:value-type="float">
            <text:p>54.8789510274681</text:p>
          </table:table-cell>
          <table:table-cell table:style-name="ce11" table:formula="of:= MAX( [.$H$1] -[.D38];( 1/[.$B$4]) * ( [.$B$5] *[.E99] +[.$B$6]*[.E100]))" office:value-type="float" office:value="55.9460099753338" calcext:value-type="float">
            <text:p>55.9460099753338</text:p>
          </table:table-cell>
          <table:table-cell table:style-name="ce11" table:formula="of:= MAX( [.$H$1] -[.E38];( 1/[.$B$4]) * ( [.$B$5] *[.F99] +[.$B$6]*[.F100]))" office:value-type="float" office:value="57.223711315779" calcext:value-type="float">
            <text:p>57.223711315779</text:p>
          </table:table-cell>
          <table:table-cell table:style-name="ce12" table:formula="of:=[.$H$1] - [.F14]" office:value-type="float" office:value="6.05103895986599" calcext:value-type="float">
            <text:p>6.05103895986599</text:p>
          </table:table-cell>
          <table:table-cell table:formula="of:= MAX( [.$H$1] -[.G38];( 1/[.$B$4]) * ( [.$B$5] *[.H99] +[.$B$6]*[.H100]))" office:value-type="float" office:value="17.7097881981544" calcext:value-type="float">
            <text:p>17.7097881981544</text:p>
          </table:table-cell>
          <table:table-cell table:formula="of:= MAX( [.$H$1] -[.H38];( 1/[.$B$4]) * ( [.$B$5] *[.I99] +[.$B$6]*[.I100]))" office:value-type="float" office:value="21.0076698825185" calcext:value-type="float">
            <text:p>21.0076698825185</text:p>
          </table:table-cell>
          <table:table-cell table:formula="of:= MAX( [.$H$1] -[.I38];( 1/[.$B$4]) * ( [.$B$5] *[.J99] +[.$B$6]*[.J100]))" office:value-type="float" office:value="24.3515736013333" calcext:value-type="float">
            <text:p>24.3515736013333</text:p>
          </table:table-cell>
          <table:table-cell table:formula="of:= MAX( [.$H$1] -[.J38];( 1/[.$B$4]) * ( [.$B$5] *[.K99] +[.$B$6]*[.K100]))" office:value-type="float" office:value="27.6053078918236" calcext:value-type="float">
            <text:p>27.6053078918236</text:p>
          </table:table-cell>
          <table:table-cell table:formula="of:= MAX( [.$H$1] -[.K38];( 1/[.$B$4]) * ( [.$B$5] *[.L99] +[.$B$6]*[.L100]))" office:value-type="float" office:value="30.7354346943743" calcext:value-type="float">
            <text:p>30.7354346943743</text:p>
          </table:table-cell>
          <table:table-cell table:formula="of:= MAX( [.$H$1] -[.L38];( 1/[.$B$4]) * ( [.$B$5] *[.M99] +[.$B$6]*[.M100]))" office:value-type="float" office:value="33.7466497861174" calcext:value-type="float">
            <text:p>33.7466497861174</text:p>
          </table:table-cell>
          <table:table-cell table:formula="of:= MAX( [.$H$1] -[.M38];( 1/[.$B$4]) * ( [.$B$5] *[.N99] +[.$B$6]*[.N100]))" office:value-type="float" office:value="36.6434705543217" calcext:value-type="float">
            <text:p>36.6434705543217</text:p>
          </table:table-cell>
          <table:table-cell table:formula="of:= MAX( [.$H$1] -[.N38];( 1/[.$B$4]) * ( [.$B$5] *[.O99] +[.$B$6]*[.O100]))" office:value-type="float" office:value="39.4302427733204" calcext:value-type="float">
            <text:p>39.4302427733204</text:p>
          </table:table-cell>
          <table:table-cell table:formula="of:= MAX( [.$H$1] -[.O38];( 1/[.$B$4]) * ( [.$B$5] *[.P99] +[.$B$6]*[.P100]))" office:value-type="float" office:value="42.111147123988" calcext:value-type="float">
            <text:p>42.111147123988</text:p>
          </table:table-cell>
          <table:table-cell table:formula="of:=MAX([.$H$1] - [.P38];0)" office:value-type="float" office:value="44.6902054655452" calcext:value-type="float">
            <text:p>44.6902054655452</text:p>
          </table:table-cell>
          <table:table-cell table:number-columns-repeated="5"/>
        </table:table-row>
        <table:table-row table:style-name="ro1">
          <table:table-cell/>
          <table:table-cell table:formula="of:= MAX( [.$H$1] -[.B39];( 1/[.$B$4]) * ( [.$B$5] *[.C100] +[.$B$6]*[.C101]))" office:value-type="float" office:value="55.9209597540466" calcext:value-type="float">
            <text:p>55.9209597540466</text:p>
          </table:table-cell>
          <table:table-cell table:formula="of:= MAX( [.$H$1] -[.C39];( 1/[.$B$4]) * ( [.$B$5] *[.D100] +[.$B$6]*[.D101]))" office:value-type="float" office:value="56.9687826814757" calcext:value-type="float">
            <text:p>56.9687826814757</text:p>
          </table:table-cell>
          <table:table-cell table:style-name="ce11" table:formula="of:= MAX( [.$H$1] -[.D39];( 1/[.$B$4]) * ( [.$B$5] *[.E100] +[.$B$6]*[.E101]))" office:value-type="float" office:value="57.9986286768212" calcext:value-type="float">
            <text:p>57.9986286768212</text:p>
          </table:table-cell>
          <table:table-cell table:style-name="ce11" table:formula="of:= MAX( [.$H$1] -[.E39];( 1/[.$B$4]) * ( [.$B$5] *[.F100] +[.$B$6]*[.F101]))" office:value-type="float" office:value="58.7886504109973" calcext:value-type="float">
            <text:p>58.7886504109973</text:p>
          </table:table-cell>
          <table:table-cell table:style-name="ce12" table:formula="of:=[.$H$1] - [.F15]" office:value-type="float" office:value="110" calcext:value-type="float">
            <text:p>110</text:p>
          </table:table-cell>
          <table:table-cell table:formula="of:= MAX( [.$H$1] -[.G39];( 1/[.$B$4]) * ( [.$B$5] *[.H100] +[.$B$6]*[.H101]))" office:value-type="float" office:value="24.3515736013333" calcext:value-type="float">
            <text:p>24.3515736013333</text:p>
          </table:table-cell>
          <table:table-cell table:formula="of:= MAX( [.$H$1] -[.H39];( 1/[.$B$4]) * ( [.$B$5] *[.I100] +[.$B$6]*[.I101]))" office:value-type="float" office:value="27.6053078918235" calcext:value-type="float">
            <text:p>27.6053078918235</text:p>
          </table:table-cell>
          <table:table-cell table:formula="of:= MAX( [.$H$1] -[.I39];( 1/[.$B$4]) * ( [.$B$5] *[.J100] +[.$B$6]*[.J101]))" office:value-type="float" office:value="30.7354346943743" calcext:value-type="float">
            <text:p>30.7354346943743</text:p>
          </table:table-cell>
          <table:table-cell table:formula="of:= MAX( [.$H$1] -[.J39];( 1/[.$B$4]) * ( [.$B$5] *[.K100] +[.$B$6]*[.K101]))" office:value-type="float" office:value="33.7466497861174" calcext:value-type="float">
            <text:p>33.7466497861174</text:p>
          </table:table-cell>
          <table:table-cell table:formula="of:= MAX( [.$H$1] -[.K39];( 1/[.$B$4]) * ( [.$B$5] *[.L100] +[.$B$6]*[.L101]))" office:value-type="float" office:value="36.6434705543217" calcext:value-type="float">
            <text:p>36.6434705543217</text:p>
          </table:table-cell>
          <table:table-cell table:formula="of:= MAX( [.$H$1] -[.L39];( 1/[.$B$4]) * ( [.$B$5] *[.M100] +[.$B$6]*[.M101]))" office:value-type="float" office:value="39.4302427733204" calcext:value-type="float">
            <text:p>39.4302427733204</text:p>
          </table:table-cell>
          <table:table-cell table:formula="of:= MAX( [.$H$1] -[.M39];( 1/[.$B$4]) * ( [.$B$5] *[.N100] +[.$B$6]*[.N101]))" office:value-type="float" office:value="42.111147123988" calcext:value-type="float">
            <text:p>42.111147123988</text:p>
          </table:table-cell>
          <table:table-cell table:formula="of:= MAX( [.$H$1] -[.N39];( 1/[.$B$4]) * ( [.$B$5] *[.O100] +[.$B$6]*[.O101]))" office:value-type="float" office:value="44.6902054655452" calcext:value-type="float">
            <text:p>44.6902054655452</text:p>
          </table:table-cell>
          <table:table-cell table:formula="of:= MAX( [.$H$1] -[.O39];( 1/[.$B$4]) * ( [.$B$5] *[.P100] +[.$B$6]*[.P101]))" office:value-type="float" office:value="47.171286869102" calcext:value-type="float">
            <text:p>47.171286869102</text:p>
          </table:table-cell>
          <table:table-cell table:formula="of:=MAX([.$H$1] - [.P39];0)" office:value-type="float" office:value="49.5581134219896" calcext:value-type="float">
            <text:p>49.5581134219896</text:p>
          </table:table-cell>
          <table:table-cell table:number-columns-repeated="5"/>
        </table:table-row>
        <table:table-row table:style-name="ro1">
          <table:table-cell table:formula="of:= MAX( [.$H$1] -[.A40];( 1/[.$B$4]) * ( [.$B$5] *[.B101] +[.$B$6]*[.B102]))" office:value-type="float" office:value="56.9418355286518" calcext:value-type="float">
            <text:p>56.9418355286518</text:p>
          </table:table-cell>
          <table:table-cell table:formula="of:= MAX( [.$H$1] -[.B40];( 1/[.$B$4]) * ( [.$B$5] *[.C101] +[.$B$6]*[.C102]))" office:value-type="float" office:value="57.9698231787853" calcext:value-type="float">
            <text:p>57.9698231787853</text:p>
          </table:table-cell>
          <table:table-cell table:formula="of:= MAX( [.$H$1] -[.C40];( 1/[.$B$4]) * ( [.$B$5] *[.D101] +[.$B$6]*[.D102]))" office:value-type="float" office:value="58.9792393921815" calcext:value-type="float">
            <text:p>58.9792393921815</text:p>
          </table:table-cell>
          <table:table-cell table:style-name="ce11" table:formula="of:= MAX( [.$H$1] -[.D40];( 1/[.$B$4]) * ( [.$B$5] *[.E101] +[.$B$6]*[.E102]))" office:value-type="float" office:value="59.9694951055782" calcext:value-type="float">
            <text:p>59.9694951055782</text:p>
          </table:table-cell>
          <table:table-cell table:style-name="ce11" table:formula="of:= MAX( [.$H$1] -[.E40];( 1/[.$B$4]) * ( [.$B$5] *[.F101] +[.$B$6]*[.F102]))" office:value-type="float" office:value="61.1546937543886" calcext:value-type="float">
            <text:p>61.1546937543886</text:p>
          </table:table-cell>
          <table:table-cell table:style-name="ce12" table:formula="of:=[.$H$1] - [.F16]" office:value-type="float" office:value="13.7989422891965" calcext:value-type="float">
            <text:p>13.7989422891965</text:p>
          </table:table-cell>
          <table:table-cell table:formula="of:= MAX( [.$H$1] -[.G40];( 1/[.$B$4]) * ( [.$B$5] *[.H101] +[.$B$6]*[.H102]))" office:value-type="float" office:value="30.7354346943743" calcext:value-type="float">
            <text:p>30.7354346943743</text:p>
          </table:table-cell>
          <table:table-cell table:formula="of:= MAX( [.$H$1] -[.H40];( 1/[.$B$4]) * ( [.$B$5] *[.I101] +[.$B$6]*[.I102]))" office:value-type="float" office:value="33.7466497861174" calcext:value-type="float">
            <text:p>33.7466497861174</text:p>
          </table:table-cell>
          <table:table-cell table:formula="of:= MAX( [.$H$1] -[.I40];( 1/[.$B$4]) * ( [.$B$5] *[.J101] +[.$B$6]*[.J102]))" office:value-type="float" office:value="36.6434705543217" calcext:value-type="float">
            <text:p>36.6434705543217</text:p>
          </table:table-cell>
          <table:table-cell table:formula="of:= MAX( [.$H$1] -[.J40];( 1/[.$B$4]) * ( [.$B$5] *[.K101] +[.$B$6]*[.K102]))" office:value-type="float" office:value="39.4302427733204" calcext:value-type="float">
            <text:p>39.4302427733204</text:p>
          </table:table-cell>
          <table:table-cell table:formula="of:= MAX( [.$H$1] -[.K40];( 1/[.$B$4]) * ( [.$B$5] *[.L101] +[.$B$6]*[.L102]))" office:value-type="float" office:value="42.111147123988" calcext:value-type="float">
            <text:p>42.111147123988</text:p>
          </table:table-cell>
          <table:table-cell table:formula="of:= MAX( [.$H$1] -[.L40];( 1/[.$B$4]) * ( [.$B$5] *[.M101] +[.$B$6]*[.M102]))" office:value-type="float" office:value="44.6902054655452" calcext:value-type="float">
            <text:p>44.6902054655452</text:p>
          </table:table-cell>
          <table:table-cell table:formula="of:= MAX( [.$H$1] -[.M40];( 1/[.$B$4]) * ( [.$B$5] *[.N101] +[.$B$6]*[.N102]))" office:value-type="float" office:value="47.1712868691019" calcext:value-type="float">
            <text:p>47.1712868691019</text:p>
          </table:table-cell>
          <table:table-cell table:formula="of:= MAX( [.$H$1] -[.N40];( 1/[.$B$4]) * ( [.$B$5] *[.O101] +[.$B$6]*[.O102]))" office:value-type="float" office:value="49.5581134219896" calcext:value-type="float">
            <text:p>49.5581134219896</text:p>
          </table:table-cell>
          <table:table-cell table:formula="of:= MAX( [.$H$1] -[.O40];( 1/[.$B$4]) * ( [.$B$5] *[.P101] +[.$B$6]*[.P102]))" office:value-type="float" office:value="51.8542658115898" calcext:value-type="float">
            <text:p>51.8542658115898</text:p>
          </table:table-cell>
          <table:table-cell table:formula="of:=MAX([.$H$1] - [.P40];0)" office:value-type="float" office:value="54.063188697037" calcext:value-type="float">
            <text:p>54.0631886970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17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18]" office:value-type="float" office:value="20.9693506113621" calcext:value-type="float">
            <text:p>20.9693506113621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19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0]" office:value-type="float" office:value="27.6053078918235" calcext:value-type="float">
            <text:p>27.605307891823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1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2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3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4]" office:value-type="float" office:value="110" calcext:value-type="float">
            <text:p>110</text:p>
          </table:table-cell>
          <table:table-cell table:number-columns-repeated="15"/>
        </table:table-row>
        <table:table-row table:style-name="ro4">
          <table:table-cell table:style-name="ce3" office:value-type="string" calcext:value-type="string">
            <text:p>intrinsic values-put</text:p>
          </table:table-cell>
          <table:table-cell table:number-columns-repeated="2"/>
          <table:table-cell table:style-name="ce11" table:number-columns-repeated="2"/>
          <table:table-cell table:style-name="ce12" table:formula="of:=[.$H$1] - [.F25]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6]" office:value-type="float" office:value="110" calcext:value-type="float">
            <text:p>110</text:p>
          </table:table-cell>
          <table:table-cell table:number-columns-repeated="8"/>
          <table:table-cell table:formula="of:= [.$H$1] - [.O26]" office:value-type="float" office:value="-61.9816619323593" calcext:value-type="float">
            <text:p>-61.981661932359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7]" office:value-type="float" office:value="110" calcext:value-type="float">
            <text:p>110</text:p>
          </table:table-cell>
          <table:table-cell table:number-columns-repeated="7"/>
          <table:table-cell table:formula="of:=[.$H$1] - [.N27]" office:value-type="float" office:value="-55.448177847548" calcext:value-type="float">
            <text:p>-55.448177847548</text:p>
          </table:table-cell>
          <table:table-cell table:formula="of:= [.$H$1] - [.O27]" office:value-type="float" office:value="-49.1628970525925" calcext:value-type="float">
            <text:p>-49.16289705259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8]" office:value-type="float" office:value="110" calcext:value-type="float">
            <text:p>110</text:p>
          </table:table-cell>
          <table:table-cell table:number-columns-repeated="6"/>
          <table:table-cell table:formula="of:=[.$H$1] - [.M28]" office:value-type="float" office:value="-49.1628970525925" calcext:value-type="float">
            <text:p>-49.1628970525925</text:p>
          </table:table-cell>
          <table:table-cell table:formula="of:=[.$H$1] - [.N28]" office:value-type="float" office:value="-43.1163904477514" calcext:value-type="float">
            <text:p>-43.1163904477514</text:p>
          </table:table-cell>
          <table:table-cell table:formula="of:= [.$H$1] - [.O28]" office:value-type="float" office:value="-37.2995871393406" calcext:value-type="float">
            <text:p>-37.29958713934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29]" office:value-type="float" office:value="110" calcext:value-type="float">
            <text:p>110</text:p>
          </table:table-cell>
          <table:table-cell table:number-columns-repeated="5"/>
          <table:table-cell table:formula="of:=[.$H$1] - [.L29]" office:value-type="float" office:value="-43.1163904477514" calcext:value-type="float">
            <text:p>-43.1163904477514</text:p>
          </table:table-cell>
          <table:table-cell table:formula="of:=[.$H$1] - [.M29]" office:value-type="float" office:value="-37.2995871393406" calcext:value-type="float">
            <text:p>-37.2995871393406</text:p>
          </table:table-cell>
          <table:table-cell table:formula="of:=[.$H$1] - [.N29]" office:value-type="float" office:value="-31.7037608316924" calcext:value-type="float">
            <text:p>-31.7037608316924</text:p>
          </table:table-cell>
          <table:table-cell table:formula="of:= [.$H$1] - [.O29]" office:value-type="float" office:value="-26.3205167360754" calcext:value-type="float">
            <text:p>-26.320516736075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0]" office:value-type="float" office:value="110" calcext:value-type="float">
            <text:p>110</text:p>
          </table:table-cell>
          <table:table-cell table:number-columns-repeated="4"/>
          <table:table-cell table:formula="of:=[.$H$1] - [.K30]" office:value-type="float" office:value="-37.2995871393406" calcext:value-type="float">
            <text:p>-37.2995871393406</text:p>
          </table:table-cell>
          <table:table-cell table:formula="of:=[.$H$1] - [.L30]" office:value-type="float" office:value="-31.7037608316924" calcext:value-type="float">
            <text:p>-31.7037608316924</text:p>
          </table:table-cell>
          <table:table-cell table:formula="of:=[.$H$1] - [.M30]" office:value-type="float" office:value="-26.3205167360754" calcext:value-type="float">
            <text:p>-26.3205167360754</text:p>
          </table:table-cell>
          <table:table-cell table:formula="of:=[.$H$1] - [.N30]" office:value-type="float" office:value="-21.1417789769375" calcext:value-type="float">
            <text:p>-21.1417789769375</text:p>
          </table:table-cell>
          <table:table-cell table:formula="of:= [.$H$1] - [.O30]" office:value-type="float" office:value="-16.1597784765781" calcext:value-type="float">
            <text:p>-16.159778476578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1]" office:value-type="float" office:value="110" calcext:value-type="float">
            <text:p>110</text:p>
          </table:table-cell>
          <table:table-cell table:number-columns-repeated="3"/>
          <table:table-cell table:formula="of:=[.$H$1] -[.J31]" office:value-type="float" office:value="-31.7037608316924" calcext:value-type="float">
            <text:p>-31.7037608316924</text:p>
          </table:table-cell>
          <table:table-cell table:formula="of:=[.$H$1] - [.K31]" office:value-type="float" office:value="-26.3205167360754" calcext:value-type="float">
            <text:p>-26.3205167360754</text:p>
          </table:table-cell>
          <table:table-cell table:formula="of:=[.$H$1] - [.L31]" office:value-type="float" office:value="-21.1417789769375" calcext:value-type="float">
            <text:p>-21.1417789769375</text:p>
          </table:table-cell>
          <table:table-cell table:formula="of:=[.$H$1] - [.M31]" office:value-type="float" office:value="-16.1597784765781" calcext:value-type="float">
            <text:p>-16.1597784765781</text:p>
          </table:table-cell>
          <table:table-cell table:formula="of:=[.$H$1] - [.N31]" office:value-type="float" office:value="-11.3670413000748" calcext:value-type="float">
            <text:p>-11.3670413000748</text:p>
          </table:table-cell>
          <table:table-cell table:formula="of:= [.$H$1] - [.O31]" office:value-type="float" office:value="-6.75637744297971" calcext:value-type="float">
            <text:p>-6.7563774429797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2]" office:value-type="float" office:value="110" calcext:value-type="float">
            <text:p>110</text:p>
          </table:table-cell>
          <table:table-cell table:number-columns-repeated="2"/>
          <table:table-cell table:formula="of:=[.$H$1] - [.I32]" office:value-type="float" office:value="-26.3205167360754" calcext:value-type="float">
            <text:p>-26.3205167360754</text:p>
          </table:table-cell>
          <table:table-cell table:formula="of:=[.$H$1] -[.J32]" office:value-type="float" office:value="-21.1417789769375" calcext:value-type="float">
            <text:p>-21.1417789769375</text:p>
          </table:table-cell>
          <table:table-cell table:formula="of:=[.$H$1] - [.K32]" office:value-type="float" office:value="-16.1597784765781" calcext:value-type="float">
            <text:p>-16.1597784765781</text:p>
          </table:table-cell>
          <table:table-cell table:formula="of:=[.$H$1] - [.L32]" office:value-type="float" office:value="-11.3670413000748" calcext:value-type="float">
            <text:p>-11.3670413000748</text:p>
          </table:table-cell>
          <table:table-cell table:formula="of:=[.$H$1] - [.M32]" office:value-type="float" office:value="-6.75637744297971" calcext:value-type="float">
            <text:p>-6.75637744297971</text:p>
          </table:table-cell>
          <table:table-cell table:formula="of:=[.$H$1] - [.N32]" office:value-type="float" office:value="-2.32087004496452" calcext:value-type="float">
            <text:p>-2.32087004496452</text:p>
          </table:table-cell>
          <table:table-cell table:formula="of:= [.$H$1] - [.O32]" office:value-type="float" office:value="1.94613498676704" calcext:value-type="float">
            <text:p>1.946134986767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3]" office:value-type="float" office:value="110" calcext:value-type="float">
            <text:p>110</text:p>
          </table:table-cell>
          <table:table-cell/>
          <table:table-cell table:formula="of:=[.$H$1] - [.H33]" office:value-type="float" office:value="-21.1417789769375" calcext:value-type="float">
            <text:p>-21.1417789769375</text:p>
          </table:table-cell>
          <table:table-cell table:formula="of:=[.$H$1] - [.I33]" office:value-type="float" office:value="-16.1597784765781" calcext:value-type="float">
            <text:p>-16.1597784765781</text:p>
          </table:table-cell>
          <table:table-cell table:formula="of:=[.$H$1] -[.J33]" office:value-type="float" office:value="-11.3670413000748" calcext:value-type="float">
            <text:p>-11.3670413000748</text:p>
          </table:table-cell>
          <table:table-cell table:formula="of:=[.$H$1] - [.K33]" office:value-type="float" office:value="-6.75637744297971" calcext:value-type="float">
            <text:p>-6.75637744297971</text:p>
          </table:table-cell>
          <table:table-cell table:formula="of:=[.$H$1] - [.L33]" office:value-type="float" office:value="-2.32087004496452" calcext:value-type="float">
            <text:p>-2.32087004496452</text:p>
          </table:table-cell>
          <table:table-cell table:formula="of:=[.$H$1] - [.M33]" office:value-type="float" office:value="1.94613498676704" calcext:value-type="float">
            <text:p>1.94613498676704</text:p>
          </table:table-cell>
          <table:table-cell table:formula="of:=[.$H$1] - [.N33]" office:value-type="float" office:value="6.05103895986601" calcext:value-type="float">
            <text:p>6.05103895986601</text:p>
          </table:table-cell>
          <table:table-cell table:formula="of:= [.$H$1] - [.O33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4]" office:value-type="float" office:value="110" calcext:value-type="float">
            <text:p>110</text:p>
          </table:table-cell>
          <table:table-cell table:formula="of:=[.$H$1] - [.G34]" office:value-type="float" office:value="-16.1597784765781" calcext:value-type="float">
            <text:p>-16.1597784765781</text:p>
          </table:table-cell>
          <table:table-cell table:formula="of:=[.$H$1] - [.H34]" office:value-type="float" office:value="-11.3670413000748" calcext:value-type="float">
            <text:p>-11.3670413000748</text:p>
          </table:table-cell>
          <table:table-cell table:formula="of:=[.$H$1] - [.I34]" office:value-type="float" office:value="-6.75637744297971" calcext:value-type="float">
            <text:p>-6.75637744297971</text:p>
          </table:table-cell>
          <table:table-cell table:formula="of:=[.$H$1] -[.J34]" office:value-type="float" office:value="-2.32087004496452" calcext:value-type="float">
            <text:p>-2.32087004496452</text:p>
          </table:table-cell>
          <table:table-cell table:formula="of:=[.$H$1] - [.K34]" office:value-type="float" office:value="1.94613498676704" calcext:value-type="float">
            <text:p>1.94613498676704</text:p>
          </table:table-cell>
          <table:table-cell table:formula="of:=[.$H$1] - [.L34]" office:value-type="float" office:value="6.05103895986601" calcext:value-type="float">
            <text:p>6.05103895986601</text:p>
          </table:table-cell>
          <table:table-cell table:formula="of:=[.$H$1] - [.M34]" office:value-type="float" office:value="10" calcext:value-type="float">
            <text:p>10</text:p>
          </table:table-cell>
          <table:table-cell table:formula="of:=[.$H$1] - [.N34]" office:value-type="float" office:value="13.7989422891965" calcext:value-type="float">
            <text:p>13.7989422891965</text:p>
          </table:table-cell>
          <table:table-cell table:formula="of:= [.$H$1] - [.O34]" office:value-type="float" office:value="17.4535649532265" calcext:value-type="float">
            <text:p>17.45356495322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2" table:formula="of:=[.$H$1] - [.F35]" office:value-type="float" office:value="-11.3670413000748" calcext:value-type="float">
            <text:p>-11.3670413000748</text:p>
          </table:table-cell>
          <table:table-cell table:formula="of:=[.$H$1] - [.G35]" office:value-type="float" office:value="-6.75637744297973" calcext:value-type="float">
            <text:p>-6.75637744297973</text:p>
          </table:table-cell>
          <table:table-cell table:formula="of:=[.$H$1] - [.H35]" office:value-type="float" office:value="-2.32087004496452" calcext:value-type="float">
            <text:p>-2.32087004496452</text:p>
          </table:table-cell>
          <table:table-cell table:formula="of:=[.$H$1] - [.I35]" office:value-type="float" office:value="1.94613498676704" calcext:value-type="float">
            <text:p>1.94613498676704</text:p>
          </table:table-cell>
          <table:table-cell table:formula="of:=[.$H$1] -[.J35]" office:value-type="float" office:value="6.05103895986601" calcext:value-type="float">
            <text:p>6.05103895986601</text:p>
          </table:table-cell>
          <table:table-cell table:formula="of:=[.$H$1] - [.K35]" office:value-type="float" office:value="10" calcext:value-type="float">
            <text:p>10</text:p>
          </table:table-cell>
          <table:table-cell table:formula="of:=[.$H$1] - [.L35]" office:value-type="float" office:value="13.7989422891965" calcext:value-type="float">
            <text:p>13.7989422891965</text:p>
          </table:table-cell>
          <table:table-cell table:formula="of:=[.$H$1] - [.M35]" office:value-type="float" office:value="17.4535649532265" calcext:value-type="float">
            <text:p>17.4535649532265</text:p>
          </table:table-cell>
          <table:table-cell table:formula="of:=[.$H$1] - [.N35]" office:value-type="float" office:value="20.9693506113621" calcext:value-type="float">
            <text:p>20.9693506113621</text:p>
          </table:table-cell>
          <table:table-cell table:formula="of:= [.$H$1] - [.O35]" office:value-type="float" office:value="24.3515736013333" calcext:value-type="float">
            <text:p>24.351573601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/>
          <table:table-cell table:style-name="ce11" table:formula="of:=[.$H$1] -[.E36]" office:value-type="float" office:value="-6.75637744297973" calcext:value-type="float">
            <text:p>-6.75637744297973</text:p>
          </table:table-cell>
          <table:table-cell table:style-name="ce12" table:formula="of:=[.$H$1] - [.F36]" office:value-type="float" office:value="-2.32087004496454" calcext:value-type="float">
            <text:p>-2.32087004496454</text:p>
          </table:table-cell>
          <table:table-cell table:formula="of:=[.$H$1] - [.G36]" office:value-type="float" office:value="1.94613498676704" calcext:value-type="float">
            <text:p>1.94613498676704</text:p>
          </table:table-cell>
          <table:table-cell table:formula="of:=[.$H$1] - [.H36]" office:value-type="float" office:value="6.05103895986601" calcext:value-type="float">
            <text:p>6.05103895986601</text:p>
          </table:table-cell>
          <table:table-cell table:formula="of:=[.$H$1] - [.I36]" office:value-type="float" office:value="10" calcext:value-type="float">
            <text:p>10</text:p>
          </table:table-cell>
          <table:table-cell table:formula="of:=[.$H$1] -[.J36]" office:value-type="float" office:value="13.7989422891965" calcext:value-type="float">
            <text:p>13.7989422891965</text:p>
          </table:table-cell>
          <table:table-cell table:formula="of:=[.$H$1] - [.K36]" office:value-type="float" office:value="17.4535649532265" calcext:value-type="float">
            <text:p>17.4535649532265</text:p>
          </table:table-cell>
          <table:table-cell table:formula="of:=[.$H$1] - [.L36]" office:value-type="float" office:value="20.9693506113621" calcext:value-type="float">
            <text:p>20.9693506113621</text:p>
          </table:table-cell>
          <table:table-cell table:formula="of:=[.$H$1] - [.M36]" office:value-type="float" office:value="24.3515736013333" calcext:value-type="float">
            <text:p>24.3515736013333</text:p>
          </table:table-cell>
          <table:table-cell table:formula="of:=[.$H$1] - [.N36]" office:value-type="float" office:value="27.6053078918236" calcext:value-type="float">
            <text:p>27.6053078918236</text:p>
          </table:table-cell>
          <table:table-cell table:formula="of:= [.$H$1] - [.O36]" office:value-type="float" office:value="30.7354346943743" calcext:value-type="float">
            <text:p>30.73543469437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formula="of:=[.$H$1] - [.D37]" office:value-type="float" office:value="-2.32087004496454" calcext:value-type="float">
            <text:p>-2.32087004496454</text:p>
          </table:table-cell>
          <table:table-cell table:style-name="ce11" table:formula="of:=[.$H$1] -[.E37]" office:value-type="float" office:value="1.94613498676702" calcext:value-type="float">
            <text:p>1.94613498676702</text:p>
          </table:table-cell>
          <table:table-cell table:style-name="ce12" table:formula="of:=[.$H$1] - [.F37]" office:value-type="float" office:value="6.05103895986601" calcext:value-type="float">
            <text:p>6.05103895986601</text:p>
          </table:table-cell>
          <table:table-cell table:formula="of:=[.$H$1] - [.G37]" office:value-type="float" office:value="10" calcext:value-type="float">
            <text:p>10</text:p>
          </table:table-cell>
          <table:table-cell table:formula="of:=[.$H$1] - [.H37]" office:value-type="float" office:value="13.7989422891965" calcext:value-type="float">
            <text:p>13.7989422891965</text:p>
          </table:table-cell>
          <table:table-cell table:formula="of:=[.$H$1] - [.I37]" office:value-type="float" office:value="17.4535649532265" calcext:value-type="float">
            <text:p>17.4535649532265</text:p>
          </table:table-cell>
          <table:table-cell table:formula="of:=[.$H$1] -[.J37]" office:value-type="float" office:value="20.9693506113621" calcext:value-type="float">
            <text:p>20.9693506113621</text:p>
          </table:table-cell>
          <table:table-cell table:formula="of:=[.$H$1] - [.K37]" office:value-type="float" office:value="24.3515736013333" calcext:value-type="float">
            <text:p>24.3515736013333</text:p>
          </table:table-cell>
          <table:table-cell table:formula="of:=[.$H$1] - [.L37]" office:value-type="float" office:value="27.6053078918236" calcext:value-type="float">
            <text:p>27.6053078918236</text:p>
          </table:table-cell>
          <table:table-cell table:formula="of:=[.$H$1] - [.M37]" office:value-type="float" office:value="30.7354346943743" calcext:value-type="float">
            <text:p>30.7354346943743</text:p>
          </table:table-cell>
          <table:table-cell table:formula="of:=[.$H$1] - [.N37]" office:value-type="float" office:value="33.7466497861174" calcext:value-type="float">
            <text:p>33.7466497861174</text:p>
          </table:table-cell>
          <table:table-cell table:formula="of:= [.$H$1] - [.O37]" office:value-type="float" office:value="36.6434705543217" calcext:value-type="float">
            <text:p>36.64347055432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 - [.C38]" office:value-type="float" office:value="1.94613498676702" calcext:value-type="float">
            <text:p>1.94613498676702</text:p>
          </table:table-cell>
          <table:table-cell table:style-name="ce11" table:formula="of:=[.$H$1] - [.D38]" office:value-type="float" office:value="6.05103895986599" calcext:value-type="float">
            <text:p>6.05103895986599</text:p>
          </table:table-cell>
          <table:table-cell table:style-name="ce11" table:formula="of:=[.$H$1] -[.E38]" office:value-type="float" office:value="10" calcext:value-type="float">
            <text:p>10</text:p>
          </table:table-cell>
          <table:table-cell table:style-name="ce12" table:formula="of:=[.$H$1] - [.F38]" office:value-type="float" office:value="13.7989422891965" calcext:value-type="float">
            <text:p>13.7989422891965</text:p>
          </table:table-cell>
          <table:table-cell table:formula="of:=[.$H$1] - [.G38]" office:value-type="float" office:value="17.4535649532265" calcext:value-type="float">
            <text:p>17.4535649532265</text:p>
          </table:table-cell>
          <table:table-cell table:formula="of:=[.$H$1] - [.H38]" office:value-type="float" office:value="20.9693506113621" calcext:value-type="float">
            <text:p>20.9693506113621</text:p>
          </table:table-cell>
          <table:table-cell table:formula="of:=[.$H$1] - [.I38]" office:value-type="float" office:value="24.3515736013333" calcext:value-type="float">
            <text:p>24.3515736013333</text:p>
          </table:table-cell>
          <table:table-cell table:formula="of:=[.$H$1] -[.J38]" office:value-type="float" office:value="27.6053078918236" calcext:value-type="float">
            <text:p>27.6053078918236</text:p>
          </table:table-cell>
          <table:table-cell table:formula="of:=[.$H$1] - [.K38]" office:value-type="float" office:value="30.7354346943743" calcext:value-type="float">
            <text:p>30.7354346943743</text:p>
          </table:table-cell>
          <table:table-cell table:formula="of:=[.$H$1] - [.L38]" office:value-type="float" office:value="33.7466497861174" calcext:value-type="float">
            <text:p>33.7466497861174</text:p>
          </table:table-cell>
          <table:table-cell table:formula="of:=[.$H$1] - [.M38]" office:value-type="float" office:value="36.6434705543217" calcext:value-type="float">
            <text:p>36.6434705543217</text:p>
          </table:table-cell>
          <table:table-cell table:formula="of:=[.$H$1] - [.N38]" office:value-type="float" office:value="39.4302427733204" calcext:value-type="float">
            <text:p>39.4302427733204</text:p>
          </table:table-cell>
          <table:table-cell table:formula="of:= [.$H$1] - [.O38]" office:value-type="float" office:value="42.111147123988" calcext:value-type="float">
            <text:p>42.111147123988</text:p>
          </table:table-cell>
          <table:table-cell table:number-columns-repeated="6"/>
        </table:table-row>
        <table:table-row table:style-name="ro1">
          <table:table-cell/>
          <table:table-cell table:formula="of:=[.$H$1] - [.B39]" office:value-type="float" office:value="6.05103895986599" calcext:value-type="float">
            <text:p>6.05103895986599</text:p>
          </table:table-cell>
          <table:table-cell table:formula="of:=[.$H$1] - [.C39]" office:value-type="float" office:value="10" calcext:value-type="float">
            <text:p>10</text:p>
          </table:table-cell>
          <table:table-cell table:style-name="ce11" table:formula="of:=[.$H$1] - [.D39]" office:value-type="float" office:value="13.7989422891965" calcext:value-type="float">
            <text:p>13.7989422891965</text:p>
          </table:table-cell>
          <table:table-cell table:style-name="ce11" table:formula="of:=[.$H$1] -[.E39]" office:value-type="float" office:value="17.4535649532265" calcext:value-type="float">
            <text:p>17.4535649532265</text:p>
          </table:table-cell>
          <table:table-cell table:style-name="ce12" table:formula="of:=[.$H$1] - [.F39]" office:value-type="float" office:value="20.9693506113621" calcext:value-type="float">
            <text:p>20.9693506113621</text:p>
          </table:table-cell>
          <table:table-cell table:formula="of:=[.$H$1] - [.G39]" office:value-type="float" office:value="24.3515736013333" calcext:value-type="float">
            <text:p>24.3515736013333</text:p>
          </table:table-cell>
          <table:table-cell table:formula="of:=[.$H$1] - [.H39]" office:value-type="float" office:value="27.6053078918235" calcext:value-type="float">
            <text:p>27.6053078918235</text:p>
          </table:table-cell>
          <table:table-cell table:formula="of:=[.$H$1] - [.I39]" office:value-type="float" office:value="30.7354346943743" calcext:value-type="float">
            <text:p>30.7354346943743</text:p>
          </table:table-cell>
          <table:table-cell table:formula="of:=[.$H$1] -[.J39]" office:value-type="float" office:value="33.7466497861174" calcext:value-type="float">
            <text:p>33.7466497861174</text:p>
          </table:table-cell>
          <table:table-cell table:formula="of:=[.$H$1] - [.K39]" office:value-type="float" office:value="36.6434705543217" calcext:value-type="float">
            <text:p>36.6434705543217</text:p>
          </table:table-cell>
          <table:table-cell table:formula="of:=[.$H$1] - [.L39]" office:value-type="float" office:value="39.4302427733204" calcext:value-type="float">
            <text:p>39.4302427733204</text:p>
          </table:table-cell>
          <table:table-cell table:formula="of:=[.$H$1] - [.M39]" office:value-type="float" office:value="42.111147123988" calcext:value-type="float">
            <text:p>42.111147123988</text:p>
          </table:table-cell>
          <table:table-cell table:formula="of:=[.$H$1] - [.N39]" office:value-type="float" office:value="44.6902054655452" calcext:value-type="float">
            <text:p>44.6902054655452</text:p>
          </table:table-cell>
          <table:table-cell table:formula="of:= [.$H$1] - [.O39]" office:value-type="float" office:value="47.171286869102" calcext:value-type="float">
            <text:p>47.171286869102</text:p>
          </table:table-cell>
          <table:table-cell table:number-columns-repeated="6"/>
        </table:table-row>
        <table:table-row table:style-name="ro1">
          <table:table-cell table:formula="of:=[.$H$1] - [.A40]" office:value-type="float" office:value="10" calcext:value-type="float">
            <text:p>10</text:p>
          </table:table-cell>
          <table:table-cell table:formula="of:=[.$H$1] - [.B40]" office:value-type="float" office:value="13.7989422891965" calcext:value-type="float">
            <text:p>13.7989422891965</text:p>
          </table:table-cell>
          <table:table-cell table:formula="of:=[.$H$1] - [.C40]" office:value-type="float" office:value="17.4535649532265" calcext:value-type="float">
            <text:p>17.4535649532265</text:p>
          </table:table-cell>
          <table:table-cell table:style-name="ce11" table:formula="of:=[.$H$1] - [.D40]" office:value-type="float" office:value="20.9693506113621" calcext:value-type="float">
            <text:p>20.9693506113621</text:p>
          </table:table-cell>
          <table:table-cell table:style-name="ce11" table:formula="of:=[.$H$1] -[.E40]" office:value-type="float" office:value="24.3515736013333" calcext:value-type="float">
            <text:p>24.3515736013333</text:p>
          </table:table-cell>
          <table:table-cell table:style-name="ce12" table:formula="of:=[.$H$1] - [.F40]" office:value-type="float" office:value="27.6053078918235" calcext:value-type="float">
            <text:p>27.6053078918235</text:p>
          </table:table-cell>
          <table:table-cell table:formula="of:=[.$H$1] - [.G40]" office:value-type="float" office:value="30.7354346943743" calcext:value-type="float">
            <text:p>30.7354346943743</text:p>
          </table:table-cell>
          <table:table-cell table:formula="of:=[.$H$1] - [.H40]" office:value-type="float" office:value="33.7466497861174" calcext:value-type="float">
            <text:p>33.7466497861174</text:p>
          </table:table-cell>
          <table:table-cell table:formula="of:=[.$H$1] - [.I40]" office:value-type="float" office:value="36.6434705543217" calcext:value-type="float">
            <text:p>36.6434705543217</text:p>
          </table:table-cell>
          <table:table-cell table:formula="of:=[.$H$1] -[.J40]" office:value-type="float" office:value="39.4302427733204" calcext:value-type="float">
            <text:p>39.4302427733204</text:p>
          </table:table-cell>
          <table:table-cell table:formula="of:=[.$H$1] - [.K40]" office:value-type="float" office:value="42.111147123988" calcext:value-type="float">
            <text:p>42.111147123988</text:p>
          </table:table-cell>
          <table:table-cell table:formula="of:=[.$H$1] - [.L40]" office:value-type="float" office:value="44.6902054655452" calcext:value-type="float">
            <text:p>44.6902054655452</text:p>
          </table:table-cell>
          <table:table-cell table:formula="of:=[.$H$1] - [.M40]" office:value-type="float" office:value="47.1712868691019" calcext:value-type="float">
            <text:p>47.1712868691019</text:p>
          </table:table-cell>
          <table:table-cell table:formula="of:=[.$H$1] - [.N40]" office:value-type="float" office:value="49.5581134219896" calcext:value-type="float">
            <text:p>49.5581134219896</text:p>
          </table:table-cell>
          <table:table-cell table:formula="of:= [.$H$1] - [.O40]" office:value-type="float" office:value="51.8542658115898" calcext:value-type="float">
            <text:p>51.854265811589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 calcext:value-type="string">
            <text:p>Future price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formula="of:=[.A25]*EXP(([.$E$3]-[.$E$5])*([.$E$1]/ [.$E$2])*(15 - 15))" office:value-type="float" office:value="0" calcext:value-type="float">
            <text:p>0</text:p>
          </table:table-cell>
          <table:table-cell table:formula="of:=[.B25]*EXP(([.$E$3]-[.$E$5])*([.$E$1]/ [.$E$2])*(15 - 15))" office:value-type="float" office:value="0" calcext:value-type="float">
            <text:p>0</text:p>
          </table:table-cell>
          <table:table-cell table:formula="of:=[.C25]*EXP(([.$E$3]-[.$E$5])*([.$E$1]/ [.$E$2])*(15 - 15))" office:value-type="float" office:value="0" calcext:value-type="float">
            <text:p>0</text:p>
          </table:table-cell>
          <table:table-cell table:formula="of:=[.D25]*EXP(([.$E$3]-[.$E$5])*([.$E$1]/ [.$E$2])*(15 - 15))" office:value-type="float" office:value="0" calcext:value-type="float">
            <text:p>0</text:p>
          </table:table-cell>
          <table:table-cell table:formula="of:=[.E25]*EXP(([.$E$3]-[.$E$5])*([.$E$1]/ [.$E$2])*(15 - 15))" office:value-type="float" office:value="0" calcext:value-type="float">
            <text:p>0</text:p>
          </table:table-cell>
          <table:table-cell table:formula="of:=[.F25]*EXP(([.$E$3]-[.$E$5])*([.$E$1]/ [.$E$2])*(15 - 15))" office:value-type="float" office:value="0" calcext:value-type="float">
            <text:p>0</text:p>
          </table:table-cell>
          <table:table-cell table:formula="of:=[.G25]*EXP(([.$E$3]-[.$E$5])*([.$E$1]/ [.$E$2])*(15 - 15))" office:value-type="float" office:value="0" calcext:value-type="float">
            <text:p>0</text:p>
          </table:table-cell>
          <table:table-cell table:formula="of:=[.H25]*EXP(([.$E$3]-[.$E$5])*([.$E$1]/ [.$E$2])*(15 - 15))" office:value-type="float" office:value="0" calcext:value-type="float">
            <text:p>0</text:p>
          </table:table-cell>
          <table:table-cell table:formula="of:=[.I25]*EXP(([.$E$3]-[.$E$5])*([.$E$1]/ [.$E$2])*(15 - 15))" office:value-type="float" office:value="0" calcext:value-type="float">
            <text:p>0</text:p>
          </table:table-cell>
          <table:table-cell table:formula="of:=[.J25]*EXP(([.$E$3]-[.$E$5])*([.$E$1]/ [.$E$2])*(15 - 15))" office:value-type="float" office:value="0" calcext:value-type="float">
            <text:p>0</text:p>
          </table:table-cell>
          <table:table-cell table:formula="of:=[.K25]*EXP(([.$E$3]-[.$E$5])*([.$E$1]/ [.$E$2])*(15 - 15))" office:value-type="float" office:value="0" calcext:value-type="float">
            <text:p>0</text:p>
          </table:table-cell>
          <table:table-cell table:formula="of:=[.L25]*EXP(([.$E$3]-[.$E$5])*([.$E$1]/ [.$E$2])*(15 - 15))" office:value-type="float" office:value="0" calcext:value-type="float">
            <text:p>0</text:p>
          </table:table-cell>
          <table:table-cell table:formula="of:=[.M25]*EXP(([.$E$3]-[.$E$5])*([.$E$1]/ [.$E$2])*(15 - 15))" office:value-type="float" office:value="0" calcext:value-type="float">
            <text:p>0</text:p>
          </table:table-cell>
          <table:table-cell table:formula="of:=[.N25]*EXP(([.$E$3]-[.$E$5])*([.$E$1]/ [.$E$2])*(15 - 15))" office:value-type="float" office:value="0" calcext:value-type="float">
            <text:p>0</text:p>
          </table:table-cell>
          <table:table-cell table:formula="of:=[.O25]*EXP(([.$E$3]-[.$E$5])*([.$E$1]/ [.$E$2])*(15 - 15))" office:value-type="float" office:value="0" calcext:value-type="float">
            <text:p>0</text:p>
          </table:table-cell>
          <table:table-cell table:formula="of:=[.P25]*EXP(([.$E$3]-[.$E$5])*([.$E$1]/ [.$E$2])*(15 - 15))" office:value-type="float" office:value="178.773150758243" calcext:value-type="float">
            <text:p>178.773150758243</text:p>
          </table:table-cell>
          <table:table-cell table:number-columns-repeated="5"/>
        </table:table-row>
        <table:table-row table:style-name="ro1">
          <table:table-cell table:formula="of:=[.A26]*EXP(([.$E$3]-[.$E$5])*([.$E$1]/ [.$E$2])*(15 - 15))" office:value-type="string" office:string-value="" calcext:value-type="error">
            <text:p>#VALUE!</text:p>
          </table:table-cell>
          <table:table-cell table:formula="of:=[.B26]*EXP(([.$E$3]-[.$E$5])*([.$E$1]/ [.$E$2])*(15 - 15))" office:value-type="float" office:value="0" calcext:value-type="float">
            <text:p>0</text:p>
          </table:table-cell>
          <table:table-cell table:formula="of:=[.C26]*EXP(([.$E$3]-[.$E$5])*([.$E$1]/ [.$E$2])*(15 - 15))" office:value-type="float" office:value="0" calcext:value-type="float">
            <text:p>0</text:p>
          </table:table-cell>
          <table:table-cell table:formula="of:=[.D26]*EXP(([.$E$3]-[.$E$5])*([.$E$1]/ [.$E$2])*(15 - 15))" office:value-type="float" office:value="0" calcext:value-type="float">
            <text:p>0</text:p>
          </table:table-cell>
          <table:table-cell table:formula="of:=[.E26]*EXP(([.$E$3]-[.$E$5])*([.$E$1]/ [.$E$2])*(15 - 15))" office:value-type="float" office:value="0" calcext:value-type="float">
            <text:p>0</text:p>
          </table:table-cell>
          <table:table-cell table:formula="of:=[.F26]*EXP(([.$E$3]-[.$E$5])*([.$E$1]/ [.$E$2])*(15 - 15))" office:value-type="float" office:value="0" calcext:value-type="float">
            <text:p>0</text:p>
          </table:table-cell>
          <table:table-cell table:formula="of:=[.G26]*EXP(([.$E$3]-[.$E$5])*([.$E$1]/ [.$E$2])*(15 - 15))" office:value-type="float" office:value="0" calcext:value-type="float">
            <text:p>0</text:p>
          </table:table-cell>
          <table:table-cell table:formula="of:=[.H26]*EXP(([.$E$3]-[.$E$5])*([.$E$1]/ [.$E$2])*(15 - 15))" office:value-type="float" office:value="0" calcext:value-type="float">
            <text:p>0</text:p>
          </table:table-cell>
          <table:table-cell table:formula="of:=[.I26]*EXP(([.$E$3]-[.$E$5])*([.$E$1]/ [.$E$2])*(15 - 15))" office:value-type="float" office:value="0" calcext:value-type="float">
            <text:p>0</text:p>
          </table:table-cell>
          <table:table-cell table:formula="of:=[.J26]*EXP(([.$E$3]-[.$E$5])*([.$E$1]/ [.$E$2])*(15 - 15))" office:value-type="float" office:value="0" calcext:value-type="float">
            <text:p>0</text:p>
          </table:table-cell>
          <table:table-cell table:formula="of:=[.K26]*EXP(([.$E$3]-[.$E$5])*([.$E$1]/ [.$E$2])*(15 - 15))" office:value-type="float" office:value="0" calcext:value-type="float">
            <text:p>0</text:p>
          </table:table-cell>
          <table:table-cell table:formula="of:=[.L26]*EXP(([.$E$3]-[.$E$5])*([.$E$1]/ [.$E$2])*(15 - 15))" office:value-type="float" office:value="0" calcext:value-type="float">
            <text:p>0</text:p>
          </table:table-cell>
          <table:table-cell table:formula="of:=[.M26]*EXP(([.$E$3]-[.$E$5])*([.$E$1]/ [.$E$2])*(15 - 15))" office:value-type="float" office:value="0" calcext:value-type="float">
            <text:p>0</text:p>
          </table:table-cell>
          <table:table-cell table:formula="of:=[.N26]*EXP(([.$E$3]-[.$E$5])*([.$E$1]/ [.$E$2])*(15 - 15))" office:value-type="float" office:value="0" calcext:value-type="float">
            <text:p>0</text:p>
          </table:table-cell>
          <table:table-cell table:formula="of:=[.O26]*EXP(([.$E$3]-[.$E$5])*([.$E$1]/ [.$E$2])*(15 - 14))" office:value-type="float" office:value="172.010327931448" calcext:value-type="float">
            <text:p>172.010327931448</text:p>
          </table:table-cell>
          <table:table-cell table:formula="of:=[.P26]*EXP(([.$E$3]-[.$E$5])*([.$E$1]/ [.$E$2])*(15 - 15))" office:value-type="float" office:value="165.448177847548" calcext:value-type="float">
            <text:p>165.448177847548</text:p>
          </table:table-cell>
          <table:table-cell table:number-columns-repeated="5"/>
        </table:table-row>
        <table:table-row table:style-name="ro1">
          <table:table-cell table:formula="of:=[.A27]*EXP(([.$E$3]-[.$E$5])*([.$E$1]/ [.$E$2])*(15 - 15))" office:value-type="float" office:value="0" calcext:value-type="float">
            <text:p>0</text:p>
          </table:table-cell>
          <table:table-cell table:formula="of:=[.B27]*EXP(([.$E$3]-[.$E$5])*([.$E$1]/ [.$E$2])*(15 - 15))" office:value-type="float" office:value="0" calcext:value-type="float">
            <text:p>0</text:p>
          </table:table-cell>
          <table:table-cell table:formula="of:=[.C27]*EXP(([.$E$3]-[.$E$5])*([.$E$1]/ [.$E$2])*(15 - 15))" office:value-type="float" office:value="0" calcext:value-type="float">
            <text:p>0</text:p>
          </table:table-cell>
          <table:table-cell table:formula="of:=[.D27]*EXP(([.$E$3]-[.$E$5])*([.$E$1]/ [.$E$2])*(15 - 15))" office:value-type="float" office:value="0" calcext:value-type="float">
            <text:p>0</text:p>
          </table:table-cell>
          <table:table-cell table:formula="of:=[.E27]*EXP(([.$E$3]-[.$E$5])*([.$E$1]/ [.$E$2])*(15 - 15))" office:value-type="float" office:value="0" calcext:value-type="float">
            <text:p>0</text:p>
          </table:table-cell>
          <table:table-cell table:formula="of:=[.F27]*EXP(([.$E$3]-[.$E$5])*([.$E$1]/ [.$E$2])*(15 - 15))" office:value-type="float" office:value="0" calcext:value-type="float">
            <text:p>0</text:p>
          </table:table-cell>
          <table:table-cell table:formula="of:=[.G27]*EXP(([.$E$3]-[.$E$5])*([.$E$1]/ [.$E$2])*(15 - 15))" office:value-type="float" office:value="0" calcext:value-type="float">
            <text:p>0</text:p>
          </table:table-cell>
          <table:table-cell table:formula="of:=[.H27]*EXP(([.$E$3]-[.$E$5])*([.$E$1]/ [.$E$2])*(15 - 15))" office:value-type="float" office:value="0" calcext:value-type="float">
            <text:p>0</text:p>
          </table:table-cell>
          <table:table-cell table:formula="of:=[.I27]*EXP(([.$E$3]-[.$E$5])*([.$E$1]/ [.$E$2])*(15 - 15))" office:value-type="float" office:value="0" calcext:value-type="float">
            <text:p>0</text:p>
          </table:table-cell>
          <table:table-cell table:formula="of:=[.J27]*EXP(([.$E$3]-[.$E$5])*([.$E$1]/ [.$E$2])*(15 - 15))" office:value-type="float" office:value="0" calcext:value-type="float">
            <text:p>0</text:p>
          </table:table-cell>
          <table:table-cell table:formula="of:=[.K27]*EXP(([.$E$3]-[.$E$5])*([.$E$1]/ [.$E$2])*(15 - 15))" office:value-type="float" office:value="0" calcext:value-type="float">
            <text:p>0</text:p>
          </table:table-cell>
          <table:table-cell table:formula="of:=[.L27]*EXP(([.$E$3]-[.$E$5])*([.$E$1]/ [.$E$2])*(15 - 15))" office:value-type="float" office:value="0" calcext:value-type="float">
            <text:p>0</text:p>
          </table:table-cell>
          <table:table-cell table:formula="of:=[.M27]*EXP(([.$E$3]-[.$E$5])*([.$E$1]/ [.$E$2])*(15 - 15))" office:value-type="float" office:value="0" calcext:value-type="float">
            <text:p>0</text:p>
          </table:table-cell>
          <table:table-cell table:formula="of:=[.N27]*EXP(([.$E$3]-[.$E$5])*([.$E$1]/ [.$E$2])*(15 - 13))" office:value-type="float" office:value="165.503336432751" calcext:value-type="float">
            <text:p>165.503336432751</text:p>
          </table:table-cell>
          <table:table-cell table:formula="of:=[.O27]*EXP(([.$E$3]-[.$E$5])*([.$E$1]/ [.$E$2])*(15 - 14))" office:value-type="float" office:value="159.18942641282" calcext:value-type="float">
            <text:p>159.18942641282</text:p>
          </table:table-cell>
          <table:table-cell table:formula="of:=[.P27]*EXP(([.$E$3]-[.$E$5])*([.$E$1]/ [.$E$2])*(15 - 15))" office:value-type="float" office:value="153.116390447751" calcext:value-type="float">
            <text:p>153.116390447751</text:p>
          </table:table-cell>
          <table:table-cell table:number-columns-repeated="5"/>
        </table:table-row>
        <table:table-row table:style-name="ro1">
          <table:table-cell table:formula="of:=[.A28]*EXP(([.$E$3]-[.$E$5])*([.$E$1]/ [.$E$2])*(15 - 15))" office:value-type="float" office:value="0" calcext:value-type="float">
            <text:p>0</text:p>
          </table:table-cell>
          <table:table-cell table:formula="of:=[.B28]*EXP(([.$E$3]-[.$E$5])*([.$E$1]/ [.$E$2])*(15 - 15))" office:value-type="float" office:value="0" calcext:value-type="float">
            <text:p>0</text:p>
          </table:table-cell>
          <table:table-cell table:formula="of:=[.C28]*EXP(([.$E$3]-[.$E$5])*([.$E$1]/ [.$E$2])*(15 - 15))" office:value-type="float" office:value="0" calcext:value-type="float">
            <text:p>0</text:p>
          </table:table-cell>
          <table:table-cell table:formula="of:=[.D28]*EXP(([.$E$3]-[.$E$5])*([.$E$1]/ [.$E$2])*(15 - 15))" office:value-type="float" office:value="0" calcext:value-type="float">
            <text:p>0</text:p>
          </table:table-cell>
          <table:table-cell table:formula="of:=[.E28]*EXP(([.$E$3]-[.$E$5])*([.$E$1]/ [.$E$2])*(15 - 15))" office:value-type="float" office:value="0" calcext:value-type="float">
            <text:p>0</text:p>
          </table:table-cell>
          <table:table-cell table:formula="of:=[.F28]*EXP(([.$E$3]-[.$E$5])*([.$E$1]/ [.$E$2])*(15 - 15))" office:value-type="float" office:value="0" calcext:value-type="float">
            <text:p>0</text:p>
          </table:table-cell>
          <table:table-cell table:formula="of:=[.G28]*EXP(([.$E$3]-[.$E$5])*([.$E$1]/ [.$E$2])*(15 - 15))" office:value-type="float" office:value="0" calcext:value-type="float">
            <text:p>0</text:p>
          </table:table-cell>
          <table:table-cell table:formula="of:=[.H28]*EXP(([.$E$3]-[.$E$5])*([.$E$1]/ [.$E$2])*(15 - 15))" office:value-type="float" office:value="0" calcext:value-type="float">
            <text:p>0</text:p>
          </table:table-cell>
          <table:table-cell table:formula="of:=[.I28]*EXP(([.$E$3]-[.$E$5])*([.$E$1]/ [.$E$2])*(15 - 15))" office:value-type="float" office:value="0" calcext:value-type="float">
            <text:p>0</text:p>
          </table:table-cell>
          <table:table-cell table:formula="of:=[.J28]*EXP(([.$E$3]-[.$E$5])*([.$E$1]/ [.$E$2])*(15 - 15))" office:value-type="float" office:value="0" calcext:value-type="float">
            <text:p>0</text:p>
          </table:table-cell>
          <table:table-cell table:formula="of:=[.K28]*EXP(([.$E$3]-[.$E$5])*([.$E$1]/ [.$E$2])*(15 - 15))" office:value-type="float" office:value="0" calcext:value-type="float">
            <text:p>0</text:p>
          </table:table-cell>
          <table:table-cell table:formula="of:=[.L28]*EXP(([.$E$3]-[.$E$5])*([.$E$1]/ [.$E$2])*(15 - 15))" office:value-type="float" office:value="0" calcext:value-type="float">
            <text:p>0</text:p>
          </table:table-cell>
          <table:table-cell table:formula="of:=[.M28]*EXP(([.$E$3]-[.$E$5])*([.$E$1]/ [.$E$2])*(15 - 12))" office:value-type="float" office:value="159.242498399797" calcext:value-type="float">
            <text:p>159.242498399797</text:p>
          </table:table-cell>
          <table:table-cell table:formula="of:=[.N28]*EXP(([.$E$3]-[.$E$5])*([.$E$1]/ [.$E$2])*(15 - 13))" office:value-type="float" office:value="153.167437751979" calcext:value-type="float">
            <text:p>153.167437751979</text:p>
          </table:table-cell>
          <table:table-cell table:formula="of:=[.O28]*EXP(([.$E$3]-[.$E$5])*([.$E$1]/ [.$E$2])*(15 - 14))" office:value-type="float" office:value="147.324139116472" calcext:value-type="float">
            <text:p>147.324139116472</text:p>
          </table:table-cell>
          <table:table-cell table:formula="of:=[.P28]*EXP(([.$E$3]-[.$E$5])*([.$E$1]/ [.$E$2])*(15 - 15))" office:value-type="float" office:value="141.703760831692" calcext:value-type="float">
            <text:p>141.703760831692</text:p>
          </table:table-cell>
          <table:table-cell table:number-columns-repeated="5"/>
        </table:table-row>
        <table:table-row table:style-name="ro1">
          <table:table-cell table:formula="of:=[.A29]*EXP(([.$E$3]-[.$E$5])*([.$E$1]/ [.$E$2])*(15 - 15))" office:value-type="float" office:value="0" calcext:value-type="float">
            <text:p>0</text:p>
          </table:table-cell>
          <table:table-cell table:formula="of:=[.B29]*EXP(([.$E$3]-[.$E$5])*([.$E$1]/ [.$E$2])*(15 - 15))" office:value-type="float" office:value="0" calcext:value-type="float">
            <text:p>0</text:p>
          </table:table-cell>
          <table:table-cell table:formula="of:=[.C29]*EXP(([.$E$3]-[.$E$5])*([.$E$1]/ [.$E$2])*(15 - 15))" office:value-type="float" office:value="0" calcext:value-type="float">
            <text:p>0</text:p>
          </table:table-cell>
          <table:table-cell table:formula="of:=[.D29]*EXP(([.$E$3]-[.$E$5])*([.$E$1]/ [.$E$2])*(15 - 15))" office:value-type="float" office:value="0" calcext:value-type="float">
            <text:p>0</text:p>
          </table:table-cell>
          <table:table-cell table:formula="of:=[.E29]*EXP(([.$E$3]-[.$E$5])*([.$E$1]/ [.$E$2])*(15 - 15))" office:value-type="float" office:value="0" calcext:value-type="float">
            <text:p>0</text:p>
          </table:table-cell>
          <table:table-cell table:formula="of:=[.F29]*EXP(([.$E$3]-[.$E$5])*([.$E$1]/ [.$E$2])*(15 - 15))" office:value-type="float" office:value="0" calcext:value-type="float">
            <text:p>0</text:p>
          </table:table-cell>
          <table:table-cell table:formula="of:=[.G29]*EXP(([.$E$3]-[.$E$5])*([.$E$1]/ [.$E$2])*(15 - 15))" office:value-type="float" office:value="0" calcext:value-type="float">
            <text:p>0</text:p>
          </table:table-cell>
          <table:table-cell table:formula="of:=[.H29]*EXP(([.$E$3]-[.$E$5])*([.$E$1]/ [.$E$2])*(15 - 15))" office:value-type="float" office:value="0" calcext:value-type="float">
            <text:p>0</text:p>
          </table:table-cell>
          <table:table-cell table:formula="of:=[.I29]*EXP(([.$E$3]-[.$E$5])*([.$E$1]/ [.$E$2])*(15 - 15))" office:value-type="float" office:value="0" calcext:value-type="float">
            <text:p>0</text:p>
          </table:table-cell>
          <table:table-cell table:formula="of:=[.J29]*EXP(([.$E$3]-[.$E$5])*([.$E$1]/ [.$E$2])*(15 - 15))" office:value-type="float" office:value="0" calcext:value-type="float">
            <text:p>0</text:p>
          </table:table-cell>
          <table:table-cell table:formula="of:=[.K29]*EXP(([.$E$3]-[.$E$5])*([.$E$1]/ [.$E$2])*(15 - 15))" office:value-type="float" office:value="0" calcext:value-type="float">
            <text:p>0</text:p>
          </table:table-cell>
          <table:table-cell table:formula="of:=[.L29]*EXP(([.$E$3]-[.$E$5])*([.$E$1]/ [.$E$2])*(15 - 11))" office:value-type="float" office:value="153.21850207481" calcext:value-type="float">
            <text:p>153.21850207481</text:p>
          </table:table-cell>
          <table:table-cell table:formula="of:=[.M29]*EXP(([.$E$3]-[.$E$5])*([.$E$1]/ [.$E$2])*(15 - 12))" office:value-type="float" office:value="147.373255348428" calcext:value-type="float">
            <text:p>147.373255348428</text:p>
          </table:table-cell>
          <table:table-cell table:formula="of:=[.N29]*EXP(([.$E$3]-[.$E$5])*([.$E$1]/ [.$E$2])*(15 - 13))" office:value-type="float" office:value="141.751003291942" calcext:value-type="float">
            <text:p>141.751003291942</text:p>
          </table:table-cell>
          <table:table-cell table:formula="of:=[.O29]*EXP(([.$E$3]-[.$E$5])*([.$E$1]/ [.$E$2])*(15 - 14))" office:value-type="float" office:value="136.343238715644" calcext:value-type="float">
            <text:p>136.343238715644</text:p>
          </table:table-cell>
          <table:table-cell table:formula="of:=[.P29]*EXP(([.$E$3]-[.$E$5])*([.$E$1]/ [.$E$2])*(15 - 15))" office:value-type="float" office:value="131.141778976938" calcext:value-type="float">
            <text:p>131.141778976938</text:p>
          </table:table-cell>
          <table:table-cell table:number-columns-repeated="5"/>
        </table:table-row>
        <table:table-row table:style-name="ro1">
          <table:table-cell table:formula="of:=[.A30]*EXP(([.$E$3]-[.$E$5])*([.$E$1]/ [.$E$2])*(15 - 15))" office:value-type="float" office:value="0" calcext:value-type="float">
            <text:p>0</text:p>
          </table:table-cell>
          <table:table-cell table:formula="of:=[.B30]*EXP(([.$E$3]-[.$E$5])*([.$E$1]/ [.$E$2])*(15 - 15))" office:value-type="float" office:value="0" calcext:value-type="float">
            <text:p>0</text:p>
          </table:table-cell>
          <table:table-cell table:formula="of:=[.C30]*EXP(([.$E$3]-[.$E$5])*([.$E$1]/ [.$E$2])*(15 - 15))" office:value-type="float" office:value="0" calcext:value-type="float">
            <text:p>0</text:p>
          </table:table-cell>
          <table:table-cell table:formula="of:=[.D30]*EXP(([.$E$3]-[.$E$5])*([.$E$1]/ [.$E$2])*(15 - 15))" office:value-type="float" office:value="0" calcext:value-type="float">
            <text:p>0</text:p>
          </table:table-cell>
          <table:table-cell table:formula="of:=[.E30]*EXP(([.$E$3]-[.$E$5])*([.$E$1]/ [.$E$2])*(15 - 15))" office:value-type="float" office:value="0" calcext:value-type="float">
            <text:p>0</text:p>
          </table:table-cell>
          <table:table-cell table:formula="of:=[.F30]*EXP(([.$E$3]-[.$E$5])*([.$E$1]/ [.$E$2])*(15 - 15))" office:value-type="float" office:value="0" calcext:value-type="float">
            <text:p>0</text:p>
          </table:table-cell>
          <table:table-cell table:formula="of:=[.G30]*EXP(([.$E$3]-[.$E$5])*([.$E$1]/ [.$E$2])*(15 - 15))" office:value-type="float" office:value="0" calcext:value-type="float">
            <text:p>0</text:p>
          </table:table-cell>
          <table:table-cell table:formula="of:=[.H30]*EXP(([.$E$3]-[.$E$5])*([.$E$1]/ [.$E$2])*(15 - 15))" office:value-type="float" office:value="0" calcext:value-type="float">
            <text:p>0</text:p>
          </table:table-cell>
          <table:table-cell table:formula="of:=[.I30]*EXP(([.$E$3]-[.$E$5])*([.$E$1]/ [.$E$2])*(15 - 15))" office:value-type="float" office:value="0" calcext:value-type="float">
            <text:p>0</text:p>
          </table:table-cell>
          <table:table-cell table:formula="of:=[.J30]*EXP(([.$E$3]-[.$E$5])*([.$E$1]/ [.$E$2])*(15 - 15))" office:value-type="float" office:value="0" calcext:value-type="float">
            <text:p>0</text:p>
          </table:table-cell>
          <table:table-cell table:formula="of:=[.K30]*EXP(([.$E$3]-[.$E$5])*([.$E$1]/ [.$E$2])*(15 - 10))" office:value-type="float" office:value="147.42238795519" calcext:value-type="float">
            <text:p>147.42238795519</text:p>
          </table:table-cell>
          <table:table-cell table:formula="of:=[.L30]*EXP(([.$E$3]-[.$E$5])*([.$E$1]/ [.$E$2])*(15 - 11))" office:value-type="float" office:value="141.798261502304" calcext:value-type="float">
            <text:p>141.798261502304</text:p>
          </table:table-cell>
          <table:table-cell table:formula="of:=[.M30]*EXP(([.$E$3]-[.$E$5])*([.$E$1]/ [.$E$2])*(15 - 12))" office:value-type="float" office:value="136.388694037348" calcext:value-type="float">
            <text:p>136.388694037348</text:p>
          </table:table-cell>
          <table:table-cell table:formula="of:=[.N30]*EXP(([.$E$3]-[.$E$5])*([.$E$1]/ [.$E$2])*(15 - 13))" office:value-type="float" office:value="131.185500189727" calcext:value-type="float">
            <text:p>131.185500189727</text:p>
          </table:table-cell>
          <table:table-cell table:formula="of:=[.O30]*EXP(([.$E$3]-[.$E$5])*([.$E$1]/ [.$E$2])*(15 - 14))" office:value-type="float" office:value="126.180806858641" calcext:value-type="float">
            <text:p>126.180806858641</text:p>
          </table:table-cell>
          <table:table-cell table:formula="of:=[.P30]*EXP(([.$E$3]-[.$E$5])*([.$E$1]/ [.$E$2])*(15 - 15))" office:value-type="float" office:value="121.367041300075" calcext:value-type="float">
            <text:p>121.367041300075</text:p>
          </table:table-cell>
          <table:table-cell table:number-columns-repeated="5"/>
        </table:table-row>
        <table:table-row table:style-name="ro1">
          <table:table-cell table:formula="of:=[.A31]*EXP(([.$E$3]-[.$E$5])*([.$E$1]/ [.$E$2])*(15 - 15))" office:value-type="float" office:value="0" calcext:value-type="float">
            <text:p>0</text:p>
          </table:table-cell>
          <table:table-cell table:formula="of:=[.B31]*EXP(([.$E$3]-[.$E$5])*([.$E$1]/ [.$E$2])*(15 - 15))" office:value-type="float" office:value="0" calcext:value-type="float">
            <text:p>0</text:p>
          </table:table-cell>
          <table:table-cell table:formula="of:=[.C31]*EXP(([.$E$3]-[.$E$5])*([.$E$1]/ [.$E$2])*(15 - 15))" office:value-type="float" office:value="0" calcext:value-type="float">
            <text:p>0</text:p>
          </table:table-cell>
          <table:table-cell table:formula="of:=[.D31]*EXP(([.$E$3]-[.$E$5])*([.$E$1]/ [.$E$2])*(15 - 15))" office:value-type="float" office:value="0" calcext:value-type="float">
            <text:p>0</text:p>
          </table:table-cell>
          <table:table-cell table:formula="of:=[.E31]*EXP(([.$E$3]-[.$E$5])*([.$E$1]/ [.$E$2])*(15 - 15))" office:value-type="float" office:value="0" calcext:value-type="float">
            <text:p>0</text:p>
          </table:table-cell>
          <table:table-cell table:formula="of:=[.F31]*EXP(([.$E$3]-[.$E$5])*([.$E$1]/ [.$E$2])*(15 - 15))" office:value-type="float" office:value="0" calcext:value-type="float">
            <text:p>0</text:p>
          </table:table-cell>
          <table:table-cell table:formula="of:=[.G31]*EXP(([.$E$3]-[.$E$5])*([.$E$1]/ [.$E$2])*(15 - 15))" office:value-type="float" office:value="0" calcext:value-type="float">
            <text:p>0</text:p>
          </table:table-cell>
          <table:table-cell table:formula="of:=[.H31]*EXP(([.$E$3]-[.$E$5])*([.$E$1]/ [.$E$2])*(15 - 15))" office:value-type="float" office:value="0" calcext:value-type="float">
            <text:p>0</text:p>
          </table:table-cell>
          <table:table-cell table:formula="of:=[.I31]*EXP(([.$E$3]-[.$E$5])*([.$E$1]/ [.$E$2])*(15 - 15))" office:value-type="float" office:value="0" calcext:value-type="float">
            <text:p>0</text:p>
          </table:table-cell>
          <table:table-cell table:formula="of:=[.J31]*EXP(([.$E$3]-[.$E$5])*([.$E$1]/ [.$E$2])*(15 - 9))" office:value-type="float" office:value="141.845535468028" calcext:value-type="float">
            <text:p>141.845535468028</text:p>
          </table:table-cell>
          <table:table-cell table:formula="of:=[.K31]*EXP(([.$E$3]-[.$E$5])*([.$E$1]/ [.$E$2])*(15 - 10))" office:value-type="float" office:value="136.434164513353" calcext:value-type="float">
            <text:p>136.434164513353</text:p>
          </table:table-cell>
          <table:table-cell table:formula="of:=[.L31]*EXP(([.$E$3]-[.$E$5])*([.$E$1]/ [.$E$2])*(15 - 11))" office:value-type="float" office:value="131.229235978684" calcext:value-type="float">
            <text:p>131.229235978684</text:p>
          </table:table-cell>
          <table:table-cell table:formula="of:=[.M31]*EXP(([.$E$3]-[.$E$5])*([.$E$1]/ [.$E$2])*(15 - 12))" office:value-type="float" office:value="126.222874138417" calcext:value-type="float">
            <text:p>126.222874138417</text:p>
          </table:table-cell>
          <table:table-cell table:formula="of:=[.N31]*EXP(([.$E$3]-[.$E$5])*([.$E$1]/ [.$E$2])*(15 - 13))" office:value-type="float" office:value="121.407503723871" calcext:value-type="float">
            <text:p>121.407503723871</text:p>
          </table:table-cell>
          <table:table-cell table:formula="of:=[.O31]*EXP(([.$E$3]-[.$E$5])*([.$E$1]/ [.$E$2])*(15 - 14))" office:value-type="float" office:value="116.775838460927" calcext:value-type="float">
            <text:p>116.775838460927</text:p>
          </table:table-cell>
          <table:table-cell table:formula="of:=[.P31]*EXP(([.$E$3]-[.$E$5])*([.$E$1]/ [.$E$2])*(15 - 15))" office:value-type="float" office:value="112.320870044965" calcext:value-type="float">
            <text:p>112.320870044965</text:p>
          </table:table-cell>
          <table:table-cell table:number-columns-repeated="5"/>
        </table:table-row>
        <table:table-row table:style-name="ro1">
          <table:table-cell table:formula="of:=[.A32]*EXP(([.$E$3]-[.$E$5])*([.$E$1]/ [.$E$2])*(15 - 15))" office:value-type="float" office:value="0" calcext:value-type="float">
            <text:p>0</text:p>
          </table:table-cell>
          <table:table-cell table:formula="of:=[.B32]*EXP(([.$E$3]-[.$E$5])*([.$E$1]/ [.$E$2])*(15 - 15))" office:value-type="float" office:value="0" calcext:value-type="float">
            <text:p>0</text:p>
          </table:table-cell>
          <table:table-cell table:formula="of:=[.C32]*EXP(([.$E$3]-[.$E$5])*([.$E$1]/ [.$E$2])*(15 - 15))" office:value-type="float" office:value="0" calcext:value-type="float">
            <text:p>0</text:p>
          </table:table-cell>
          <table:table-cell table:formula="of:=[.D32]*EXP(([.$E$3]-[.$E$5])*([.$E$1]/ [.$E$2])*(15 - 15))" office:value-type="float" office:value="0" calcext:value-type="float">
            <text:p>0</text:p>
          </table:table-cell>
          <table:table-cell table:formula="of:=[.E32]*EXP(([.$E$3]-[.$E$5])*([.$E$1]/ [.$E$2])*(15 - 15))" office:value-type="float" office:value="0" calcext:value-type="float">
            <text:p>0</text:p>
          </table:table-cell>
          <table:table-cell table:formula="of:=[.F32]*EXP(([.$E$3]-[.$E$5])*([.$E$1]/ [.$E$2])*(15 - 15))" office:value-type="float" office:value="0" calcext:value-type="float">
            <text:p>0</text:p>
          </table:table-cell>
          <table:table-cell table:formula="of:=[.G32]*EXP(([.$E$3]-[.$E$5])*([.$E$1]/ [.$E$2])*(15 - 15))" office:value-type="float" office:value="0" calcext:value-type="float">
            <text:p>0</text:p>
          </table:table-cell>
          <table:table-cell table:style-name="ce8" table:formula="of:=[.H32]*EXP(([.$E$3]-[.$E$5])*([.$E$1]/ [.$E$2])*(15 - 15))" office:value-type="float" office:value="0" calcext:value-type="float">
            <text:p>0</text:p>
          </table:table-cell>
          <table:table-cell table:formula="of:=[.I32]*EXP(([.$E$3]-[.$E$5])*([.$E$1]/ [.$E$2])*(15 - 8))" office:value-type="float" office:value="136.479650148708" calcext:value-type="float">
            <text:p>136.479650148708</text:p>
          </table:table-cell>
          <table:table-cell table:formula="of:=[.J32]*EXP(([.$E$3]-[.$E$5])*([.$E$1]/ [.$E$2])*(15 - 9))" office:value-type="float" office:value="131.272986348666" calcext:value-type="float">
            <text:p>131.272986348666</text:p>
          </table:table-cell>
          <table:table-cell table:formula="of:=[.K32]*EXP(([.$E$3]-[.$E$5])*([.$E$1]/ [.$E$2])*(15 - 10))" office:value-type="float" office:value="126.264955442958" calcext:value-type="float">
            <text:p>126.264955442958</text:p>
          </table:table-cell>
          <table:table-cell table:formula="of:=[.L32]*EXP(([.$E$3]-[.$E$5])*([.$E$1]/ [.$E$2])*(15 - 11))" office:value-type="float" office:value="121.44797963739" calcext:value-type="float">
            <text:p>121.44797963739</text:p>
          </table:table-cell>
          <table:table-cell table:formula="of:=[.M32]*EXP(([.$E$3]-[.$E$5])*([.$E$1]/ [.$E$2])*(15 - 12))" office:value-type="float" office:value="116.814770228681" calcext:value-type="float">
            <text:p>116.814770228681</text:p>
          </table:table-cell>
          <table:table-cell table:formula="of:=[.N32]*EXP(([.$E$3]-[.$E$5])*([.$E$1]/ [.$E$2])*(15 - 13))" office:value-type="float" office:value="112.358316575721" calcext:value-type="float">
            <text:p>112.358316575721</text:p>
          </table:table-cell>
          <table:table-cell table:formula="of:=[.O32]*EXP(([.$E$3]-[.$E$5])*([.$E$1]/ [.$E$2])*(15 - 14))" office:value-type="float" office:value="108.071875491567" calcext:value-type="float">
            <text:p>108.071875491567</text:p>
          </table:table-cell>
          <table:table-cell table:formula="of:=[.P32]*EXP(([.$E$3]-[.$E$5])*([.$E$1]/ [.$E$2])*(15 - 15))" office:value-type="float" office:value="103.948961040134" calcext:value-type="float">
            <text:p>103.948961040134</text:p>
          </table:table-cell>
          <table:table-cell table:number-columns-repeated="5"/>
        </table:table-row>
        <table:table-row table:style-name="ro1">
          <table:table-cell table:formula="of:=[.A33]*EXP(([.$E$3]-[.$E$5])*([.$E$1]/ [.$E$2])*(15 - 15))" office:value-type="float" office:value="0" calcext:value-type="float">
            <text:p>0</text:p>
          </table:table-cell>
          <table:table-cell table:formula="of:=[.B33]*EXP(([.$E$3]-[.$E$5])*([.$E$1]/ [.$E$2])*(15 - 15))" office:value-type="float" office:value="0" calcext:value-type="float">
            <text:p>0</text:p>
          </table:table-cell>
          <table:table-cell table:formula="of:=[.C33]*EXP(([.$E$3]-[.$E$5])*([.$E$1]/ [.$E$2])*(15 - 15))" office:value-type="float" office:value="0" calcext:value-type="float">
            <text:p>0</text:p>
          </table:table-cell>
          <table:table-cell table:formula="of:=[.D33]*EXP(([.$E$3]-[.$E$5])*([.$E$1]/ [.$E$2])*(15 - 15))" office:value-type="float" office:value="0" calcext:value-type="float">
            <text:p>0</text:p>
          </table:table-cell>
          <table:table-cell table:formula="of:=[.E33]*EXP(([.$E$3]-[.$E$5])*([.$E$1]/ [.$E$2])*(15 - 15))" office:value-type="float" office:value="0" calcext:value-type="float">
            <text:p>0</text:p>
          </table:table-cell>
          <table:table-cell table:formula="of:=[.F33]*EXP(([.$E$3]-[.$E$5])*([.$E$1]/ [.$E$2])*(15 - 15))" office:value-type="float" office:value="0" calcext:value-type="float">
            <text:p>0</text:p>
          </table:table-cell>
          <table:table-cell table:formula="of:=[.G33]*EXP(([.$E$3]-[.$E$5])*([.$E$1]/ [.$E$2])*(15 - 15))" office:value-type="float" office:value="0" calcext:value-type="float">
            <text:p>0</text:p>
          </table:table-cell>
          <table:table-cell table:style-name="ce8" table:formula="of:=[.H33]*EXP(([.$E$3]-[.$E$5])*([.$E$1]/ [.$E$2])*(15 - 7))" office:value-type="float" office:value="131.316751304537" calcext:value-type="float">
            <text:p>131.316751304537</text:p>
          </table:table-cell>
          <table:table-cell table:formula="of:=[.I33]*EXP(([.$E$3]-[.$E$5])*([.$E$1]/ [.$E$2])*(15 - 8))" office:value-type="float" office:value="126.307050776938" calcext:value-type="float">
            <text:p>126.307050776938</text:p>
          </table:table-cell>
          <table:table-cell table:formula="of:=[.J33]*EXP(([.$E$3]-[.$E$5])*([.$E$1]/ [.$E$2])*(15 - 9))" office:value-type="float" office:value="121.488469045128" calcext:value-type="float">
            <text:p>121.488469045128</text:p>
          </table:table-cell>
          <table:table-cell table:formula="of:=[.K33]*EXP(([.$E$3]-[.$E$5])*([.$E$1]/ [.$E$2])*(15 - 10))" office:value-type="float" office:value="116.853714975855" calcext:value-type="float">
            <text:p>116.853714975855</text:p>
          </table:table-cell>
          <table:table-cell table:formula="of:=[.L33]*EXP(([.$E$3]-[.$E$5])*([.$E$1]/ [.$E$2])*(15 - 11))" office:value-type="float" office:value="112.395775590735" calcext:value-type="float">
            <text:p>112.395775590735</text:p>
          </table:table-cell>
          <table:table-cell table:formula="of:=[.M33]*EXP(([.$E$3]-[.$E$5])*([.$E$1]/ [.$E$2])*(15 - 12))" office:value-type="float" office:value="108.107905454724" calcext:value-type="float">
            <text:p>108.107905454724</text:p>
          </table:table-cell>
          <table:table-cell table:formula="of:=[.N33]*EXP(([.$E$3]-[.$E$5])*([.$E$1]/ [.$E$2])*(15 - 13))" office:value-type="float" office:value="103.983616469398" calcext:value-type="float">
            <text:p>103.983616469398</text:p>
          </table:table-cell>
          <table:table-cell table:formula="of:=[.O33]*EXP(([.$E$3]-[.$E$5])*([.$E$1]/ [.$E$2])*(15 - 14))" office:value-type="float" office:value="100.016668055633" calcext:value-type="float">
            <text:p>100.016668055633</text:p>
          </table:table-cell>
          <table:table-cell table:formula="of:=[.P33]*EXP(([.$E$3]-[.$E$5])*([.$E$1]/ [.$E$2])*(15 - 15))" office:value-type="float" office:value="96.2010577108035" calcext:value-type="float">
            <text:p>96.2010577108035</text:p>
          </table:table-cell>
          <table:table-cell table:number-columns-repeated="5"/>
        </table:table-row>
        <table:table-row table:style-name="ro1">
          <table:table-cell table:formula="of:=[.A34]*EXP(([.$E$3]-[.$E$5])*([.$E$1]/ [.$E$2])*(15 - 15))" office:value-type="float" office:value="0" calcext:value-type="float">
            <text:p>0</text:p>
          </table:table-cell>
          <table:table-cell table:formula="of:=[.B34]*EXP(([.$E$3]-[.$E$5])*([.$E$1]/ [.$E$2])*(15 - 15))" office:value-type="float" office:value="0" calcext:value-type="float">
            <text:p>0</text:p>
          </table:table-cell>
          <table:table-cell table:formula="of:=[.C34]*EXP(([.$E$3]-[.$E$5])*([.$E$1]/ [.$E$2])*(15 - 15))" office:value-type="float" office:value="0" calcext:value-type="float">
            <text:p>0</text:p>
          </table:table-cell>
          <table:table-cell table:formula="of:=[.D34]*EXP(([.$E$3]-[.$E$5])*([.$E$1]/ [.$E$2])*(15 - 15))" office:value-type="float" office:value="0" calcext:value-type="float">
            <text:p>0</text:p>
          </table:table-cell>
          <table:table-cell table:formula="of:=[.E34]*EXP(([.$E$3]-[.$E$5])*([.$E$1]/ [.$E$2])*(15 - 15))" office:value-type="float" office:value="0" calcext:value-type="float">
            <text:p>0</text:p>
          </table:table-cell>
          <table:table-cell table:formula="of:=[.F34]*EXP(([.$E$3]-[.$E$5])*([.$E$1]/ [.$E$2])*(15 - 15))" office:value-type="float" office:value="0" calcext:value-type="float">
            <text:p>0</text:p>
          </table:table-cell>
          <table:table-cell table:formula="of:=[.G34]*EXP(([.$E$3]-[.$E$5])*([.$E$1]/ [.$E$2])*(15 - 6))" office:value-type="float" office:value="126.349160145035" calcext:value-type="float">
            <text:p>126.349160145035</text:p>
          </table:table-cell>
          <table:table-cell table:style-name="ce8" table:formula="of:=[.H34]*EXP(([.$E$3]-[.$E$5])*([.$E$1]/ [.$E$2])*(15 - 7))" office:value-type="float" office:value="121.528971951586" calcext:value-type="float">
            <text:p>121.528971951586</text:p>
          </table:table-cell>
          <table:table-cell table:formula="of:=[.I34]*EXP(([.$E$3]-[.$E$5])*([.$E$1]/ [.$E$2])*(15 - 8))" office:value-type="float" office:value="116.892672706774" calcext:value-type="float">
            <text:p>116.892672706774</text:p>
          </table:table-cell>
          <table:table-cell table:formula="of:=[.J34]*EXP(([.$E$3]-[.$E$5])*([.$E$1]/ [.$E$2])*(15 - 9))" office:value-type="float" office:value="112.433247094169" calcext:value-type="float">
            <text:p>112.433247094169</text:p>
          </table:table-cell>
          <table:table-cell table:formula="of:=[.K34]*EXP(([.$E$3]-[.$E$5])*([.$E$1]/ [.$E$2])*(15 - 10))" office:value-type="float" office:value="108.143947429871" calcext:value-type="float">
            <text:p>108.143947429871</text:p>
          </table:table-cell>
          <table:table-cell table:formula="of:=[.L34]*EXP(([.$E$3]-[.$E$5])*([.$E$1]/ [.$E$2])*(15 - 11))" office:value-type="float" office:value="104.018283452397" calcext:value-type="float">
            <text:p>104.018283452397</text:p>
          </table:table-cell>
          <table:table-cell table:formula="of:=[.M34]*EXP(([.$E$3]-[.$E$5])*([.$E$1]/ [.$E$2])*(15 - 12))" office:value-type="float" office:value="100.050012502084" calcext:value-type="float">
            <text:p>100.050012502084</text:p>
          </table:table-cell>
          <table:table-cell table:formula="of:=[.N34]*EXP(([.$E$3]-[.$E$5])*([.$E$1]/ [.$E$2])*(15 - 13))" office:value-type="float" office:value="96.2331300751375" calcext:value-type="float">
            <text:p>96.2331300751375</text:p>
          </table:table-cell>
          <table:table-cell table:formula="of:=[.O34]*EXP(([.$E$3]-[.$E$5])*([.$E$1]/ [.$E$2])*(15 - 14))" office:value-type="float" office:value="92.5618607380532" calcext:value-type="float">
            <text:p>92.5618607380532</text:p>
          </table:table-cell>
          <table:table-cell table:formula="of:=[.P34]*EXP(([.$E$3]-[.$E$5])*([.$E$1]/ [.$E$2])*(15 - 15))" office:value-type="float" office:value="89.0306493886379" calcext:value-type="float">
            <text:p>89.0306493886379</text:p>
          </table:table-cell>
          <table:table-cell table:number-columns-repeated="5"/>
        </table:table-row>
        <table:table-row table:style-name="ro1">
          <table:table-cell table:formula="of:=[.A35]*EXP(([.$E$3]-[.$E$5])*([.$E$1]/ [.$E$2])*(15 - 15))" office:value-type="float" office:value="0" calcext:value-type="float">
            <text:p>0</text:p>
          </table:table-cell>
          <table:table-cell table:formula="of:=[.B35]*EXP(([.$E$3]-[.$E$5])*([.$E$1]/ [.$E$2])*(15 - 15))" office:value-type="float" office:value="0" calcext:value-type="float">
            <text:p>0</text:p>
          </table:table-cell>
          <table:table-cell table:formula="of:=[.C35]*EXP(([.$E$3]-[.$E$5])*([.$E$1]/ [.$E$2])*(15 - 15))" office:value-type="float" office:value="0" calcext:value-type="float">
            <text:p>0</text:p>
          </table:table-cell>
          <table:table-cell table:formula="of:=[.D35]*EXP(([.$E$3]-[.$E$5])*([.$E$1]/ [.$E$2])*(15 - 15))" office:value-type="float" office:value="0" calcext:value-type="float">
            <text:p>0</text:p>
          </table:table-cell>
          <table:table-cell table:formula="of:=[.E35]*EXP(([.$E$3]-[.$E$5])*([.$E$1]/ [.$E$2])*(15 - 15))" office:value-type="float" office:value="0" calcext:value-type="float">
            <text:p>0</text:p>
          </table:table-cell>
          <table:table-cell table:formula="of:=[.F35]*EXP(([.$E$3]-[.$E$5])*([.$E$1]/ [.$E$2])*(15 - 5))" office:value-type="float" office:value="121.569488361263" calcext:value-type="float">
            <text:p>121.569488361263</text:p>
          </table:table-cell>
          <table:table-cell table:formula="of:=[.G35]*EXP(([.$E$3]-[.$E$5])*([.$E$1]/ [.$E$2])*(15 - 6))" office:value-type="float" office:value="116.931643425769" calcext:value-type="float">
            <text:p>116.931643425769</text:p>
          </table:table-cell>
          <table:table-cell table:style-name="ce8" table:formula="of:=[.H35]*EXP(([.$E$3]-[.$E$5])*([.$E$1]/ [.$E$2])*(15 - 7))" office:value-type="float" office:value="112.470731090186" calcext:value-type="float">
            <text:p>112.470731090186</text:p>
          </table:table-cell>
          <table:table-cell table:formula="of:=[.I35]*EXP(([.$E$3]-[.$E$5])*([.$E$1]/ [.$E$2])*(15 - 8))" office:value-type="float" office:value="108.180001421012" calcext:value-type="float">
            <text:p>108.180001421012</text:p>
          </table:table-cell>
          <table:table-cell table:formula="of:=[.J35]*EXP(([.$E$3]-[.$E$5])*([.$E$1]/ [.$E$2])*(15 - 9))" office:value-type="float" office:value="104.052961992984" calcext:value-type="float">
            <text:p>104.052961992984</text:p>
          </table:table-cell>
          <table:table-cell table:formula="of:=[.K35]*EXP(([.$E$3]-[.$E$5])*([.$E$1]/ [.$E$2])*(15 - 10))" office:value-type="float" office:value="100.083368065203" calcext:value-type="float">
            <text:p>100.083368065203</text:p>
          </table:table-cell>
          <table:table-cell table:formula="of:=[.L35]*EXP(([.$E$3]-[.$E$5])*([.$E$1]/ [.$E$2])*(15 - 11))" office:value-type="float" office:value="96.2652131320417" calcext:value-type="float">
            <text:p>96.2652131320417</text:p>
          </table:table-cell>
          <table:table-cell table:formula="of:=[.M35]*EXP(([.$E$3]-[.$E$5])*([.$E$1]/ [.$E$2])*(15 - 12))" office:value-type="float" office:value="92.5927198345296" calcext:value-type="float">
            <text:p>92.5927198345296</text:p>
          </table:table-cell>
          <table:table-cell table:formula="of:=[.N35]*EXP(([.$E$3]-[.$E$5])*([.$E$1]/ [.$E$2])*(15 - 13))" office:value-type="float" office:value="89.0603312184643" calcext:value-type="float">
            <text:p>89.0603312184643</text:p>
          </table:table-cell>
          <table:table-cell table:formula="of:=[.O35]*EXP(([.$E$3]-[.$E$5])*([.$E$1]/ [.$E$2])*(15 - 14))" office:value-type="float" office:value="85.6627023260274" calcext:value-type="float">
            <text:p>85.6627023260274</text:p>
          </table:table-cell>
          <table:table-cell table:formula="of:=[.P35]*EXP(([.$E$3]-[.$E$5])*([.$E$1]/ [.$E$2])*(15 - 15))" office:value-type="float" office:value="82.3946921081764" calcext:value-type="float">
            <text:p>82.3946921081764</text:p>
          </table:table-cell>
          <table:table-cell table:number-columns-repeated="5"/>
        </table:table-row>
        <table:table-row table:style-name="ro1">
          <table:table-cell table:formula="of:=[.A36]*EXP(([.$E$3]-[.$E$5])*([.$E$1]/ [.$E$2])*(15 - 15))" office:value-type="float" office:value="0" calcext:value-type="float">
            <text:p>0</text:p>
          </table:table-cell>
          <table:table-cell table:formula="of:=[.B36]*EXP(([.$E$3]-[.$E$5])*([.$E$1]/ [.$E$2])*(15 - 15))" office:value-type="float" office:value="0" calcext:value-type="float">
            <text:p>0</text:p>
          </table:table-cell>
          <table:table-cell table:formula="of:=[.C36]*EXP(([.$E$3]-[.$E$5])*([.$E$1]/ [.$E$2])*(15 - 15))" office:value-type="float" office:value="0" calcext:value-type="float">
            <text:p>0</text:p>
          </table:table-cell>
          <table:table-cell table:formula="of:=[.D36]*EXP(([.$E$3]-[.$E$5])*([.$E$1]/ [.$E$2])*(15 - 15))" office:value-type="float" office:value="0" calcext:value-type="float">
            <text:p>0</text:p>
          </table:table-cell>
          <table:table-cell table:formula="of:=[.E36]*EXP(([.$E$3]-[.$E$5])*([.$E$1]/ [.$E$2])*(15 - 4))" office:value-type="float" office:value="116.970627137168" calcext:value-type="float">
            <text:p>116.970627137168</text:p>
          </table:table-cell>
          <table:table-cell table:formula="of:=[.F36]*EXP(([.$E$3]-[.$E$5])*([.$E$1]/ [.$E$2])*(15 - 5))" office:value-type="float" office:value="112.508227582951" calcext:value-type="float">
            <text:p>112.508227582951</text:p>
          </table:table-cell>
          <table:table-cell table:formula="of:=[.G36]*EXP(([.$E$3]-[.$E$5])*([.$E$1]/ [.$E$2])*(15 - 6))" office:value-type="float" office:value="108.216067432154" calcext:value-type="float">
            <text:p>108.216067432154</text:p>
          </table:table-cell>
          <table:table-cell table:style-name="ce8" table:formula="of:=[.H36]*EXP(([.$E$3]-[.$E$5])*([.$E$1]/ [.$E$2])*(15 - 7))" office:value-type="float" office:value="104.087652095011" calcext:value-type="float">
            <text:p>104.087652095011</text:p>
          </table:table-cell>
          <table:table-cell table:formula="of:=[.I36]*EXP(([.$E$3]-[.$E$5])*([.$E$1]/ [.$E$2])*(15 - 8))" office:value-type="float" office:value="100.116734748696" calcext:value-type="float">
            <text:p>100.116734748696</text:p>
          </table:table-cell>
          <table:table-cell table:formula="of:=[.J36]*EXP(([.$E$3]-[.$E$5])*([.$E$1]/ [.$E$2])*(15 - 9))" office:value-type="float" office:value="96.2973068850807" calcext:value-type="float">
            <text:p>96.2973068850807</text:p>
          </table:table-cell>
          <table:table-cell table:formula="of:=[.K36]*EXP(([.$E$3]-[.$E$5])*([.$E$1]/ [.$E$2])*(15 - 10))" office:value-type="float" office:value="92.623589219086" calcext:value-type="float">
            <text:p>92.623589219086</text:p>
          </table:table-cell>
          <table:table-cell table:formula="of:=[.L36]*EXP(([.$E$3]-[.$E$5])*([.$E$1]/ [.$E$2])*(15 - 11))" office:value-type="float" office:value="89.0900229438831" calcext:value-type="float">
            <text:p>89.0900229438831</text:p>
          </table:table-cell>
          <table:table-cell table:formula="of:=[.M36]*EXP(([.$E$3]-[.$E$5])*([.$E$1]/ [.$E$2])*(15 - 12))" office:value-type="float" office:value="85.6912613197039" calcext:value-type="float">
            <text:p>85.6912613197039</text:p>
          </table:table-cell>
          <table:table-cell table:formula="of:=[.N36]*EXP(([.$E$3]-[.$E$5])*([.$E$1]/ [.$E$2])*(15 - 13))" office:value-type="float" office:value="82.4221615835374" calcext:value-type="float">
            <text:p>82.4221615835374</text:p>
          </table:table-cell>
          <table:table-cell table:formula="of:=[.O36]*EXP(([.$E$3]-[.$E$5])*([.$E$1]/ [.$E$2])*(15 - 14))" office:value-type="float" office:value="79.2777771674679" calcext:value-type="float">
            <text:p>79.2777771674679</text:p>
          </table:table-cell>
          <table:table-cell table:formula="of:=[.P36]*EXP(([.$E$3]-[.$E$5])*([.$E$1]/ [.$E$2])*(15 - 15))" office:value-type="float" office:value="76.2533502138826" calcext:value-type="float">
            <text:p>76.2533502138826</text:p>
          </table:table-cell>
          <table:table-cell table:number-columns-repeated="5"/>
        </table:table-row>
        <table:table-row table:style-name="ro1">
          <table:table-cell table:formula="of:=[.A37]*EXP(([.$E$3]-[.$E$5])*([.$E$1]/ [.$E$2])*(15 - 15))" office:value-type="float" office:value="0" calcext:value-type="float">
            <text:p>0</text:p>
          </table:table-cell>
          <table:table-cell table:formula="of:=[.B37]*EXP(([.$E$3]-[.$E$5])*([.$E$1]/ [.$E$2])*(15 - 15))" office:value-type="float" office:value="0" calcext:value-type="float">
            <text:p>0</text:p>
          </table:table-cell>
          <table:table-cell table:formula="of:=[.C37]*EXP(([.$E$3]-[.$E$5])*([.$E$1]/ [.$E$2])*(15 - 15))" office:value-type="float" office:value="0" calcext:value-type="float">
            <text:p>0</text:p>
          </table:table-cell>
          <table:table-cell table:formula="of:=[.D37]*EXP(([.$E$3]-[.$E$5])*([.$E$1]/ [.$E$2])*(15 - 3))" office:value-type="float" office:value="112.545736576631" calcext:value-type="float">
            <text:p>112.545736576631</text:p>
          </table:table-cell>
          <table:table-cell table:formula="of:=[.E37]*EXP(([.$E$3]-[.$E$5])*([.$E$1]/ [.$E$2])*(15 - 4))" office:value-type="float" office:value="108.252145467303" calcext:value-type="float">
            <text:p>108.252145467303</text:p>
          </table:table-cell>
          <table:table-cell table:formula="of:=[.F37]*EXP(([.$E$3]-[.$E$5])*([.$E$1]/ [.$E$2])*(15 - 5))" office:value-type="float" office:value="104.122353762332" calcext:value-type="float">
            <text:p>104.122353762332</text:p>
          </table:table-cell>
          <table:table-cell table:formula="of:=[.G37]*EXP(([.$E$3]-[.$E$5])*([.$E$1]/ [.$E$2])*(15 - 6))" office:value-type="float" office:value="100.150112556271" calcext:value-type="float">
            <text:p>100.150112556271</text:p>
          </table:table-cell>
          <table:table-cell table:style-name="ce8" table:formula="of:=[.H37]*EXP(([.$E$3]-[.$E$5])*([.$E$1]/ [.$E$2])*(15 - 7))" office:value-type="float" office:value="96.3294113378206" calcext:value-type="float">
            <text:p>96.3294113378206</text:p>
          </table:table-cell>
          <table:table-cell table:formula="of:=[.I37]*EXP(([.$E$3]-[.$E$5])*([.$E$1]/ [.$E$2])*(15 - 8))" office:value-type="float" office:value="92.6544688951525" calcext:value-type="float">
            <text:p>92.6544688951525</text:p>
          </table:table-cell>
          <table:table-cell table:formula="of:=[.J37]*EXP(([.$E$3]-[.$E$5])*([.$E$1]/ [.$E$2])*(15 - 9))" office:value-type="float" office:value="89.1197245681934" calcext:value-type="float">
            <text:p>89.1197245681934</text:p>
          </table:table-cell>
          <table:table-cell table:formula="of:=[.K37]*EXP(([.$E$3]-[.$E$5])*([.$E$1]/ [.$E$2])*(15 - 10))" office:value-type="float" office:value="85.7198298346318" calcext:value-type="float">
            <text:p>85.7198298346318</text:p>
          </table:table-cell>
          <table:table-cell table:formula="of:=[.L37]*EXP(([.$E$3]-[.$E$5])*([.$E$1]/ [.$E$2])*(15 - 11))" office:value-type="float" office:value="82.4496402169164" calcext:value-type="float">
            <text:p>82.4496402169164</text:p>
          </table:table-cell>
          <table:table-cell table:formula="of:=[.M37]*EXP(([.$E$3]-[.$E$5])*([.$E$1]/ [.$E$2])*(15 - 12))" office:value-type="float" office:value="79.3042074980007" calcext:value-type="float">
            <text:p>79.3042074980007</text:p>
          </table:table-cell>
          <table:table-cell table:formula="of:=[.N37]*EXP(([.$E$3]-[.$E$5])*([.$E$1]/ [.$E$2])*(15 - 13))" office:value-type="float" office:value="76.2787722340552" calcext:value-type="float">
            <text:p>76.2787722340552</text:p>
          </table:table-cell>
          <table:table-cell table:formula="of:=[.O37]*EXP(([.$E$3]-[.$E$5])*([.$E$1]/ [.$E$2])*(15 - 14))" office:value-type="float" office:value="73.3687565528165" calcext:value-type="float">
            <text:p>73.3687565528165</text:p>
          </table:table-cell>
          <table:table-cell table:formula="of:=[.P37]*EXP(([.$E$3]-[.$E$5])*([.$E$1]/ [.$E$2])*(15 - 15))" office:value-type="float" office:value="70.5697572266796" calcext:value-type="float">
            <text:p>70.5697572266796</text:p>
          </table:table-cell>
          <table:table-cell table:number-columns-repeated="5"/>
        </table:table-row>
        <table:table-row table:style-name="ro1">
          <table:table-cell table:formula="of:=[.A38]*EXP(([.$E$3]-[.$E$5])*([.$E$1]/ [.$E$2])*(15 - 15))" office:value-type="float" office:value="0" calcext:value-type="float">
            <text:p>0</text:p>
          </table:table-cell>
          <table:table-cell table:formula="of:=[.B38]*EXP(([.$E$3]-[.$E$5])*([.$E$1]/ [.$E$2])*(15 - 15))" office:value-type="float" office:value="0" calcext:value-type="float">
            <text:p>0</text:p>
          </table:table-cell>
          <table:table-cell table:formula="of:=[.C38]*EXP(([.$E$3]-[.$E$5])*([.$E$1]/ [.$E$2])*(15 - 2))" office:value-type="float" office:value="108.288235530469" calcext:value-type="float">
            <text:p>108.288235530469</text:p>
          </table:table-cell>
          <table:table-cell table:formula="of:=[.D38]*EXP(([.$E$3]-[.$E$5])*([.$E$1]/ [.$E$2])*(15 - 3))" office:value-type="float" office:value="104.157066998804" calcext:value-type="float">
            <text:p>104.157066998804</text:p>
          </table:table-cell>
          <table:table-cell table:formula="of:=[.E38]*EXP(([.$E$3]-[.$E$5])*([.$E$1]/ [.$E$2])*(15 - 4))" office:value-type="float" office:value="100.183501491637" calcext:value-type="float">
            <text:p>100.183501491637</text:p>
          </table:table-cell>
          <table:table-cell table:formula="of:=[.F38]*EXP(([.$E$3]-[.$E$5])*([.$E$1]/ [.$E$2])*(15 - 5))" office:value-type="float" office:value="96.3615264938285" calcext:value-type="float">
            <text:p>96.3615264938285</text:p>
          </table:table-cell>
          <table:table-cell table:formula="of:=[.G38]*EXP(([.$E$3]-[.$E$5])*([.$E$1]/ [.$E$2])*(15 - 6))" office:value-type="float" office:value="92.68535886616" calcext:value-type="float">
            <text:p>92.68535886616</text:p>
          </table:table-cell>
          <table:table-cell table:style-name="ce8" table:formula="of:=[.H38]*EXP(([.$E$3]-[.$E$5])*([.$E$1]/ [.$E$2])*(15 - 7))" office:value-type="float" office:value="89.1494360946954" calcext:value-type="float">
            <text:p>89.1494360946954</text:p>
          </table:table-cell>
          <table:table-cell table:formula="of:=[.I38]*EXP(([.$E$3]-[.$E$5])*([.$E$1]/ [.$E$2])*(15 - 8))" office:value-type="float" office:value="85.7484078739853" calcext:value-type="float">
            <text:p>85.7484078739853</text:p>
          </table:table-cell>
          <table:table-cell table:formula="of:=[.J38]*EXP(([.$E$3]-[.$E$5])*([.$E$1]/ [.$E$2])*(15 - 9))" office:value-type="float" office:value="82.4771280113666" calcext:value-type="float">
            <text:p>82.4771280113666</text:p>
          </table:table-cell>
          <table:table-cell table:formula="of:=[.K38]*EXP(([.$E$3]-[.$E$5])*([.$E$1]/ [.$E$2])*(15 - 10))" office:value-type="float" office:value="79.3306466401123" calcext:value-type="float">
            <text:p>79.3306466401123</text:p>
          </table:table-cell>
          <table:table-cell table:formula="of:=[.L38]*EXP(([.$E$3]-[.$E$5])*([.$E$1]/ [.$E$2])*(15 - 11))" office:value-type="float" office:value="76.304202729647" calcext:value-type="float">
            <text:p>76.304202729647</text:p>
          </table:table-cell>
          <table:table-cell table:formula="of:=[.M38]*EXP(([.$E$3]-[.$E$5])*([.$E$1]/ [.$E$2])*(15 - 12))" office:value-type="float" office:value="73.3932168814958" calcext:value-type="float">
            <text:p>73.3932168814958</text:p>
          </table:table-cell>
          <table:table-cell table:formula="of:=[.N38]*EXP(([.$E$3]-[.$E$5])*([.$E$1]/ [.$E$2])*(15 - 13))" office:value-type="float" office:value="70.5932844000662" calcext:value-type="float">
            <text:p>70.5932844000662</text:p>
          </table:table-cell>
          <table:table-cell table:formula="of:=[.O38]*EXP(([.$E$3]-[.$E$5])*([.$E$1]/ [.$E$2])*(15 - 14))" office:value-type="float" office:value="67.9001686277778" calcext:value-type="float">
            <text:p>67.9001686277778</text:p>
          </table:table-cell>
          <table:table-cell table:formula="of:=[.P38]*EXP(([.$E$3]-[.$E$5])*([.$E$1]/ [.$E$2])*(15 - 15))" office:value-type="float" office:value="65.3097945344548" calcext:value-type="float">
            <text:p>65.3097945344548</text:p>
          </table:table-cell>
          <table:table-cell table:number-columns-repeated="5"/>
        </table:table-row>
        <table:table-row table:style-name="ro1">
          <table:table-cell table:formula="of:=[.A39]*EXP(([.$E$3]-[.$E$5])*([.$E$1]/ [.$E$2])*(15 - 15))" office:value-type="float" office:value="0" calcext:value-type="float">
            <text:p>0</text:p>
          </table:table-cell>
          <table:table-cell table:formula="of:=[.B39]*EXP(([.$E$3]-[.$E$5])*([.$E$1]/ [.$E$2])*(15 - 1))" office:value-type="float" office:value="104.191791808284" calcext:value-type="float">
            <text:p>104.191791808284</text:p>
          </table:table-cell>
          <table:table-cell table:formula="of:=[.C39]*EXP(([.$E$3]-[.$E$5])*([.$E$1]/ [.$E$2])*(15 - 2))" office:value-type="float" office:value="100.216901558502" calcext:value-type="float">
            <text:p>100.216901558502</text:p>
          </table:table-cell>
          <table:table-cell table:formula="of:=[.D39]*EXP(([.$E$3]-[.$E$5])*([.$E$1]/ [.$E$2])*(15 - 3))" office:value-type="float" office:value="96.3936523566728" calcext:value-type="float">
            <text:p>96.3936523566728</text:p>
          </table:table-cell>
          <table:table-cell table:formula="of:=[.E39]*EXP(([.$E$3]-[.$E$5])*([.$E$1]/ [.$E$2])*(15 - 4))" office:value-type="float" office:value="92.7162591355409" calcext:value-type="float">
            <text:p>92.7162591355409</text:p>
          </table:table-cell>
          <table:table-cell table:formula="of:=[.F39]*EXP(([.$E$3]-[.$E$5])*([.$E$1]/ [.$E$2])*(15 - 5))" office:value-type="float" office:value="89.1791575266905" calcext:value-type="float">
            <text:p>89.1791575266905</text:p>
          </table:table-cell>
          <table:table-cell table:formula="of:=[.G39]*EXP(([.$E$3]-[.$E$5])*([.$E$1]/ [.$E$2])*(15 - 6))" office:value-type="float" office:value="85.7769954409397" calcext:value-type="float">
            <text:p>85.7769954409397</text:p>
          </table:table-cell>
          <table:table-cell table:style-name="ce8" table:formula="of:=[.H39]*EXP(([.$E$3]-[.$E$5])*([.$E$1]/ [.$E$2])*(15 - 7))" office:value-type="float" office:value="82.5046249699422" calcext:value-type="float">
            <text:p>82.5046249699422</text:p>
          </table:table-cell>
          <table:table-cell table:formula="of:=[.I39]*EXP(([.$E$3]-[.$E$5])*([.$E$1]/ [.$E$2])*(15 - 8))" office:value-type="float" office:value="79.3570945967402" calcext:value-type="float">
            <text:p>79.3570945967402</text:p>
          </table:table-cell>
          <table:table-cell table:formula="of:=[.J39]*EXP(([.$E$3]-[.$E$5])*([.$E$1]/ [.$E$2])*(15 - 9))" office:value-type="float" office:value="76.3296417034836" calcext:value-type="float">
            <text:p>76.3296417034836</text:p>
          </table:table-cell>
          <table:table-cell table:formula="of:=[.K39]*EXP(([.$E$3]-[.$E$5])*([.$E$1]/ [.$E$2])*(15 - 10))" office:value-type="float" office:value="73.417685364977" calcext:value-type="float">
            <text:p>73.417685364977</text:p>
          </table:table-cell>
          <table:table-cell table:formula="of:=[.L39]*EXP(([.$E$3]-[.$E$5])*([.$E$1]/ [.$E$2])*(15 - 11))" office:value-type="float" office:value="70.6168194171512" calcext:value-type="float">
            <text:p>70.6168194171512</text:p>
          </table:table-cell>
          <table:table-cell table:formula="of:=[.M39]*EXP(([.$E$3]-[.$E$5])*([.$E$1]/ [.$E$2])*(15 - 12))" office:value-type="float" office:value="67.9228057899711" calcext:value-type="float">
            <text:p>67.9228057899711</text:p>
          </table:table-cell>
          <table:table-cell table:formula="of:=[.N39]*EXP(([.$E$3]-[.$E$5])*([.$E$1]/ [.$E$2])*(15 - 13))" office:value-type="float" office:value="65.3315680946914" calcext:value-type="float">
            <text:p>65.3315680946914</text:p>
          </table:table-cell>
          <table:table-cell table:formula="of:=[.O39]*EXP(([.$E$3]-[.$E$5])*([.$E$1]/ [.$E$2])*(15 - 14))" office:value-type="float" office:value="62.839185455756" calcext:value-type="float">
            <text:p>62.839185455756</text:p>
          </table:table-cell>
          <table:table-cell table:formula="of:=[.P39]*EXP(([.$E$3]-[.$E$5])*([.$E$1]/ [.$E$2])*(15 - 15))" office:value-type="float" office:value="60.4418865780104" calcext:value-type="float">
            <text:p>60.4418865780104</text:p>
          </table:table-cell>
          <table:table-cell table:number-columns-repeated="5"/>
        </table:table-row>
        <table:table-row table:style-name="ro1">
          <table:table-cell table:formula="of:=[.A40]*EXP(([.$E$3]-[.$E$5])*([.$E$1]/ [.$E$2])*(15 - 0))" office:value-type="float" office:value="100.25031276058" calcext:value-type="float">
            <text:p>100.25031276058</text:p>
          </table:table-cell>
          <table:table-cell table:formula="of:=[.B40]*EXP(([.$E$3]-[.$E$5])*([.$E$1]/ [.$E$2])*(15 - 1))" office:value-type="float" office:value="96.425788929923" calcext:value-type="float">
            <text:p>96.425788929923</text:p>
          </table:table-cell>
          <table:table-cell table:formula="of:=[.C40]*EXP(([.$E$3]-[.$E$5])*([.$E$1]/ [.$E$2])*(15 - 2))" office:value-type="float" office:value="92.7471697067283" calcext:value-type="float">
            <text:p>92.7471697067283</text:p>
          </table:table-cell>
          <table:table-cell table:formula="of:=[.D40]*EXP(([.$E$3]-[.$E$5])*([.$E$1]/ [.$E$2])*(15 - 3))" office:value-type="float" office:value="89.2088888674809" calcext:value-type="float">
            <text:p>89.2088888674809</text:p>
          </table:table-cell>
          <table:table-cell table:formula="of:=[.E40]*EXP(([.$E$3]-[.$E$5])*([.$E$1]/ [.$E$2])*(15 - 4))" office:value-type="float" office:value="85.8055925386715" calcext:value-type="float">
            <text:p>85.8055925386715</text:p>
          </table:table-cell>
          <table:table-cell table:formula="of:=[.F40]*EXP(([.$E$3]-[.$E$5])*([.$E$1]/ [.$E$2])*(15 - 5))" office:value-type="float" office:value="82.5321310956984" calcext:value-type="float">
            <text:p>82.5321310956984</text:p>
          </table:table-cell>
          <table:table-cell table:formula="of:=[.G40]*EXP(([.$E$3]-[.$E$5])*([.$E$1]/ [.$E$2])*(15 - 6))" office:value-type="float" office:value="79.3835513708232" calcext:value-type="float">
            <text:p>79.3835513708232</text:p>
          </table:table-cell>
          <table:table-cell table:style-name="ce8" table:formula="of:=[.H40]*EXP(([.$E$3]-[.$E$5])*([.$E$1]/ [.$E$2])*(15 - 7))" office:value-type="float" office:value="76.3550891583917" calcext:value-type="float">
            <text:p>76.3550891583917</text:p>
          </table:table-cell>
          <table:table-cell table:formula="of:=[.I40]*EXP(([.$E$3]-[.$E$5])*([.$E$1]/ [.$E$2])*(15 - 8))" office:value-type="float" office:value="73.4421620059788" calcext:value-type="float">
            <text:p>73.4421620059788</text:p>
          </table:table-cell>
          <table:table-cell table:formula="of:=[.J40]*EXP(([.$E$3]-[.$E$5])*([.$E$1]/ [.$E$2])*(15 - 9))" office:value-type="float" office:value="70.6403622805494" calcext:value-type="float">
            <text:p>70.6403622805494</text:p>
          </table:table-cell>
          <table:table-cell table:formula="of:=[.K40]*EXP(([.$E$3]-[.$E$5])*([.$E$1]/ [.$E$2])*(15 - 10))" office:value-type="float" office:value="67.945450499143" calcext:value-type="float">
            <text:p>67.945450499143</text:p>
          </table:table-cell>
          <table:table-cell table:formula="of:=[.L40]*EXP(([.$E$3]-[.$E$5])*([.$E$1]/ [.$E$2])*(15 - 11))" office:value-type="float" office:value="65.3533489139911" calcext:value-type="float">
            <text:p>65.3533489139911</text:p>
          </table:table-cell>
          <table:table-cell table:formula="of:=[.M40]*EXP(([.$E$3]-[.$E$5])*([.$E$1]/ [.$E$2])*(15 - 12))" office:value-type="float" office:value="62.8601353423617" calcext:value-type="float">
            <text:p>62.8601353423617</text:p>
          </table:table-cell>
          <table:table-cell table:formula="of:=[.N40]*EXP(([.$E$3]-[.$E$5])*([.$E$1]/ [.$E$2])*(15 - 13))" office:value-type="float" office:value="60.4620372317922" calcext:value-type="float">
            <text:p>60.4620372317922</text:p>
          </table:table-cell>
          <table:table-cell table:formula="of:=[.O40]*EXP(([.$E$3]-[.$E$5])*([.$E$1]/ [.$E$2])*(15 - 14))" office:value-type="float" office:value="58.1554259517328" calcext:value-type="float">
            <text:p>58.1554259517328</text:p>
          </table:table-cell>
          <table:table-cell table:formula="of:=[.P40]*EXP(([.$E$3]-[.$E$5])*([.$E$1]/ [.$E$2])*(15 - 15))" office:value-type="float" office:value="55.936811302963" calcext:value-type="float">
            <text:p>55.936811302963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  <table:table-cell table:style-name="ce8"/>
          <table:table-cell table:number-columns-repeated="13"/>
        </table:table-row>
        <table:table-row table:style-name="ro1">
          <table:table-cell table:formula="of:=MAX([.A134] - 110; ( 1/[.$B$4]) * ( [.$B$5] *[.B155]+[.$B$6]*[.B156]))" office:value-type="string" office:string-value="" calcext:value-type="error">
            <text:p>#VALUE!</text:p>
          </table:table-cell>
          <table:table-cell table:formula="of:=MAX([.B134] - 110; ( 1/[.$B$4]) * ( [.$B$5] *[.C155]+[.$B$6]*[.C156]))" office:value-type="float" office:value="0" calcext:value-type="float">
            <text:p>0</text:p>
          </table:table-cell>
          <table:table-cell table:formula="of:=MAX([.C134] - 110; ( 1/[.$B$4]) * ( [.$B$5] *[.D155]+[.$B$6]*[.D156]))" office:value-type="float" office:value="0" calcext:value-type="float">
            <text:p>0</text:p>
          </table:table-cell>
          <table:table-cell table:formula="of:=MAX([.D134] - 110; ( 1/[.$B$4]) * ( [.$B$5] *[.E155]+[.$B$6]*[.E156]))" office:value-type="float" office:value="0" calcext:value-type="float">
            <text:p>0</text:p>
          </table:table-cell>
          <table:table-cell table:formula="of:=MAX([.E134] - 110; ( 1/[.$B$4]) * ( [.$B$5] *[.F155]+[.$B$6]*[.F156]))" office:value-type="float" office:value="0" calcext:value-type="float">
            <text:p>0</text:p>
          </table:table-cell>
          <table:table-cell table:formula="of:=MAX([.F134] - 110; ( 1/[.$B$4]) * ( [.$B$5] *[.G155]+[.$B$6]*[.G156]))" office:value-type="float" office:value="0" calcext:value-type="float">
            <text:p>0</text:p>
          </table:table-cell>
          <table:table-cell table:formula="of:=MAX([.G134] - 110; ( 1/[.$B$4]) * ( [.$B$5] *[.H155]+[.$B$6]*[.H156]))" office:value-type="float" office:value="0" calcext:value-type="float">
            <text:p>0</text:p>
          </table:table-cell>
          <table:table-cell table:style-name="ce8" table:formula="of:=MAX([.H134] - 110; ( 1/[.$B$4]) * ( [.$B$5] *[.I155]+[.$B$6]*[.I156]))" office:value-type="float" office:value="0" calcext:value-type="float">
            <text:p>0</text:p>
          </table:table-cell>
          <table:table-cell table:formula="of:=MAX([.I134] - 110; ( 1/[.$B$4]) * ( [.$B$5] *[.J155]+[.$B$6]*[.J156]))" office:value-type="float" office:value="0" calcext:value-type="float">
            <text:p>0</text:p>
          </table:table-cell>
          <table:table-cell table:formula="of:=MAX([.J134] - 110; ( 1/[.$B$4]) * ( [.$B$5] *[.K155]+[.$B$6]*[.K156]))" office:value-type="float" office:value="0" calcext:value-type="float">
            <text:p>0</text:p>
          </table:table-cell>
          <table:table-cell table:formula="of:= MAX( [.K134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35] - 110; ( 1/[.$B$4]) * ( [.$B$5] *[.B156]+[.$B$6]*[.B157]))" office:value-type="float" office:value="0" calcext:value-type="float">
            <text:p>0</text:p>
          </table:table-cell>
          <table:table-cell table:formula="of:=MAX([.B135] - 110; ( 1/[.$B$4]) * ( [.$B$5] *[.C156]+[.$B$6]*[.C157]))" office:value-type="float" office:value="0" calcext:value-type="float">
            <text:p>0</text:p>
          </table:table-cell>
          <table:table-cell table:formula="of:=MAX([.C135] - 110; ( 1/[.$B$4]) * ( [.$B$5] *[.D156]+[.$B$6]*[.D157]))" office:value-type="float" office:value="0" calcext:value-type="float">
            <text:p>0</text:p>
          </table:table-cell>
          <table:table-cell table:formula="of:=MAX([.D135] - 110; ( 1/[.$B$4]) * ( [.$B$5] *[.E156]+[.$B$6]*[.E157]))" office:value-type="float" office:value="0" calcext:value-type="float">
            <text:p>0</text:p>
          </table:table-cell>
          <table:table-cell table:formula="of:=MAX([.E135] - 110; ( 1/[.$B$4]) * ( [.$B$5] *[.F156]+[.$B$6]*[.F157]))" office:value-type="float" office:value="0" calcext:value-type="float">
            <text:p>0</text:p>
          </table:table-cell>
          <table:table-cell table:formula="of:=MAX([.F135] - 110; ( 1/[.$B$4]) * ( [.$B$5] *[.G156]+[.$B$6]*[.G157]))" office:value-type="float" office:value="0" calcext:value-type="float">
            <text:p>0</text:p>
          </table:table-cell>
          <table:table-cell table:formula="of:=MAX([.G135] - 110; ( 1/[.$B$4]) * ( [.$B$5] *[.H156]+[.$B$6]*[.H157]))" office:value-type="float" office:value="0" calcext:value-type="float">
            <text:p>0</text:p>
          </table:table-cell>
          <table:table-cell table:style-name="ce8" table:formula="of:=MAX([.H135] - 110; ( 1/[.$B$4]) * ( [.$B$5] *[.I156]+[.$B$6]*[.I157]))" office:value-type="float" office:value="0" calcext:value-type="float">
            <text:p>0</text:p>
          </table:table-cell>
          <table:table-cell table:formula="of:=MAX([.I135] - 110; ( 1/[.$B$4]) * ( [.$B$5] *[.J156]+[.$B$6]*[.J157]))" office:value-type="float" office:value="0" calcext:value-type="float">
            <text:p>0</text:p>
          </table:table-cell>
          <table:table-cell table:formula="of:=MAX([.J135] - 110; ( 1/[.$B$4]) * ( [.$B$5] *[.K156]+[.$B$6]*[.K157]))" office:value-type="float" office:value="0" calcext:value-type="float">
            <text:p>0</text:p>
          </table:table-cell>
          <table:table-cell table:formula="of:= MAX( [.K135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36] - 110; ( 1/[.$B$4]) * ( [.$B$5] *[.B157]+[.$B$6]*[.B158]))" office:value-type="float" office:value="0" calcext:value-type="float">
            <text:p>0</text:p>
          </table:table-cell>
          <table:table-cell table:formula="of:=MAX([.B136] - 110; ( 1/[.$B$4]) * ( [.$B$5] *[.C157]+[.$B$6]*[.C158]))" office:value-type="float" office:value="0" calcext:value-type="float">
            <text:p>0</text:p>
          </table:table-cell>
          <table:table-cell table:formula="of:=MAX([.C136] - 110; ( 1/[.$B$4]) * ( [.$B$5] *[.D157]+[.$B$6]*[.D158]))" office:value-type="float" office:value="0" calcext:value-type="float">
            <text:p>0</text:p>
          </table:table-cell>
          <table:table-cell table:formula="of:=MAX([.D136] - 110; ( 1/[.$B$4]) * ( [.$B$5] *[.E157]+[.$B$6]*[.E158]))" office:value-type="float" office:value="0" calcext:value-type="float">
            <text:p>0</text:p>
          </table:table-cell>
          <table:table-cell table:formula="of:=MAX([.E136] - 110; ( 1/[.$B$4]) * ( [.$B$5] *[.F157]+[.$B$6]*[.F158]))" office:value-type="float" office:value="0" calcext:value-type="float">
            <text:p>0</text:p>
          </table:table-cell>
          <table:table-cell table:formula="of:=MAX([.F136] - 110; ( 1/[.$B$4]) * ( [.$B$5] *[.G157]+[.$B$6]*[.G158]))" office:value-type="float" office:value="0" calcext:value-type="float">
            <text:p>0</text:p>
          </table:table-cell>
          <table:table-cell table:formula="of:=MAX([.G136] - 110; ( 1/[.$B$4]) * ( [.$B$5] *[.H157]+[.$B$6]*[.H158]))" office:value-type="float" office:value="0" calcext:value-type="float">
            <text:p>0</text:p>
          </table:table-cell>
          <table:table-cell table:style-name="ce8" table:formula="of:=MAX([.H136] - 110; ( 1/[.$B$4]) * ( [.$B$5] *[.I157]+[.$B$6]*[.I158]))" office:value-type="float" office:value="0" calcext:value-type="float">
            <text:p>0</text:p>
          </table:table-cell>
          <table:table-cell table:formula="of:=MAX([.I136] - 110; ( 1/[.$B$4]) * ( [.$B$5] *[.J157]+[.$B$6]*[.J158]))" office:value-type="float" office:value="0" calcext:value-type="float">
            <text:p>0</text:p>
          </table:table-cell>
          <table:table-cell table:formula="of:=MAX([.J136] - 110; ( 1/[.$B$4]) * ( [.$B$5] *[.K157]+[.$B$6]*[.K158]))" office:value-type="float" office:value="0" calcext:value-type="float">
            <text:p>0</text:p>
          </table:table-cell>
          <table:table-cell table:formula="of:= MAX( [.K136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37] - 110; ( 1/[.$B$4]) * ( [.$B$5] *[.B158]+[.$B$6]*[.B159]))" office:value-type="float" office:value="0" calcext:value-type="float">
            <text:p>0</text:p>
          </table:table-cell>
          <table:table-cell table:formula="of:=MAX([.B137] - 110; ( 1/[.$B$4]) * ( [.$B$5] *[.C158]+[.$B$6]*[.C159]))" office:value-type="float" office:value="0" calcext:value-type="float">
            <text:p>0</text:p>
          </table:table-cell>
          <table:table-cell table:formula="of:=MAX([.C137] - 110; ( 1/[.$B$4]) * ( [.$B$5] *[.D158]+[.$B$6]*[.D159]))" office:value-type="float" office:value="0" calcext:value-type="float">
            <text:p>0</text:p>
          </table:table-cell>
          <table:table-cell table:formula="of:=MAX([.D137] - 110; ( 1/[.$B$4]) * ( [.$B$5] *[.E158]+[.$B$6]*[.E159]))" office:value-type="float" office:value="0" calcext:value-type="float">
            <text:p>0</text:p>
          </table:table-cell>
          <table:table-cell table:formula="of:=MAX([.E137] - 110; ( 1/[.$B$4]) * ( [.$B$5] *[.F158]+[.$B$6]*[.F159]))" office:value-type="float" office:value="0" calcext:value-type="float">
            <text:p>0</text:p>
          </table:table-cell>
          <table:table-cell table:formula="of:=MAX([.F137] - 110; ( 1/[.$B$4]) * ( [.$B$5] *[.G158]+[.$B$6]*[.G159]))" office:value-type="float" office:value="0" calcext:value-type="float">
            <text:p>0</text:p>
          </table:table-cell>
          <table:table-cell table:formula="of:=MAX([.G137] - 110; ( 1/[.$B$4]) * ( [.$B$5] *[.H158]+[.$B$6]*[.H159]))" office:value-type="float" office:value="0" calcext:value-type="float">
            <text:p>0</text:p>
          </table:table-cell>
          <table:table-cell table:style-name="ce8" table:formula="of:=MAX([.H137] - 110; ( 1/[.$B$4]) * ( [.$B$5] *[.I158]+[.$B$6]*[.I159]))" office:value-type="float" office:value="0" calcext:value-type="float">
            <text:p>0</text:p>
          </table:table-cell>
          <table:table-cell table:formula="of:=MAX([.I137] - 110; ( 1/[.$B$4]) * ( [.$B$5] *[.J158]+[.$B$6]*[.J159]))" office:value-type="float" office:value="0" calcext:value-type="float">
            <text:p>0</text:p>
          </table:table-cell>
          <table:table-cell table:formula="of:=MAX([.J137] - 110; ( 1/[.$B$4]) * ( [.$B$5] *[.K158]+[.$B$6]*[.K159]))" office:value-type="float" office:value="0" calcext:value-type="float">
            <text:p>0</text:p>
          </table:table-cell>
          <table:table-cell table:formula="of:= MAX( [.K137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38] - 110; ( 1/[.$B$4]) * ( [.$B$5] *[.B159]+[.$B$6]*[.B160]))" office:value-type="float" office:value="0" calcext:value-type="float">
            <text:p>0</text:p>
          </table:table-cell>
          <table:table-cell table:formula="of:=MAX([.B138] - 110; ( 1/[.$B$4]) * ( [.$B$5] *[.C159]+[.$B$6]*[.C160]))" office:value-type="float" office:value="0" calcext:value-type="float">
            <text:p>0</text:p>
          </table:table-cell>
          <table:table-cell table:formula="of:=MAX([.C138] - 110; ( 1/[.$B$4]) * ( [.$B$5] *[.D159]+[.$B$6]*[.D160]))" office:value-type="float" office:value="0" calcext:value-type="float">
            <text:p>0</text:p>
          </table:table-cell>
          <table:table-cell table:formula="of:=MAX([.D138] - 110; ( 1/[.$B$4]) * ( [.$B$5] *[.E159]+[.$B$6]*[.E160]))" office:value-type="float" office:value="0" calcext:value-type="float">
            <text:p>0</text:p>
          </table:table-cell>
          <table:table-cell table:formula="of:=MAX([.E138] - 110; ( 1/[.$B$4]) * ( [.$B$5] *[.F159]+[.$B$6]*[.F160]))" office:value-type="float" office:value="0" calcext:value-type="float">
            <text:p>0</text:p>
          </table:table-cell>
          <table:table-cell table:formula="of:=MAX([.F138] - 110; ( 1/[.$B$4]) * ( [.$B$5] *[.G159]+[.$B$6]*[.G160]))" office:value-type="float" office:value="0" calcext:value-type="float">
            <text:p>0</text:p>
          </table:table-cell>
          <table:table-cell table:formula="of:=MAX([.G138] - 110; ( 1/[.$B$4]) * ( [.$B$5] *[.H159]+[.$B$6]*[.H160]))" office:value-type="float" office:value="0" calcext:value-type="float">
            <text:p>0</text:p>
          </table:table-cell>
          <table:table-cell table:style-name="ce8" table:formula="of:=MAX([.H138] - 110; ( 1/[.$B$4]) * ( [.$B$5] *[.I159]+[.$B$6]*[.I160]))" office:value-type="float" office:value="0" calcext:value-type="float">
            <text:p>0</text:p>
          </table:table-cell>
          <table:table-cell table:formula="of:=MAX([.I138] - 110; ( 1/[.$B$4]) * ( [.$B$5] *[.J159]+[.$B$6]*[.J16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 MAX( [.K138] - 110 ; 0)" office:value-type="float" office:value="37.4223879551901" calcext:value-type="float">
            <text:p>37.4223879551901</text:p>
          </table:table-cell>
          <table:table-cell table:number-columns-repeated="10"/>
        </table:table-row>
        <table:table-row table:style-name="ro1">
          <table:table-cell table:formula="of:=MAX([.A139] - 110; ( 1/[.$B$4]) * ( [.$B$5] *[.B160]+[.$B$6]*[.B161]))" office:value-type="float" office:value="0" calcext:value-type="float">
            <text:p>0</text:p>
          </table:table-cell>
          <table:table-cell table:formula="of:=MAX([.B139] - 110; ( 1/[.$B$4]) * ( [.$B$5] *[.C160]+[.$B$6]*[.C161]))" office:value-type="float" office:value="0" calcext:value-type="float">
            <text:p>0</text:p>
          </table:table-cell>
          <table:table-cell table:formula="of:=MAX([.C139] - 110; ( 1/[.$B$4]) * ( [.$B$5] *[.D160]+[.$B$6]*[.D161]))" office:value-type="float" office:value="0" calcext:value-type="float">
            <text:p>0</text:p>
          </table:table-cell>
          <table:table-cell table:formula="of:=MAX([.D139] - 110; ( 1/[.$B$4]) * ( [.$B$5] *[.E160]+[.$B$6]*[.E161]))" office:value-type="float" office:value="0" calcext:value-type="float">
            <text:p>0</text:p>
          </table:table-cell>
          <table:table-cell table:formula="of:=MAX([.E139] - 110; ( 1/[.$B$4]) * ( [.$B$5] *[.F160]+[.$B$6]*[.F161]))" office:value-type="float" office:value="0" calcext:value-type="float">
            <text:p>0</text:p>
          </table:table-cell>
          <table:table-cell table:formula="of:=MAX([.F139] - 110; ( 1/[.$B$4]) * ( [.$B$5] *[.G160]+[.$B$6]*[.G161]))" office:value-type="float" office:value="0" calcext:value-type="float">
            <text:p>0</text:p>
          </table:table-cell>
          <table:table-cell table:formula="of:=MAX([.G139] - 110; ( 1/[.$B$4]) * ( [.$B$5] *[.H160]+[.$B$6]*[.H161]))" office:value-type="float" office:value="0" calcext:value-type="float">
            <text:p>0</text:p>
          </table:table-cell>
          <table:table-cell table:style-name="ce8" table:formula="of:=MAX([.H139] - 110; ( 1/[.$B$4]) * ( [.$B$5] *[.I160]+[.$B$6]*[.I16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J139] - 110; ( 1/[.$B$4]) * ( [.$B$5] *[.K160]+[.$B$6]*[.K161]))" office:value-type="float" office:value="31.8455354680277" calcext:value-type="float">
            <text:p>31.8455354680277</text:p>
          </table:table-cell>
          <table:table-cell table:formula="of:= MAX( [.K139] - 110 ; 0)" office:value-type="float" office:value="26.4341645133525" calcext:value-type="float">
            <text:p>26.4341645133525</text:p>
          </table:table-cell>
          <table:table-cell table:number-columns-repeated="10"/>
        </table:table-row>
        <table:table-row table:style-name="ro1">
          <table:table-cell table:formula="of:=MAX([.A140] - 110; ( 1/[.$B$4]) * ( [.$B$5] *[.B161]+[.$B$6]*[.B162]))" office:value-type="float" office:value="0" calcext:value-type="float">
            <text:p>0</text:p>
          </table:table-cell>
          <table:table-cell table:formula="of:=MAX([.B140] - 110; ( 1/[.$B$4]) * ( [.$B$5] *[.C161]+[.$B$6]*[.C162]))" office:value-type="float" office:value="0" calcext:value-type="float">
            <text:p>0</text:p>
          </table:table-cell>
          <table:table-cell table:formula="of:=MAX([.C140] - 110; ( 1/[.$B$4]) * ( [.$B$5] *[.D161]+[.$B$6]*[.D162]))" office:value-type="float" office:value="0" calcext:value-type="float">
            <text:p>0</text:p>
          </table:table-cell>
          <table:table-cell table:formula="of:=MAX([.D140] - 110; ( 1/[.$B$4]) * ( [.$B$5] *[.E161]+[.$B$6]*[.E162]))" office:value-type="float" office:value="0" calcext:value-type="float">
            <text:p>0</text:p>
          </table:table-cell>
          <table:table-cell table:formula="of:=MAX([.E140] - 110; ( 1/[.$B$4]) * ( [.$B$5] *[.F161]+[.$B$6]*[.F162]))" office:value-type="float" office:value="0" calcext:value-type="float">
            <text:p>0</text:p>
          </table:table-cell>
          <table:table-cell table:formula="of:=MAX([.F140] - 110; ( 1/[.$B$4]) * ( [.$B$5] *[.G161]+[.$B$6]*[.G162]))" office:value-type="float" office:value="0" calcext:value-type="float">
            <text:p>0</text:p>
          </table:table-cell>
          <table:table-cell table:formula="of:=MAX([.G140] - 110; ( 1/[.$B$4]) * ( [.$B$5] *[.H161]+[.$B$6]*[.H162])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MAX([.I140] - 110; ( 1/[.$B$4]) * ( [.$B$5] *[.J161]+[.$B$6]*[.J162]))" office:value-type="float" office:value="26.4796501487084" calcext:value-type="float">
            <text:p>26.4796501487084</text:p>
          </table:table-cell>
          <table:table-cell table:formula="of:=MAX([.J140] - 110; ( 1/[.$B$4]) * ( [.$B$5] *[.K161]+[.$B$6]*[.K162]))" office:value-type="float" office:value="21.2729863486664" calcext:value-type="float">
            <text:p>21.2729863486664</text:p>
          </table:table-cell>
          <table:table-cell table:formula="of:= MAX( [.K140] - 110 ; 0)" office:value-type="float" office:value="16.2649554429579" calcext:value-type="float">
            <text:p>16.2649554429579</text:p>
          </table:table-cell>
          <table:table-cell table:number-columns-repeated="10"/>
        </table:table-row>
        <table:table-row table:style-name="ro1">
          <table:table-cell table:formula="of:=MAX([.A141] - 110; ( 1/[.$B$4]) * ( [.$B$5] *[.B162]+[.$B$6]*[.B163]))" office:value-type="float" office:value="0" calcext:value-type="float">
            <text:p>0</text:p>
          </table:table-cell>
          <table:table-cell table:formula="of:=MAX([.B141] - 110; ( 1/[.$B$4]) * ( [.$B$5] *[.C162]+[.$B$6]*[.C163]))" office:value-type="float" office:value="0" calcext:value-type="float">
            <text:p>0</text:p>
          </table:table-cell>
          <table:table-cell table:formula="of:=MAX([.C141] - 110; ( 1/[.$B$4]) * ( [.$B$5] *[.D162]+[.$B$6]*[.D163]))" office:value-type="float" office:value="0" calcext:value-type="float">
            <text:p>0</text:p>
          </table:table-cell>
          <table:table-cell table:formula="of:=MAX([.D141] - 110; ( 1/[.$B$4]) * ( [.$B$5] *[.E162]+[.$B$6]*[.E163]))" office:value-type="float" office:value="0" calcext:value-type="float">
            <text:p>0</text:p>
          </table:table-cell>
          <table:table-cell table:formula="of:=MAX([.E141] - 110; ( 1/[.$B$4]) * ( [.$B$5] *[.F162]+[.$B$6]*[.F163]))" office:value-type="float" office:value="0" calcext:value-type="float">
            <text:p>0</text:p>
          </table:table-cell>
          <table:table-cell table:formula="of:=MAX([.F141] - 110; ( 1/[.$B$4]) * ( [.$B$5] *[.G162]+[.$B$6]*[.G16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MAX([.H141] - 110; ( 1/[.$B$4]) * ( [.$B$5] *[.I162]+[.$B$6]*[.I163]))" office:value-type="float" office:value="21.3167513045367" calcext:value-type="float">
            <text:p>21.3167513045367</text:p>
          </table:table-cell>
          <table:table-cell table:formula="of:=MAX([.I141] - 110; ( 1/[.$B$4]) * ( [.$B$5] *[.J162]+[.$B$6]*[.J163]))" office:value-type="float" office:value="16.3070507769382" calcext:value-type="float">
            <text:p>16.3070507769382</text:p>
          </table:table-cell>
          <table:table-cell table:formula="of:=MAX([.J141] - 110; ( 1/[.$B$4]) * ( [.$B$5] *[.K162]+[.$B$6]*[.K163]))" office:value-type="float" office:value="11.4884690451284" calcext:value-type="float">
            <text:p>11.4884690451284</text:p>
          </table:table-cell>
          <table:table-cell table:formula="of:= MAX( [.K141] - 110 ; 0)" office:value-type="float" office:value="6.85371497585462" calcext:value-type="float">
            <text:p>6.85371497585462</text:p>
          </table:table-cell>
          <table:table-cell table:number-columns-repeated="10"/>
        </table:table-row>
        <table:table-row table:style-name="ro1">
          <table:table-cell table:formula="of:=MAX([.A142] - 110; ( 1/[.$B$4]) * ( [.$B$5] *[.B163]+[.$B$6]*[.B164]))" office:value-type="float" office:value="0" calcext:value-type="float">
            <text:p>0</text:p>
          </table:table-cell>
          <table:table-cell table:formula="of:=MAX([.B142] - 110; ( 1/[.$B$4]) * ( [.$B$5] *[.C163]+[.$B$6]*[.C164]))" office:value-type="float" office:value="0" calcext:value-type="float">
            <text:p>0</text:p>
          </table:table-cell>
          <table:table-cell table:formula="of:=MAX([.C142] - 110; ( 1/[.$B$4]) * ( [.$B$5] *[.D163]+[.$B$6]*[.D164]))" office:value-type="float" office:value="0" calcext:value-type="float">
            <text:p>0</text:p>
          </table:table-cell>
          <table:table-cell table:formula="of:=MAX([.D142] - 110; ( 1/[.$B$4]) * ( [.$B$5] *[.E163]+[.$B$6]*[.E164]))" office:value-type="float" office:value="0" calcext:value-type="float">
            <text:p>0</text:p>
          </table:table-cell>
          <table:table-cell table:formula="of:=MAX([.E142] - 110; ( 1/[.$B$4]) * ( [.$B$5] *[.F163]+[.$B$6]*[.F16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G142] - 110; ( 1/[.$B$4]) * ( [.$B$5] *[.H163]+[.$B$6]*[.H164]))" office:value-type="float" office:value="16.4640512700907" calcext:value-type="float">
            <text:p>16.4640512700907</text:p>
          </table:table-cell>
          <table:table-cell table:style-name="ce8" table:formula="of:=MAX([.H142] - 110; ( 1/[.$B$4]) * ( [.$B$5] *[.I163]+[.$B$6]*[.I164]))" office:value-type="float" office:value="11.7661600368701" calcext:value-type="float">
            <text:p>11.7661600368701</text:p>
          </table:table-cell>
          <table:table-cell table:formula="of:=MAX([.I142] - 110; ( 1/[.$B$4]) * ( [.$B$5] *[.J163]+[.$B$6]*[.J164]))" office:value-type="float" office:value="7.36773982877254" calcext:value-type="float">
            <text:p>7.36773982877254</text:p>
          </table:table-cell>
          <table:table-cell table:formula="of:=MAX([.J142] - 110; ( 1/[.$B$4]) * ( [.$B$5] *[.K163]+[.$B$6]*[.K164]))" office:value-type="float" office:value="3.37412446549773" calcext:value-type="float">
            <text:p>3.37412446549773</text:p>
          </table:table-cell>
          <table:table-cell table:formula="of:= MAX( [.K142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43] - 110; ( 1/[.$B$4]) * ( [.$B$5] *[.B164]+[.$B$6]*[.B165]))" office:value-type="float" office:value="0" calcext:value-type="float">
            <text:p>0</text:p>
          </table:table-cell>
          <table:table-cell table:formula="of:=MAX([.B143] - 110; ( 1/[.$B$4]) * ( [.$B$5] *[.C164]+[.$B$6]*[.C165]))" office:value-type="float" office:value="0" calcext:value-type="float">
            <text:p>0</text:p>
          </table:table-cell>
          <table:table-cell table:formula="of:=MAX([.C143] - 110; ( 1/[.$B$4]) * ( [.$B$5] *[.D164]+[.$B$6]*[.D165]))" office:value-type="float" office:value="0" calcext:value-type="float">
            <text:p>0</text:p>
          </table:table-cell>
          <table:table-cell table:formula="of:=MAX([.D143] - 110; ( 1/[.$B$4]) * ( [.$B$5] *[.E164]+[.$B$6]*[.E16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F143] - 110; ( 1/[.$B$4]) * ( [.$B$5] *[.G164]+[.$B$6]*[.G165]))" office:value-type="float" office:value="12.1948974658042" calcext:value-type="float">
            <text:p>12.1948974658042</text:p>
          </table:table-cell>
          <table:table-cell table:formula="of:=MAX([.G143] - 110; ( 1/[.$B$4]) * ( [.$B$5] *[.H164]+[.$B$6]*[.H165]))" office:value-type="float" office:value="8.06043259469404" calcext:value-type="float">
            <text:p>8.06043259469404</text:p>
          </table:table-cell>
          <table:table-cell table:style-name="ce8" table:formula="of:=MAX([.H143] - 110; ( 1/[.$B$4]) * ( [.$B$5] *[.I164]+[.$B$6]*[.I165]))" office:value-type="float" office:value="4.46995970816804" calcext:value-type="float">
            <text:p>4.46995970816804</text:p>
          </table:table-cell>
          <table:table-cell table:formula="of:=MAX([.I143] - 110; ( 1/[.$B$4]) * ( [.$B$5] *[.J164]+[.$B$6]*[.J165]))" office:value-type="float" office:value="1.66110145355887" calcext:value-type="float">
            <text:p>1.66110145355887</text:p>
          </table:table-cell>
          <table:table-cell table:formula="of:=MAX([.J143] - 110; ( 1/[.$B$4]) * ( [.$B$5] *[.K164]+[.$B$6]*[.K165]))" office:value-type="float" office:value="0" calcext:value-type="float">
            <text:p>0</text:p>
          </table:table-cell>
          <table:table-cell table:formula="of:= MAX( [.K143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44] - 110; ( 1/[.$B$4]) * ( [.$B$5] *[.B165]+[.$B$6]*[.B166]))" office:value-type="float" office:value="0" calcext:value-type="float">
            <text:p>0</text:p>
          </table:table-cell>
          <table:table-cell table:formula="of:=MAX([.B144] - 110; ( 1/[.$B$4]) * ( [.$B$5] *[.C165]+[.$B$6]*[.C166]))" office:value-type="float" office:value="0" calcext:value-type="float">
            <text:p>0</text:p>
          </table:table-cell>
          <table:table-cell table:formula="of:=MAX([.C144] - 110; ( 1/[.$B$4]) * ( [.$B$5] *[.D165]+[.$B$6]*[.D16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E144] - 110; ( 1/[.$B$4]) * ( [.$B$5] *[.F165]+[.$B$6]*[.F166]))" office:value-type="float" office:value="8.69019555663447" calcext:value-type="float">
            <text:p>8.69019555663447</text:p>
          </table:table-cell>
          <table:table-cell table:formula="of:=MAX([.F144] - 110; ( 1/[.$B$4]) * ( [.$B$5] *[.G165]+[.$B$6]*[.G166]))" office:value-type="float" office:value="5.29519686924997" calcext:value-type="float">
            <text:p>5.29519686924997</text:p>
          </table:table-cell>
          <table:table-cell table:formula="of:=MAX([.G144] - 110; ( 1/[.$B$4]) * ( [.$B$5] *[.H165]+[.$B$6]*[.H166]))" office:value-type="float" office:value="2.61549211579006" calcext:value-type="float">
            <text:p>2.61549211579006</text:p>
          </table:table-cell>
          <table:table-cell table:style-name="ce8" table:formula="of:=MAX([.H144] - 110; ( 1/[.$B$4]) * ( [.$B$5] *[.I165]+[.$B$6]*[.I166]))" office:value-type="float" office:value="0.81777008146271" calcext:value-type="float">
            <text:p>0.81777008146271</text:p>
          </table:table-cell>
          <table:table-cell table:formula="of:=MAX([.I144] - 110; ( 1/[.$B$4]) * ( [.$B$5] *[.J165]+[.$B$6]*[.J166]))" office:value-type="float" office:value="0" calcext:value-type="float">
            <text:p>0</text:p>
          </table:table-cell>
          <table:table-cell table:formula="of:=MAX([.J144] - 110; ( 1/[.$B$4]) * ( [.$B$5] *[.K165]+[.$B$6]*[.K166]))" office:value-type="float" office:value="0" calcext:value-type="float">
            <text:p>0</text:p>
          </table:table-cell>
          <table:table-cell table:formula="of:= MAX( [.K144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45] - 110; ( 1/[.$B$4]) * ( [.$B$5] *[.B166]+[.$B$6]*[.B167]))" office:value-type="float" office:value="0" calcext:value-type="float">
            <text:p>0</text:p>
          </table:table-cell>
          <table:table-cell table:formula="of:=MAX([.B145] - 110; ( 1/[.$B$4]) * ( [.$B$5] *[.C166]+[.$B$6]*[.C16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D145] - 110; ( 1/[.$B$4]) * ( [.$B$5] *[.E166]+[.$B$6]*[.E167]))" office:value-type="float" office:value="5.98488449754845" calcext:value-type="float">
            <text:p>5.98488449754845</text:p>
          </table:table-cell>
          <table:table-cell table:formula="of:=MAX([.E145] - 110; ( 1/[.$B$4]) * ( [.$B$5] *[.F166]+[.$B$6]*[.F167]))" office:value-type="float" office:value="3.36377931581418" calcext:value-type="float">
            <text:p>3.36377931581418</text:p>
          </table:table-cell>
          <table:table-cell table:formula="of:=MAX([.F145] - 110; ( 1/[.$B$4]) * ( [.$B$5] *[.G166]+[.$B$6]*[.G167]))" office:value-type="float" office:value="1.49188218970907" calcext:value-type="float">
            <text:p>1.49188218970907</text:p>
          </table:table-cell>
          <table:table-cell table:formula="of:=MAX([.G145] - 110; ( 1/[.$B$4]) * ( [.$B$5] *[.H166]+[.$B$6]*[.H167]))" office:value-type="float" office:value="0.402593053363929" calcext:value-type="float">
            <text:p>0.402593053363929</text:p>
          </table:table-cell>
          <table:table-cell table:style-name="ce8" table:formula="of:=MAX([.H145] - 110; ( 1/[.$B$4]) * ( [.$B$5] *[.I166]+[.$B$6]*[.I167]))" office:value-type="float" office:value="0" calcext:value-type="float">
            <text:p>0</text:p>
          </table:table-cell>
          <table:table-cell table:formula="of:=MAX([.I145] - 110; ( 1/[.$B$4]) * ( [.$B$5] *[.J166]+[.$B$6]*[.J167]))" office:value-type="float" office:value="0" calcext:value-type="float">
            <text:p>0</text:p>
          </table:table-cell>
          <table:table-cell table:formula="of:=MAX([.J145] - 110; ( 1/[.$B$4]) * ( [.$B$5] *[.K166]+[.$B$6]*[.K167]))" office:value-type="float" office:value="0" calcext:value-type="float">
            <text:p>0</text:p>
          </table:table-cell>
          <table:table-cell table:formula="of:= MAX( [.K145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46] - 110; ( 1/[.$B$4]) * ( [.$B$5] *[.B167]+[.$B$6]*[.B16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C146] - 110; ( 1/[.$B$4]) * ( [.$B$5] *[.D167]+[.$B$6]*[.D168]))" office:value-type="float" office:value="4.0015347299413" calcext:value-type="float">
            <text:p>4.0015347299413</text:p>
          </table:table-cell>
          <table:table-cell table:formula="of:=MAX([.D146] - 110; ( 1/[.$B$4]) * ( [.$B$5] *[.E167]+[.$B$6]*[.E168]))" office:value-type="float" office:value="2.07966530249637" calcext:value-type="float">
            <text:p>2.07966530249637</text:p>
          </table:table-cell>
          <table:table-cell table:formula="of:=MAX([.E146] - 110; ( 1/[.$B$4]) * ( [.$B$5] *[.F167]+[.$B$6]*[.F168]))" office:value-type="float" office:value="0.835020810863396" calcext:value-type="float">
            <text:p>0.835020810863396</text:p>
          </table:table-cell>
          <table:table-cell table:formula="of:=MAX([.F146] - 110; ( 1/[.$B$4]) * ( [.$B$5] *[.G167]+[.$B$6]*[.G168]))" office:value-type="float" office:value="0.198198944044253" calcext:value-type="float">
            <text:p>0.198198944044253</text:p>
          </table:table-cell>
          <table:table-cell table:formula="of:=MAX([.G146] - 110; ( 1/[.$B$4]) * ( [.$B$5] *[.H167]+[.$B$6]*[.H168]))" office:value-type="float" office:value="0" calcext:value-type="float">
            <text:p>0</text:p>
          </table:table-cell>
          <table:table-cell table:style-name="ce8" table:formula="of:=MAX([.H146] - 110; ( 1/[.$B$4]) * ( [.$B$5] *[.I167]+[.$B$6]*[.I168]))" office:value-type="float" office:value="0" calcext:value-type="float">
            <text:p>0</text:p>
          </table:table-cell>
          <table:table-cell table:formula="of:=MAX([.I146] - 110; ( 1/[.$B$4]) * ( [.$B$5] *[.J167]+[.$B$6]*[.J168]))" office:value-type="float" office:value="0" calcext:value-type="float">
            <text:p>0</text:p>
          </table:table-cell>
          <table:table-cell table:formula="of:=MAX([.J146] - 110; ( 1/[.$B$4]) * ( [.$B$5] *[.K167]+[.$B$6]*[.K168]))" office:value-type="float" office:value="0" calcext:value-type="float">
            <text:p>0</text:p>
          </table:table-cell>
          <table:table-cell table:formula="of:= MAX( [.K146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B147] - 110; ( 1/[.$B$4]) * ( [.$B$5] *[.C168]+[.$B$6]*[.C169]))" office:value-type="float" office:value="2.60799430201479" calcext:value-type="float">
            <text:p>2.60799430201479</text:p>
          </table:table-cell>
          <table:table-cell table:formula="of:=MAX([.C147] - 110; ( 1/[.$B$4]) * ( [.$B$5] *[.D168]+[.$B$6]*[.D169]))" office:value-type="float" office:value="1.25751744918478" calcext:value-type="float">
            <text:p>1.25751744918478</text:p>
          </table:table-cell>
          <table:table-cell table:formula="of:=MAX([.D147] - 110; ( 1/[.$B$4]) * ( [.$B$5] *[.E168]+[.$B$6]*[.E169]))" office:value-type="float" office:value="0.460591173038957" calcext:value-type="float">
            <text:p>0.460591173038957</text:p>
          </table:table-cell>
          <table:table-cell table:formula="of:=MAX([.E147] - 110; ( 1/[.$B$4]) * ( [.$B$5] *[.F168]+[.$B$6]*[.F169]))" office:value-type="float" office:value="0.0975745137478728" calcext:value-type="float">
            <text:p>0.0975745137478728</text:p>
          </table:table-cell>
          <table:table-cell table:formula="of:=MAX([.F147] - 110; ( 1/[.$B$4]) * ( [.$B$5] *[.G168]+[.$B$6]*[.G169]))" office:value-type="float" office:value="0" calcext:value-type="float">
            <text:p>0</text:p>
          </table:table-cell>
          <table:table-cell table:formula="of:=MAX([.G147] - 110; ( 1/[.$B$4]) * ( [.$B$5] *[.H168]+[.$B$6]*[.H169]))" office:value-type="float" office:value="0" calcext:value-type="float">
            <text:p>0</text:p>
          </table:table-cell>
          <table:table-cell table:style-name="ce8" table:formula="of:=MAX([.H147] - 110; ( 1/[.$B$4]) * ( [.$B$5] *[.I168]+[.$B$6]*[.I169]))" office:value-type="float" office:value="0" calcext:value-type="float">
            <text:p>0</text:p>
          </table:table-cell>
          <table:table-cell table:formula="of:=MAX([.I147] - 110; ( 1/[.$B$4]) * ( [.$B$5] *[.J168]+[.$B$6]*[.J169]))" office:value-type="float" office:value="0" calcext:value-type="float">
            <text:p>0</text:p>
          </table:table-cell>
          <table:table-cell table:formula="of:=MAX([.J147] - 110; ( 1/[.$B$4]) * ( [.$B$5] *[.K168]+[.$B$6]*[.K169]))" office:value-type="float" office:value="0" calcext:value-type="float">
            <text:p>0</text:p>
          </table:table-cell>
          <table:table-cell table:formula="of:= MAX( [.K147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MAX([.A148] - 110; ( 1/[.$B$4]) * ( [.$B$5] *[.B169]+[.$B$6]*[.B170]))" office:value-type="float" office:value="1.66267260778825" calcext:value-type="float">
            <text:p>1.66267260778825</text:p>
          </table:table-cell>
          <table:table-cell table:formula="of:=MAX([.B148] - 110; ( 1/[.$B$4]) * ( [.$B$5] *[.C169]+[.$B$6]*[.C170]))" office:value-type="float" office:value="0.746493559436926" calcext:value-type="float">
            <text:p>0.746493559436926</text:p>
          </table:table-cell>
          <table:table-cell table:formula="of:=MAX([.C148] - 110; ( 1/[.$B$4]) * ( [.$B$5] *[.D169]+[.$B$6]*[.D170]))" office:value-type="float" office:value="0.251123604420735" calcext:value-type="float">
            <text:p>0.251123604420735</text:p>
          </table:table-cell>
          <table:table-cell table:formula="of:=MAX([.D148] - 110; ( 1/[.$B$4]) * ( [.$B$5] *[.E169]+[.$B$6]*[.E170]))" office:value-type="float" office:value="0.0480365108857899" calcext:value-type="float">
            <text:p>0.0480365108857899</text:p>
          </table:table-cell>
          <table:table-cell table:formula="of:=MAX([.E148] - 110; ( 1/[.$B$4]) * ( [.$B$5] *[.F169]+[.$B$6]*[.F170]))" office:value-type="float" office:value="0" calcext:value-type="float">
            <text:p>0</text:p>
          </table:table-cell>
          <table:table-cell table:formula="of:=MAX([.F148] - 110; ( 1/[.$B$4]) * ( [.$B$5] *[.G169]+[.$B$6]*[.G170]))" office:value-type="float" office:value="0" calcext:value-type="float">
            <text:p>0</text:p>
          </table:table-cell>
          <table:table-cell table:formula="of:=MAX([.G148] - 110; ( 1/[.$B$4]) * ( [.$B$5] *[.H169]+[.$B$6]*[.H170]))" office:value-type="float" office:value="0" calcext:value-type="float">
            <text:p>0</text:p>
          </table:table-cell>
          <table:table-cell table:style-name="ce8" table:formula="of:=MAX([.H148] - 110; ( 1/[.$B$4]) * ( [.$B$5] *[.I169]+[.$B$6]*[.I170]))" office:value-type="float" office:value="0" calcext:value-type="float">
            <text:p>0</text:p>
          </table:table-cell>
          <table:table-cell table:formula="of:=MAX([.I148] - 110; ( 1/[.$B$4]) * ( [.$B$5] *[.J169]+[.$B$6]*[.J170]))" office:value-type="float" office:value="0" calcext:value-type="float">
            <text:p>0</text:p>
          </table:table-cell>
          <table:table-cell table:formula="of:=MAX([.J148] - 110; ( 1/[.$B$4]) * ( [.$B$5] *[.K169]+[.$B$6]*[.K170]))" office:value-type="float" office:value="0" calcext:value-type="float">
            <text:p>0</text:p>
          </table:table-cell>
          <table:table-cell table:formula="of:= MAX( [.K148] - 110 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8"/>
          <table:table-cell table:number-columns-repeated="13"/>
        </table:table-row>
        <table:table-row table:style-name="ro1">
          <table:table-cell table:number-columns-repeated="7"/>
          <table:table-cell table:style-name="ce8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6:58:28.596032579</meta:creation-date>
    <dc:date>2026-04-20T11:27:26.665783017</dc:date>
    <meta:editing-duration>PT1H35M20S</meta:editing-duration>
    <meta:editing-cycles>24</meta:editing-cycles>
    <meta:generator>LibreOffice/7.3.7.2$Linux_X86_64 LibreOffice_project/30$Build-2</meta:generator>
    <meta:document-statistic meta:table-count="1" meta:cell-count="1189" meta:object-count="0"/>
  </office:meta>
</office:document-meta>
</file>